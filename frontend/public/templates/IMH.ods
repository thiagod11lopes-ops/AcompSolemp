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1" svg:font-family="Calibri1"/>
    <style:font-face style:name="Arial1" svg:font-family="Arial1"/>
    <style:font-face style:name="Calibri" svg:font-family="Calibri"/>
    <style:font-face style:name="Calibri2" svg:font-family="Calibri2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BuiltIn_Comma" style:data-style-name="N40">
      <style:table-cell-properties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" style:family="table-cell" style:parent-style-name="Excel_BuiltIn_Comma" style:data-style-name="N4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231F20"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31F2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BuiltIn_Comma" style:data-style-name="N4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BuiltIn_Comma" style:data-style-name="N4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Excel_BuiltIn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231F20"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1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33333"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 style:vertical-align="middle" fo:background-color="transparent"/>
    </style:style>
    <style:style style:name="ce21" style:family="table-cell" style:parent-style-name="Excel_BuiltIn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0" style:family="table-cell" style:parent-style-name="Excel_BuiltIn_Comma" style:data-style-name="N40">
      <style:table-cell-properties fo:border="thin solid #000000" style:vertical-align="middle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automatic" fo:background-color="#FFFFFF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5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57" style:family="table-cell" style:parent-style-name="Default" style:data-style-name="N36">
      <style:table-cell-properties style:vertical-align="middle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/>
    </style:style>
    <style:style style:name="ce62" style:family="table-cell" style:parent-style-name="Default" style:data-style-name="N36"/>
    <style:style style:name="ce63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4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5" style:family="table-cell" style:parent-style-name="Default" style:data-style-name="N36">
      <style:table-cell-properties style:vertical-align="middle" style:repeat-content="false"/>
      <style:paragraph-properties fo:text-align="start" fo:margin-left="0.353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middle"/>
      <style:text-properties fo:color="#000000" style:font-name="Calibri2" style:font-name-asian="Calibri2" style:font-name-complex="Calibri2"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middle" fo:background-color="#FFFFFF"/>
      <style:text-properties fo:color="#000000" style:font-name="Calibri2" style:font-name-asian="Calibri2" style:font-name-complex="Calibri2"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72" style:family="table-cell" style:parent-style-name="Default" style:data-style-name="N1">
      <style:table-cell-properties fo:border="thin solid #000000" style:vertical-align="middle" fo:wrap-option="wrap" style:shrink-to-fit="tru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73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style:font-name="Calibri2" style:font-name-asian="Calibri2" style:font-name-complex="Calibri2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middle"/>
    </style:style>
    <style:style style:name="ce79" style:family="table-cell" style:parent-style-name="Default" style:data-style-name="N1">
      <style:table-cell-properties fo:border="thin solid #000000" style:vertical-align="middle" fo:wrap-option="wrap" fo:background-color="#D9D9D9" style:shrink-to-fit="tru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1">
      <style:table-cell-properties fo:border="thin solid #000000" style:vertical-align="middle" fo:wrap-option="wrap" fo:background-color="#FFFFFF" style:shrink-to-fit="true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justify"/>
      <style:text-properties style:font-name="Calibri2" style:font-name-asian="Calibri2" style:font-name-complex="Calibri2" fo:font-size="10pt" style:font-size-asian="10pt" style:font-size-complex="10pt"/>
    </style:style>
    <style:style style:name="ce8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middle" fo:background-color="#FFFFFF"/>
      <style:text-properties fo:color="#000000" style:font-name="Calibri2" style:font-name-asian="Calibri2" style:font-name-complex="Calibri2"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Calibri2" style:font-name-asian="Calibri2" style:font-name-complex="Calibri2" fo:font-size="10pt" style:font-size-asian="10pt" style:font-size-complex="10pt"/>
    </style:style>
    <style:style style:name="ce8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9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9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94" style:family="table-cell" style:parent-style-name="Default" style:data-style-name="N0">
      <style:table-cell-properties style:vertical-align="top" fo:background-color="#FFFFFF" style:repeat-content="false"/>
      <style:paragraph-properties fo:text-align="justify"/>
    </style:style>
    <style:style style:name="ce95" style:family="table-cell" style:parent-style-name="Excel_BuiltIn_Currency" style:data-style-name="N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style:font-name="Calibri2" style:font-name-asian="Calibri2" style:font-name-complex="Calibri2" fo:font-size="12pt" style:font-size-asian="12pt" style:font-size-complex="12pt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>
      <style:table-cell-properties style:vertical-align="middle" fo:background-color="transparent"/>
    </style:style>
    <style:style style:name="ce100" style:family="table-cell" style:parent-style-name="Default" style:data-style-name="N1">
      <style:table-cell-properties style:vertical-align="middle" fo:background-color="transparent"/>
    </style:style>
    <style:style style:name="ce101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231F20" style:font-name="Calibri" style:font-name-asian="Calibri" style:font-name-complex="Calibri" fo:font-size="10pt" style:font-size-asian="10pt" style:font-size-complex="10pt"/>
    </style:style>
    <style:style style:name="ce103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0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231F20" style:font-name="Calibri" style:font-name-asian="Calibri" style:font-name-complex="Calibri" fo:font-size="10pt" style:font-size-asian="10pt" style:font-size-complex="10pt"/>
    </style:style>
    <style:style style:name="ce107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0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Calibri2" style:font-name-asian="Calibri2" style:font-name-complex="Calibri2" fo:font-size="10pt" style:font-size-asian="10pt" style:font-size-complex="10pt"/>
    </style:style>
    <style:style style:name="ce10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33333" style:font-name="Calibri" style:font-name-asian="Calibri" style:font-name-complex="Calibri" fo:font-size="10pt" style:font-size-asian="10pt" style:font-size-complex="10pt"/>
    </style:style>
    <style:style style:name="ce11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13" style:family="table-cell" style:parent-style-name="Default" style:data-style-name="N0">
      <style:text-properties fo:color="#000000" style:font-name="Calibri2" style:font-name-asian="Calibri2" style:font-name-complex="Calibri2" fo:font-weight="bold" style:font-weight-asian="bold" style:font-weight-complex="bold"/>
    </style:style>
    <style:style style:name="ce114" style:family="table-cell" style:parent-style-name="Default" style:data-style-name="N39">
      <style:table-cell-properties fo:border="thin solid #000000" style:vertical-align="middle" fo:background-color="#DDDDDD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36">
      <style:table-cell-properties fo:border="thin solid #000000" style:vertical-align="middle" fo:background-color="#DDDDDD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2" style:font-name-asian="Calibri2" style:font-name-complex="Calibri2" fo:font-weight="bold" style:font-weight-asian="bold" style:font-weight-complex="bold"/>
    </style:style>
    <style:style style:name="ce11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124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25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2pt" style:font-size-asian="12pt" style:font-size-complex="12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31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e136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2" style:font-name-asian="Calibri2" style:font-name-complex="Calibri2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7.831666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5.0560416666667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0.582083333333333cm"/>
    </style:style>
    <style:style style:name="co15" style:family="table-column">
      <style:table-column-properties fo:break-before="auto" style:column-width="5.5297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page" style:column-width="1.56104166666667cm"/>
    </style:style>
    <style:style style:name="co21" style:family="table-column">
      <style:table-column-properties fo:break-before="auto" style:column-width="13.8641666666667cm"/>
    </style:style>
    <style:style style:name="co22" style:family="table-column">
      <style:table-column-properties fo:break-before="auto" style:column-width="0.899583333333333cm"/>
    </style:style>
    <style:style style:name="co23" style:family="table-column">
      <style:table-column-properties fo:break-before="auto" style:column-width="1.77270833333333cm"/>
    </style:style>
    <style:style style:name="co24" style:family="table-column">
      <style:table-column-properties fo:break-before="auto" style:column-width="2.40770833333333cm"/>
    </style:style>
    <style:style style:name="co25" style:family="table-column">
      <style:table-column-properties fo:break-before="auto" style:column-width="17.8329166666667cm"/>
    </style:style>
    <style:style style:name="co26" style:family="table-column">
      <style:table-column-properties fo:break-before="auto" style:column-width="0.5291666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0.343958333333333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8.04333333333333cm"/>
    </style:style>
    <style:style style:name="co31" style:family="table-column">
      <style:table-column-properties fo:break-before="auto" style:column-width="2.936875cm"/>
    </style:style>
    <style:style style:name="co32" style:family="table-column">
      <style:table-column-properties fo:break-before="auto" style:column-width="9.47208333333333cm"/>
    </style:style>
    <style:style style:name="co33" style:family="table-column">
      <style:table-column-properties fo:break-before="auto" style:column-width="3.38666666666667cm"/>
    </style:style>
    <style:style style:name="co34" style:family="table-column">
      <style:table-column-properties fo:break-before="auto" style:column-width="2.72520833333333cm"/>
    </style:style>
    <style:style style:name="co35" style:family="table-column">
      <style:table-column-properties fo:break-before="auto" style:column-width="4.206875cm"/>
    </style:style>
    <style:style style:name="co36" style:family="table-column">
      <style:table-column-properties fo:break-before="auto" style:column-width="3.33375cm"/>
    </style:style>
    <style:style style:name="co37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2.95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16.9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3.15pt" style:use-optimal-row-height="false" fo:break-before="auto"/>
    </style:style>
    <style:style style:name="ro8" style:family="table-row">
      <style:table-row-properties style:row-height="17.1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89.25pt" style:use-optimal-row-height="true" fo:break-before="auto"/>
    </style:style>
    <style:style style:name="ro12" style:family="table-row">
      <style:table-row-properties style:row-height="76.5pt" style:use-optimal-row-height="true" fo:break-before="auto"/>
    </style:style>
    <style:style style:name="ro13" style:family="table-row">
      <style:table-row-properties style:row-height="63.75pt" style:use-optimal-row-height="true" fo:break-before="auto"/>
    </style:style>
    <style:style style:name="ro14" style:family="table-row">
      <style:table-row-properties style:row-height="191.25pt" style:use-optimal-row-height="true" fo:break-before="auto"/>
    </style:style>
    <style:style style:name="ro15" style:family="table-row">
      <style:table-row-properties style:row-height="114.75pt" style:use-optimal-row-height="true" fo:break-before="auto"/>
    </style:style>
    <style:style style:name="ro16" style:family="table-row">
      <style:table-row-properties style:row-height="38.2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ro18" style:family="table-row">
      <style:table-row-properties style:row-height="102pt" style:use-optimal-row-height="true" fo:break-before="auto"/>
    </style:style>
    <style:style style:name="ro19" style:family="table-row">
      <style:table-row-properties style:row-height="25.5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165.75pt" style:use-optimal-row-height="true" fo:break-before="auto"/>
    </style:style>
    <style:style style:name="ro22" style:family="table-row">
      <style:table-row-properties style:row-height="153pt" style:use-optimal-row-height="true" fo:break-before="auto"/>
    </style:style>
    <style:style style:name="ro23" style:family="table-row">
      <style:table-row-properties style:row-height="216.75pt" style:use-optimal-row-height="true" fo:break-before="auto"/>
    </style:style>
    <style:style style:name="ro24" style:family="table-row">
      <style:table-row-properties style:row-height="178.5pt" style:use-optimal-row-height="true" fo:break-before="auto"/>
    </style:style>
    <style:style style:name="ro25" style:family="table-row">
      <style:table-row-properties style:row-height="140.25pt" style:use-optimal-row-height="true" fo:break-before="auto"/>
    </style:style>
    <style:style style:name="ro26" style:family="table-row">
      <style:table-row-properties style:row-height="127.5pt" style:use-optimal-row-height="true" fo:break-before="auto"/>
    </style:style>
    <style:style style:name="ro27" style:family="table-row">
      <style:table-row-properties style:row-height="38.85pt" style:use-optimal-row-height="false" fo:break-before="auto"/>
    </style:style>
    <style:style style:name="ro28" style:family="table-row">
      <style:table-row-properties style:row-height="19.9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1.95pt" style:use-optimal-row-height="false" fo:break-before="auto"/>
    </style:style>
    <style:style style:name="ro31" style:family="table-row">
      <style:table-row-properties style:row-height="40.9pt" style:use-optimal-row-height="false" fo:break-before="auto"/>
    </style:style>
    <style:style style:name="ro32" style:family="table-row">
      <style:table-row-properties style:row-height="22.9pt" style:use-optimal-row-height="false" fo:break-before="auto"/>
    </style:style>
    <style:style style:name="ro33" style:family="table-row">
      <style:table-row-properties style:row-height="27pt" style:use-optimal-row-height="false" fo:break-before="auto"/>
    </style:style>
    <style:style style:name="ro34" style:family="table-row">
      <style:table-row-properties style:row-height="14.65pt" style:use-optimal-row-height="true" fo:break-before="auto"/>
    </style:style>
    <style:style style:name="ro35" style:family="table-row">
      <style:table-row-properties style:row-height="21.75pt" style:use-optimal-row-height="false" fo:break-before="auto"/>
    </style:style>
    <style:style style:name="ro36" style:family="table-row">
      <style:table-row-properties style:row-height="30.75pt" style:use-optimal-row-height="false" fo:break-before="auto"/>
    </style:style>
    <style:style style:name="ro37" style:family="table-row">
      <style:table-row-properties style:row-height="41.25pt" style:use-optimal-row-height="false" fo:break-before="auto"/>
    </style:style>
    <style:style style:name="ro38" style:family="table-row">
      <style:table-row-properties style:row-height="31.9pt" style:use-optimal-row-height="false" fo:break-before="auto"/>
    </style:style>
    <style:style style:name="ro39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O" table:style-name="ta1">
        <table:shapes>
          <draw:custom-shape svg:x="14.05315in" svg:y="5.97756in" svg:width="2.13819in" svg:height="0.73543in" draw:z-index="1" draw:id="id0" draw:style-name="a8" draw:name="TextShape 1">
            <svg:title/>
            <svg:desc/>
            <text:p text:style-name="a1" text:class-names="" text:cond-style-name=""><text:span text:style-name="a0" text:class-names="">Diógenes Silva de Lima</text:span></text:p>
            <text:p text:style-name="a3" text:class-names="" text:cond-style-name=""><text:span text:style-name="a2" text:class-names="">COREN-RJ 1000416 - TE</text:span></text:p>
            <text:p text:style-name="a5" text:class-names="" text:cond-style-name=""><text:span text:style-name="a4" text:class-names=""><text:s text:c="6"/>2SG-EF 09.0139.38</text:span></text:p>
            <text:p text:style-name="a7" text:class-names="" text:cond-style-name=""><text:span text:style-name="a6" text:class-names="">Técnico de Enfermagem</text:span></text:p>
            <draw:enhanced-geometry xmlns:dr3d="urn:oasis:names:tc:opendocument:xmlns:dr3d:1.0" draw:path-stretchpoint-x="21600" draw:path-stretchpoint-y="21600" draw:type="non-primitive" svg:viewBox="0 0 21600 21600" draw:enhanced-path="M ?f6 ?f6 L ?f8 ?f6 ?f8 ?f7 ?f6 ?f7 Z N" draw:text-areas="?f11 ?f14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0"/>
              <draw:equation draw:name="f7" draw:formula="1873"/>
              <draw:equation draw:name="f8" draw:formula="5438"/>
              <draw:equation draw:name="f9" draw:formula="?f5 / 0"/>
              <draw:equation draw:name="f10" draw:formula="?f4 / 0"/>
              <draw:equation draw:name="f11" draw:formula="0 * ?f9"/>
              <draw:equation draw:name="f12" draw:formula="?f8 * ?f9"/>
              <draw:equation draw:name="f13" draw:formula="?f7 * ?f10"/>
              <draw:equation draw:name="f14" draw:formula="0 * ?f10"/>
            </draw:enhanced-geometry>
          </draw:custom-shape>
          <draw:custom-shape svg:x="5.81102in" svg:y="6.21024in" svg:width="2.40079in" svg:height="0.66575in" draw:z-index="2" draw:id="id1" draw:style-name="a15" draw:name="TextShape 1">
            <svg:title/>
            <svg:desc/>
            <text:p text:style-name="a10" text:class-names="" text:cond-style-name=""><text:span text:style-name="a9" text:class-names="">CF (Md) Vania Giselda Dávila</text:span></text:p>
            <text:p text:style-name="a12" text:class-names="" text:cond-style-name=""><text:span text:style-name="a11" text:class-names=""><text:s text:c="1"/>Ortopedia</text:span></text:p>
            <text:p text:style-name="a14" text:class-names="" text:cond-style-name=""><text:span text:style-name="a13" text:class-names=""><text:s text:c="9"/>CRM 82.59286-1</text:span></text:p>
            <draw:enhanced-geometry xmlns:dr3d="urn:oasis:names:tc:opendocument:xmlns:dr3d:1.0" draw:path-stretchpoint-x="21600" draw:path-stretchpoint-y="21600" draw:type="non-primitive" svg:viewBox="0 0 21600 21600" draw:enhanced-path="M ?f6 ?f6 L ?f8 ?f6 ?f8 ?f7 ?f6 ?f7 Z N" draw:text-areas="?f11 ?f14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0"/>
              <draw:equation draw:name="f7" draw:formula="1696"/>
              <draw:equation draw:name="f8" draw:formula="6104"/>
              <draw:equation draw:name="f9" draw:formula="?f5 / 0"/>
              <draw:equation draw:name="f10" draw:formula="?f4 / 0"/>
              <draw:equation draw:name="f11" draw:formula="0 * ?f9"/>
              <draw:equation draw:name="f12" draw:formula="?f8 * ?f9"/>
              <draw:equation draw:name="f13" draw:formula="?f7 * ?f10"/>
              <draw:equation draw:name="f14" draw:formula="0 * ?f10"/>
            </draw:enhanced-geometry>
          </draw:custom-shape>
          <draw:custom-shape svg:x="0.18504in" svg:y="6.17992in" svg:width="2.40079in" svg:height="0.66575in" draw:z-index="3" draw:id="id2" draw:style-name="a22" draw:name="TextShape 1">
            <svg:title/>
            <svg:desc/>
            <text:p text:style-name="a17" text:class-names="" text:cond-style-name=""><text:span text:style-name="a16" text:class-names="">CF (Md) Vania Giselda Dávila</text:span></text:p>
            <text:p text:style-name="a19" text:class-names="" text:cond-style-name=""><text:span text:style-name="a18" text:class-names=""><text:s text:c="1"/>Ortopedia</text:span></text:p>
            <text:p text:style-name="a21" text:class-names="" text:cond-style-name=""><text:span text:style-name="a20" text:class-names=""><text:s text:c="9"/>CRM 82.59286-1</text:span></text:p>
            <draw:enhanced-geometry xmlns:dr3d="urn:oasis:names:tc:opendocument:xmlns:dr3d:1.0" draw:path-stretchpoint-x="21600" draw:path-stretchpoint-y="21600" draw:type="non-primitive" svg:viewBox="0 0 21600 21600" draw:enhanced-path="M ?f6 ?f6 L ?f8 ?f6 ?f8 ?f7 ?f6 ?f7 Z N" draw:text-areas="?f11 ?f14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0"/>
              <draw:equation draw:name="f7" draw:formula="1696"/>
              <draw:equation draw:name="f8" draw:formula="6104"/>
              <draw:equation draw:name="f9" draw:formula="?f5 / 0"/>
              <draw:equation draw:name="f10" draw:formula="?f4 / 0"/>
              <draw:equation draw:name="f11" draw:formula="0 * ?f9"/>
              <draw:equation draw:name="f12" draw:formula="?f8 * ?f9"/>
              <draw:equation draw:name="f13" draw:formula="?f7 * ?f10"/>
              <draw:equation draw:name="f14" draw:formula="0 * ?f10"/>
            </draw:enhanced-geometry>
          </draw:custom-shap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"/>
        <table:table-column table:style-name="co11" table:default-cell-style-name="ce6"/>
        <table:table-column table:style-name="co2" table:default-cell-style-name="ce9"/>
        <table:table-column table:style-name="co12" table:default-cell-style-name="ce5"/>
        <table:table-column table:style-name="co13" table:default-cell-style-name="ce5"/>
        <table:table-column table:style-name="co14" table:default-cell-style-name="ce6"/>
        <table:table-column table:style-name="co15" table:number-columns-repeated="243" table:default-cell-style-name="ce6"/>
        <table:table-column table:style-name="co15" table:number-columns-repeated="766" table:default-cell-style-name="ce7"/>
        <table:table-column table:style-name="co16" table:number-columns-repeated="15360" table:default-cell-style-name="ce1"/>
        <table:table-row table:style-name="ro1">
          <table:table-cell office:value-type="string" table:number-columns-spanned="2" table:number-rows-spanned="1" table:style-name="ce25">
            <text:p>Nº</text:p>
          </table:table-cell>
          <table:covered-table-cell/>
          <table:table-cell office:value-type="string" table:number-columns-spanned="2" table:number-rows-spanned="1" table:style-name="ce26">
            <text:p>25/2026</text:p>
          </table:table-cell>
          <table:covered-table-cell/>
          <table:table-cell table:style-name="ce3"/>
          <table:table-cell office:value-type="string" table:number-columns-spanned="3" table:number-rows-spanned="1" table:style-name="ce25">
            <text:p>PREGÃO/TAD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1" table:style-name="ce134">
            <text:p>58/2025 COMRJ</text:p>
          </table:table-cell>
          <table:covered-table-cell table:number-columns-repeated="2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2" table:number-rows-spanned="1" table:style-name="ce25">
            <text:p>DATA:</text:p>
          </table:table-cell>
          <table:covered-table-cell/>
          <table:table-cell office:value-type="date" office:date-value="2026-07-06T13:48:37" table:formula="of:=NOW()" table:number-columns-spanned="2" table:number-rows-spanned="1" table:style-name="ce29">
            <text:p>6/7/2026</text:p>
          </table:table-cell>
          <table:covered-table-cell/>
          <table:table-cell table:style-name="ce3"/>
          <table:table-cell office:value-type="string" table:number-columns-spanned="3" table:number-rows-spanned="1" table:style-name="ce25">
            <text:p>VIGÊNCIA</text:p>
          </table:table-cell>
          <table:covered-table-cell table:number-columns-repeated="2"/>
          <table:table-cell table:style-name="ce2"/>
          <table:table-cell table:number-columns-spanned="3" table:number-rows-spanned="1" table:style-name="ce31"/>
          <table:covered-table-cell table:number-columns-repeated="2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2" table:number-rows-spanned="1" table:style-name="ce25">
            <text:p>PROCESSO:</text:p>
          </table:table-cell>
          <table:covered-table-cell/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3" table:number-rows-spanned="1" table:style-name="ce25">
            <text:p>FORNECEDOR</text:p>
          </table:table-cell>
          <table:covered-table-cell table:number-columns-repeated="2"/>
          <table:table-cell table:style-name="ce8"/>
          <table:table-cell office:value-type="string" table:number-columns-spanned="3" table:number-rows-spanned="1" table:style-name="ce33">
            <text:p>CONMED – <text:s/>23.351.545/0003-00</text:p>
          </table:table-cell>
          <table:covered-table-cell table:number-columns-repeated="2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table:number-columns-repeated="4" table:style-name="ce6"/>
          <table:table-cell table:style-name="ce3"/>
          <table:table-cell table:number-columns-repeated="4" table:style-name="ce6"/>
          <table:table-cell table:style-name="ce3"/>
          <table:table-cell table:style-name="ce6"/>
          <table:table-cell table:style-name="ce9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table:style-name="ce6"/>
          <table:table-cell office:value-type="string" table:number-columns-spanned="4" table:number-rows-spanned="1" table:style-name="ce133">
            <text:p>DADOS DO PACIENTE</text:p>
          </table:table-cell>
          <table:covered-table-cell table:number-columns-repeated="3"/>
          <table:table-cell office:value-type="string" table:number-columns-spanned="8" table:number-rows-spanned="1" table:style-name="ce133">
            <text:p>DADOS DO MATERIAL</text:p>
          </table:table-cell>
          <table:covered-table-cell table:number-columns-repeated="7"/>
          <table:table-cell table:style-name="ce5"/>
          <table:table-cell table:number-columns-repeated="244" table:style-name="ce6"/>
          <table:table-cell table:number-columns-repeated="16126"/>
        </table:table-row>
        <table:table-row table:style-name="ro2">
          <table:table-cell office:value-type="string" table:style-name="ce10">
            <text:p>N°</text:p>
          </table:table-cell>
          <table:table-cell office:value-type="string" table:style-name="ce11">
            <text:p>NIP</text:p>
          </table:table-cell>
          <table:table-cell office:value-type="string" table:style-name="ce11">
            <text:p>INICIAIS</text:p>
          </table:table-cell>
          <table:table-cell office:value-type="string" table:style-name="ce11">
            <text:p>DATA</text:p>
          </table:table-cell>
          <table:table-cell office:value-type="string" table:style-name="ce12">
            <text:p>PROCEDIMENTO</text:p>
          </table:table-cell>
          <table:table-cell office:value-type="string" table:style-name="ce12">
            <text:p>Mapa de Sala</text:p>
          </table:table-cell>
          <table:table-cell office:value-type="string" table:style-name="ce11">
            <text:p>DANFE</text:p>
          </table:table-cell>
          <table:table-cell office:value-type="string" table:style-name="ce11">
            <text:p>ITEM</text:p>
          </table:table-cell>
          <table:table-cell office:value-type="string" table:style-name="ce11">
            <text:p>NEB/PI</text:p>
          </table:table-cell>
          <table:table-cell office:value-type="string" table:style-name="ce12">
            <text:p>DESCRIÇÃO DO MATERIAL</text:p>
          </table:table-cell>
          <table:table-cell office:value-type="string" table:style-name="ce11">
            <text:p>QT</text:p>
          </table:table-cell>
          <table:table-cell office:value-type="string" table:style-name="ce13">
            <text:p>V. UNIT.</text:p>
          </table:table-cell>
          <table:table-cell office:value-type="string" table:style-name="ce14">
            <text:p>V. TOTAL</text:p>
          </table:table-cell>
          <table:table-cell table:style-name="ce15"/>
          <table:table-cell table:number-columns-repeated="244" table:style-name="ce6"/>
          <table:table-cell table:number-columns-repeated="16126"/>
        </table:table-row>
        <table:table-row table:style-name="ro3">
          <table:table-cell office:value-type="float" office:value="1" table:number-columns-spanned="1" table:number-rows-spanned="6" table:style-name="ce35">
            <text:p>1</text:p>
          </table:table-cell>
          <table:table-cell office:value-type="string" table:number-columns-spanned="1" table:number-rows-spanned="6" table:style-name="ce36">
            <text:p>86.4094.68</text:p>
          </table:table-cell>
          <table:table-cell office:value-type="string" table:number-columns-spanned="1" table:number-rows-spanned="6" table:style-name="ce36">
            <text:p>JABL</text:p>
          </table:table-cell>
          <table:table-cell office:value-type="date" office:date-value="2026-06-24T00:00:00" table:number-columns-spanned="1" table:number-rows-spanned="6" table:style-name="ce37">
            <text:p>24/06/26</text:p>
          </table:table-cell>
          <table:table-cell office:value-type="string" table:number-columns-spanned="1" table:number-rows-spanned="6" table:style-name="ce38">
            <text:p>REPARO ARTROSCOPICO DO MANGUITO ROTADOR A DIREITA</text:p>
          </table:table-cell>
          <table:table-cell office:value-type="float" office:value="245" table:number-columns-spanned="1" table:number-rows-spanned="6" table:style-name="ce39">
            <text:p>245</text:p>
          </table:table-cell>
          <table:table-cell table:number-columns-spanned="1" table:number-rows-spanned="6" table:style-name="ce31"/>
          <table:table-cell office:value-type="float" office:value="30" table:style-name="ce16">
            <text:p>30</text:p>
          </table:table-cell>
          <table:table-cell office:value-type="float" office:value="15714209" table:style-name="ce17">
            <text:p>15714209</text:p>
          </table:table-cell>
          <table:table-cell office:value-type="string" table:style-name="ce18">
            <text:p>ITEM 30 – EQUIPO ESPECIAL, APLICAÇÃO P/ARTROSCOPIA , VIAS DUAS VIIAS, CARACTERÍSTICAS ADICIONAIS P/BOMBA <text:s text:c="2"/>DE INFUSÃO DE ALTO FLUXO.</text:p>
          </table:table-cell>
          <table:table-cell office:value-type="float" office:value="1" table:style-name="ce19">
            <text:p>1</text:p>
          </table:table-cell>
          <table:table-cell office:value-type="currency" office:value="330" table:style-name="ce20">
            <text:p>R$ 330,00</text:p>
          </table:table-cell>
          <table:table-cell office:value-type="float" office:value="330" table:formula="of:=[.K7]*[.L7]" table:style-name="ce21">
            <text:p>330,00<text:s/></text:p>
          </table:table-cell>
          <table:table-cell office:value-type="float" office:value="10351" table:formula="of:=SUM([.M7:.M12])" table:number-columns-spanned="1" table:number-rows-spanned="6" table:style-name="ce40">
            <text:p>10.351,00<text:s/></text:p>
          </table:table-cell>
          <table:table-cell table:style-name="ce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" table:style-name="ce16">
            <text:p>40</text:p>
          </table:table-cell>
          <table:table-cell office:value-type="string" table:style-name="ce17">
            <text:p>BR3321493</text:p>
          </table:table-cell>
          <table:table-cell office:value-type="string" table:style-name="ce18">
            <text:p>ITEM 40 – SISTEMA DE PASSADOR DE FIO/SUTURA DO TIPO FIRST PASS OU SCORPION E FIOS DE ALTA RESISTÊNCIA, PARA CIRURGIA DO OMBRO.</text:p>
          </table:table-cell>
          <table:table-cell office:value-type="float" office:value="1" table:style-name="ce19">
            <text:p>1</text:p>
          </table:table-cell>
          <table:table-cell office:value-type="currency" office:value="449" table:style-name="ce20">
            <text:p>R$ 449,00</text:p>
          </table:table-cell>
          <table:table-cell office:value-type="float" office:value="449" table:formula="of:=[.K8]*[.L8]" table:style-name="ce21">
            <text:p>449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" table:style-name="ce16">
            <text:p>41</text:p>
          </table:table-cell>
          <table:table-cell office:value-type="string" table:style-name="ce17">
            <text:p>BR3321494</text:p>
          </table:table-cell>
          <table:table-cell office:value-type="string" table:style-name="ce18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office:value-type="float" office:value="1" table:style-name="ce19">
            <text:p>1</text:p>
          </table:table-cell>
          <table:table-cell office:value-type="currency" office:value="375" table:style-name="ce20">
            <text:p>R$ 375,00</text:p>
          </table:table-cell>
          <table:table-cell office:value-type="float" office:value="375" table:formula="of:=[.K9]*[.L9]" table:style-name="ce21">
            <text:p>375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2" table:style-name="ce16">
            <text:p>42</text:p>
          </table:table-cell>
          <table:table-cell office:value-type="string" table:style-name="ce17">
            <text:p>BR3335667</text:p>
          </table:table-cell>
          <table:table-cell office:value-type="string" table:style-name="ce18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office:value-type="float" office:value="3" table:style-name="ce19">
            <text:p>3</text:p>
          </table:table-cell>
          <table:table-cell office:value-type="currency" office:value="2199" table:style-name="ce20">
            <text:p>R$ 2.199,00</text:p>
          </table:table-cell>
          <table:table-cell office:value-type="float" office:value="6597" table:formula="of:=[.K10]*[.L10]" table:style-name="ce21">
            <text:p>6.597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16">
            <text:p>48</text:p>
          </table:table-cell>
          <table:table-cell office:value-type="float" office:value="15714207" table:style-name="ce17">
            <text:p>15714207</text:p>
          </table:table-cell>
          <table:table-cell office:value-type="string" table:style-name="ce18">
            <text:p>ITEM 48 – SISTEMA DE CÂNULA PARA ARTROSCOPIA DE OMBRO E JOELHO COM OBTURADOR CANULADO ROSQUEADO <text:s text:c="3"/>EM TAMANHO E COMPRIMENTOS DIVERSOS, MATERIAL DESCARTÁVEL E USO ÚNICO.<text:s text:c="10"/></text:p>
          </table:table-cell>
          <table:table-cell office:value-type="float" office:value="2" table:style-name="ce19">
            <text:p>2</text:p>
          </table:table-cell>
          <table:table-cell office:value-type="currency" office:value="350" table:style-name="ce20">
            <text:p>R$ 350,00</text:p>
          </table:table-cell>
          <table:table-cell office:value-type="float" office:value="700" table:formula="of:=[.K11]*[.L11]" table:style-name="ce21">
            <text:p>700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9" table:style-name="ce16">
            <text:p>49</text:p>
          </table:table-cell>
          <table:table-cell office:value-type="float" office:value="15714212" table:style-name="ce17">
            <text:p>15714212</text:p>
          </table:table-cell>
          <table:table-cell office:value-type="string" table:style-name="ce18">
            <text:p>ITEM 49 – PONTEIRA DE RADIOFREQUÊNCIA DESCARTÁVEL 90 GRAUS.</text:p>
          </table:table-cell>
          <table:table-cell office:value-type="float" office:value="1" table:style-name="ce19">
            <text:p>1</text:p>
          </table:table-cell>
          <table:table-cell office:value-type="currency" office:value="1900" table:style-name="ce20">
            <text:p>R$ 1.900,00</text:p>
          </table:table-cell>
          <table:table-cell office:value-type="float" office:value="1900" table:formula="of:=[.K12]*[.L12]" table:style-name="ce21">
            <text:p>1.900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3">
          <table:table-cell office:value-type="float" office:value="2" table:number-columns-spanned="1" table:number-rows-spanned="6" table:style-name="ce35">
            <text:p>2</text:p>
          </table:table-cell>
          <table:table-cell office:value-type="string" table:number-columns-spanned="1" table:number-rows-spanned="6" table:style-name="ce36">
            <text:p>87.1913.51</text:p>
          </table:table-cell>
          <table:table-cell office:value-type="string" table:number-columns-spanned="1" table:number-rows-spanned="6" table:style-name="ce36">
            <text:p>LFP</text:p>
          </table:table-cell>
          <table:table-cell office:value-type="date" office:date-value="2026-06-24T00:00:00" table:number-columns-spanned="1" table:number-rows-spanned="6" table:style-name="ce37">
            <text:p>24/06/26</text:p>
          </table:table-cell>
          <table:table-cell office:value-type="string" table:number-columns-spanned="1" table:number-rows-spanned="6" table:style-name="ce38">
            <text:p>REPARO ARTROSCOPICO <text:s/>DE BANKART À ESQUERDA</text:p>
          </table:table-cell>
          <table:table-cell office:value-type="float" office:value="246" table:number-columns-spanned="1" table:number-rows-spanned="6" table:style-name="ce39">
            <text:p>246</text:p>
          </table:table-cell>
          <table:table-cell table:number-columns-spanned="1" table:number-rows-spanned="6" table:style-name="ce31"/>
          <table:table-cell office:value-type="float" office:value="30" table:style-name="ce16">
            <text:p>30</text:p>
          </table:table-cell>
          <table:table-cell office:value-type="float" office:value="15714209" table:style-name="ce17">
            <text:p>15714209</text:p>
          </table:table-cell>
          <table:table-cell office:value-type="string" table:style-name="ce18">
            <text:p>ITEM 30 – EQUIPO ESPECIAL, APLICAÇÃO P/ARTROSCOPIA , VIAS DUAS VIIAS, CARACTERÍSTICAS ADICIONAIS P/BOMBA <text:s text:c="2"/>DE INFUSÃO DE ALTO FLUXO.</text:p>
          </table:table-cell>
          <table:table-cell office:value-type="float" office:value="1" table:style-name="ce19">
            <text:p>1</text:p>
          </table:table-cell>
          <table:table-cell office:value-type="currency" office:value="330" table:style-name="ce20">
            <text:p>R$ 330,00</text:p>
          </table:table-cell>
          <table:table-cell office:value-type="float" office:value="330" table:formula="of:=[.K13]*[.L13]" table:style-name="ce21">
            <text:p>330,00<text:s/></text:p>
          </table:table-cell>
          <table:table-cell office:value-type="float" office:value="9224" table:formula="of:=SUM([.M13:.M18])" table:number-columns-spanned="1" table:number-rows-spanned="6" table:style-name="ce40">
            <text:p>9.224,00<text:s/></text:p>
          </table:table-cell>
          <table:table-cell table:style-name="ce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" table:style-name="ce16">
            <text:p>40</text:p>
          </table:table-cell>
          <table:table-cell office:value-type="string" table:style-name="ce17">
            <text:p>BR3321493</text:p>
          </table:table-cell>
          <table:table-cell office:value-type="string" table:style-name="ce18">
            <text:p>ITEM 40 – SISTEMA DE PASSADOR DE FIO/SUTURA DO TIPO FIRST PASS OU SCORPION E FIOS DE ALTA RESISTÊNCIA, PARA CIRURGIA DO OMBRO.</text:p>
          </table:table-cell>
          <table:table-cell office:value-type="float" office:value="1" table:style-name="ce19">
            <text:p>1</text:p>
          </table:table-cell>
          <table:table-cell office:value-type="currency" office:value="449" table:style-name="ce20">
            <text:p>R$ 449,00</text:p>
          </table:table-cell>
          <table:table-cell office:value-type="float" office:value="449" table:formula="of:=[.K14]*[.L14]" table:style-name="ce21">
            <text:p>449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" table:style-name="ce16">
            <text:p>41</text:p>
          </table:table-cell>
          <table:table-cell office:value-type="string" table:style-name="ce17">
            <text:p>BR3321494</text:p>
          </table:table-cell>
          <table:table-cell office:value-type="string" table:style-name="ce18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office:value-type="float" office:value="1" table:style-name="ce19">
            <text:p>1</text:p>
          </table:table-cell>
          <table:table-cell office:value-type="currency" office:value="375" table:style-name="ce20">
            <text:p>R$ 375,00</text:p>
          </table:table-cell>
          <table:table-cell office:value-type="float" office:value="375" table:formula="of:=[.K15]*[.L15]" table:style-name="ce21">
            <text:p>375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6" table:style-name="ce16">
            <text:p>46</text:p>
          </table:table-cell>
          <table:table-cell office:value-type="float" office:value="15714203" table:style-name="ce17">
            <text:p>15714203</text:p>
          </table:table-cell>
          <table:table-cell office:value-type="string" table:style-name="ce18">
            <text:p>ITEM 46 – 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office:value-type="float" office:value="3" table:style-name="ce19">
            <text:p>3</text:p>
          </table:table-cell>
          <table:table-cell office:value-type="currency" office:value="1940" table:style-name="ce20">
            <text:p>R$ 1.940,00</text:p>
          </table:table-cell>
          <table:table-cell office:value-type="float" office:value="5820" table:formula="of:=[.K16]*[.L16]" table:style-name="ce21">
            <text:p>5.820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16">
            <text:p>48</text:p>
          </table:table-cell>
          <table:table-cell office:value-type="float" office:value="15714207" table:style-name="ce17">
            <text:p>15714207</text:p>
          </table:table-cell>
          <table:table-cell office:value-type="string" table:style-name="ce18">
            <text:p>ITEM 48 – SISTEMA DE CÂNULA PARA ARTROSCOPIA DE OMBRO E JOELHO COM OBTURADOR CANULADO ROSQUEADO <text:s text:c="3"/>EM TAMANHO E COMPRIMENTOS DIVERSOS, MATERIAL DESCARTÁVEL E USO ÚNICO.<text:s text:c="10"/></text:p>
          </table:table-cell>
          <table:table-cell office:value-type="float" office:value="1" table:style-name="ce19">
            <text:p>1</text:p>
          </table:table-cell>
          <table:table-cell office:value-type="currency" office:value="350" table:style-name="ce20">
            <text:p>R$ 350,00</text:p>
          </table:table-cell>
          <table:table-cell office:value-type="float" office:value="350" table:formula="of:=[.K17]*[.L17]" table:style-name="ce21">
            <text:p>350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9" table:style-name="ce16">
            <text:p>49</text:p>
          </table:table-cell>
          <table:table-cell office:value-type="float" office:value="15714212" table:style-name="ce17">
            <text:p>15714212</text:p>
          </table:table-cell>
          <table:table-cell office:value-type="string" table:style-name="ce18">
            <text:p>ITEM 49 – PONTEIRA DE RADIOFREQUÊNCIA DESCARTÁVEL 90 GRAUS.</text:p>
          </table:table-cell>
          <table:table-cell office:value-type="float" office:value="1" table:style-name="ce19">
            <text:p>1</text:p>
          </table:table-cell>
          <table:table-cell office:value-type="currency" office:value="1900" table:style-name="ce20">
            <text:p>R$ 1.900,00</text:p>
          </table:table-cell>
          <table:table-cell office:value-type="float" office:value="1900" table:formula="of:=[.K18]*[.L18]" table:style-name="ce21">
            <text:p>1.900,00<text:s/></text:p>
          </table:table-cell>
          <table:covered-table-cell/>
          <table:table-cell table:style-name="ce6"/>
          <table:table-cell table:style-name="ce22"/>
          <table:table-cell table:number-columns-repeated="16368"/>
        </table:table-row>
        <table:table-row table:style-name="ro7">
          <table:table-cell table:style-name="ce6"/>
          <table:table-cell table:style-name="ce23"/>
          <table:table-cell table:number-columns-repeated="2" table:style-name="ce6"/>
          <table:table-cell table:style-name="ce3"/>
          <table:table-cell table:number-columns-repeated="4" table:style-name="ce6"/>
          <table:table-cell table:style-name="ce3"/>
          <table:table-cell table:style-name="ce6"/>
          <table:table-cell table:style-name="ce9"/>
          <table:table-cell office:value-type="float" office:value="19575" table:formula="of:=SUM([.M7:.M18])" table:style-name="ce5">
            <text:p>19.575,00<text:s/></text:p>
          </table:table-cell>
          <table:table-cell office:value-type="float" office:value="19575" table:formula="of:=SUM([.N7:.N18])" table:style-name="ce5">
            <text:p>19.575,00<text:s/></text:p>
          </table:table-cell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12" table:number-rows-spanned="1" table:style-name="ce41">
            <text:p>1)O processo de renovação da licitação do material consignado deverá ser iniciado pelas respectivas clínicas,no mínimo,com 6 meses de antecedência.</text:p>
          </table:table-cell>
          <table:covered-table-cell table:number-columns-repeated="11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12" table:number-rows-spanned="1" table:style-name="ce42">
            <text:p>2)Em princípio, a data do procedimento não poderá ocorrer após da vigência do processo licitatório.</text:p>
          </table:table-cell>
          <table:covered-table-cell table:number-columns-repeated="11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2" table:number-rows-spanned="1" table:style-name="ce132">
            <text:p>Observação:</text:p>
          </table:table-cell>
          <table:covered-table-cell/>
          <table:table-cell table:number-columns-repeated="2" table:style-name="ce6"/>
          <table:table-cell table:style-name="ce3"/>
          <table:table-cell table:number-columns-repeated="4" table:style-name="ce6"/>
          <table:table-cell table:style-name="ce3"/>
          <table:table-cell table:style-name="ce6"/>
          <table:table-cell table:style-name="ce9"/>
          <table:table-cell table:number-columns-repeated="2" table:style-name="ce5"/>
          <table:table-cell table:number-columns-repeated="244" table:style-name="ce6"/>
          <table:table-cell table:number-columns-repeated="16126"/>
        </table:table-row>
        <table:table-row table:number-rows-repeated="4" table:style-name="ro8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43">
            <text:p>________________________</text:p>
          </table:table-cell>
          <table:covered-table-cell table:number-columns-repeated="3"/>
          <table:table-cell table:style-name="ce3"/>
          <table:table-cell office:value-type="string" table:number-columns-spanned="3" table:number-rows-spanned="1" table:style-name="ce43">
            <text:p>________________________</text:p>
          </table:table-cell>
          <table:covered-table-cell table:number-columns-repeated="2"/>
          <table:table-cell table:style-name="ce24"/>
          <table:table-cell office:value-type="string" table:number-columns-spanned="4" table:number-rows-spanned="1" table:style-name="ce44">
            <text:p>________________________</text:p>
          </table:table-cell>
          <table:covered-table-cell table:number-columns-repeated="3"/>
          <table:table-cell table:style-name="ce5"/>
          <table:table-cell table:number-columns-repeated="244" table:style-name="ce6"/>
          <table:table-cell table:number-columns-repeated="16126"/>
        </table:table-row>
        <table:table-row table:style-name="ro1">
          <table:table-cell office:value-type="string" table:number-columns-spanned="4" table:number-rows-spanned="1" table:style-name="ce43">
            <text:p>Chefe da Clínica</text:p>
          </table:table-cell>
          <table:covered-table-cell table:number-columns-repeated="3"/>
          <table:table-cell table:style-name="ce3"/>
          <table:table-cell office:value-type="string" table:number-columns-spanned="3" table:number-rows-spanned="1" table:style-name="ce43">
            <text:p>Enc Consignado</text:p>
          </table:table-cell>
          <table:covered-table-cell table:number-columns-repeated="2"/>
          <table:table-cell table:style-name="ce24"/>
          <table:table-cell office:value-type="string" table:number-columns-spanned="4" table:number-rows-spanned="1" table:style-name="ce44">
            <text:p><text:s text:c="3"/>Ecônomo</text:p>
          </table:table-cell>
          <table:covered-table-cell table:number-columns-repeated="3"/>
          <table:table-cell table:style-name="ce5"/>
          <table:table-cell table:number-columns-repeated="244" table:style-name="ce6"/>
          <table:table-cell table:number-columns-repeated="16126"/>
        </table:table-row>
        <table:table-row table:number-rows-repeated="1048548" table:style-name="ro8">
          <table:table-cell table:number-columns-repeated="16384"/>
        </table:table-row>
        <table:named-expressions>
          <table:named-range table:name="Print_Area" table:cell-range-address="MODELO.$A$1:MODELO.$M$28" table:base-cell-address="MODELO.$A$1"/>
          <table:named-range table:name="Print_Area_0" table:cell-range-address="MODELO.$A$1:MODELO.$M$28" table:base-cell-address="MODELO.$A$1"/>
          <table:named-range table:name="Print_Area_0_0" table:cell-range-address="MODELO.$A$1:MODELO.$M$28" table:base-cell-address="MODELO.$A$1"/>
        </table:named-expressions>
      </table:table>
      <table:table table:name="LISTA_DE_MATERIAIS" table:style-name="ta2">
        <table:table-column table:style-name="co17" table:default-cell-style-name="ce47" table:visibility="collapse"/>
        <table:table-column table:style-name="co18" table:default-cell-style-name="ce93"/>
        <table:table-column table:style-name="co19" table:default-cell-style-name="ce93"/>
        <table:table-column table:style-name="co20" table:default-cell-style-name="ce94"/>
        <table:table-column table:style-name="co18" table:default-cell-style-name="ce93"/>
        <table:table-column table:style-name="co21" table:default-cell-style-name="ce95"/>
        <table:table-column table:style-name="co22" table:default-cell-style-name="ce45"/>
        <table:table-column table:style-name="co18" table:default-cell-style-name="ce45"/>
        <table:table-column table:style-name="co23" table:default-cell-style-name="ce45"/>
        <table:table-column table:style-name="co17" table:default-cell-style-name="ce45"/>
        <table:table-column table:style-name="co23" table:number-columns-repeated="1010" table:default-cell-style-name="ce45"/>
        <table:table-column table:style-name="co23" table:number-columns-repeated="4" table:default-cell-style-name="ce1"/>
        <table:table-column table:style-name="co16" table:number-columns-repeated="15360" table:default-cell-style-name="ce1"/>
        <table:table-row table:style-name="ro1">
          <table:table-cell table:style-name="ce45"/>
          <table:table-cell office:value-type="string" table:number-columns-spanned="8" table:number-rows-spanned="1" table:style-name="ce96">
            <text:p>MARINHA DO BRASIL</text:p>
          </table:table-cell>
          <table:covered-table-cell table:number-columns-repeated="7"/>
          <table:table-cell table:number-columns-repeated="2" table:style-name="ce46"/>
          <table:table-cell table:number-columns-repeated="16373"/>
        </table:table-row>
        <table:table-row table:style-name="ro1">
          <table:table-cell table:style-name="ce45"/>
          <table:table-cell office:value-type="string" table:number-columns-spanned="8" table:number-rows-spanned="1" table:style-name="ce96">
            <text:p>CENTRO DE OBTENÇÃO DA MARINHA NO RIO DE JANEIRO</text:p>
          </table:table-cell>
          <table:covered-table-cell table:number-columns-repeated="7"/>
          <table:table-cell table:number-columns-repeated="2" table:style-name="ce46"/>
          <table:table-cell table:number-columns-repeated="16373"/>
        </table:table-row>
        <table:table-row table:style-name="ro1">
          <table:table-cell table:style-name="ce47"/>
          <table:table-cell office:value-type="string" table:number-columns-spanned="8" table:number-rows-spanned="1" table:style-name="ce96">
            <text:p>APÊNDICE III - PE 90058/2025</text:p>
          </table:table-cell>
          <table:covered-table-cell table:number-columns-repeated="7"/>
          <table:table-cell table:number-columns-repeated="2" table:style-name="ce46"/>
          <table:table-cell table:number-columns-repeated="16373"/>
        </table:table-row>
        <table:table-row table:style-name="ro1">
          <table:table-cell table:style-name="ce45"/>
          <table:table-cell office:value-type="string" table:number-columns-spanned="8" table:number-rows-spanned="1" table:style-name="ce96">
            <text:p>RELAÇÃO DE ITENS</text:p>
          </table:table-cell>
          <table:covered-table-cell table:number-columns-repeated="7"/>
          <table:table-cell table:number-columns-repeated="2" table:style-name="ce46"/>
          <table:table-cell table:number-columns-repeated="16373"/>
        </table:table-row>
        <table:table-row table:number-rows-repeated="2" table:style-name="ro9">
          <table:table-cell table:style-name="ce48"/>
          <table:table-cell table:number-columns-repeated="8" table:style-name="ce49"/>
          <table:table-cell table:number-columns-repeated="2" table:style-name="ce46"/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49"/>
          <table:table-cell table:style-name="ce51"/>
          <table:table-cell table:number-columns-repeated="3" table:style-name="ce49"/>
          <table:table-cell table:number-columns-repeated="2" table:style-name="ce46"/>
          <table:table-cell table:number-columns-repeated="16373"/>
        </table:table-row>
        <table:table-row table:style-name="ro10">
          <table:table-cell table:style-name="ce50"/>
          <table:table-cell office:value-type="string" table:style-name="ce52">
            <text:p>ITEM</text:p>
          </table:table-cell>
          <table:table-cell office:value-type="string" table:style-name="ce52">
            <text:p>PI</text:p>
          </table:table-cell>
          <table:table-cell office:value-type="string" table:style-name="ce52">
            <text:p>CATMAT</text:p>
          </table:table-cell>
          <table:table-cell office:value-type="string" table:style-name="ce52">
            <text:p>LOTE</text:p>
          </table:table-cell>
          <table:table-cell office:value-type="string" table:style-name="ce52">
            <text:p>ESPECIFICAÇÃO</text:p>
          </table:table-cell>
          <table:table-cell office:value-type="string" table:style-name="ce52">
            <text:p>UF</text:p>
          </table:table-cell>
          <table:table-cell office:value-type="string" table:style-name="ce52">
            <text:p>QTD MÍN.</text:p>
          </table:table-cell>
          <table:table-cell office:value-type="string" table:style-name="ce52">
            <text:p>QTD TOTAL</text:p>
          </table:table-cell>
          <table:table-cell table:number-columns-repeated="2" table:style-name="ce46"/>
          <table:table-cell table:number-columns-repeated="16373"/>
        </table:table-row>
        <table:table-row table:style-name="ro11">
          <table:table-cell table:style-name="ce50"/>
          <table:table-cell office:value-type="float" office:value="1" table:style-name="ce53">
            <text:p>1</text:p>
          </table:table-cell>
          <table:table-cell office:value-type="string" table:style-name="ce54">
            <text:p>BR3335591</text:p>
          </table:table-cell>
          <table:table-cell office:value-type="float" office:value="318353" table:style-name="ce55">
            <text:p>31835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S LCP PARA FRATURAS DO OLECRANO DE ÂNGULO VARIAVEL, <text:s/>PLACAS FRATURAS ARTICULARES, JUSTA ARTICULAR E EXTRA ARTICULAR COM <text:s/>FUROS COMBINADOS, LADOS DIREITOS E ESQUERDOS, PARAFUSOS LCP <text:s/>3.5 <text:s/>E 2..7 <text:s/>BLOQUEADOS E CORTICAIS AUTOFREZANTES, PLACAS TAMANHOS 2, 4, 6, 8, 10 E 12 <text:s/>FUROS COMBINADOS PRE MOLDADAS COM INSTRUMENTAÇÃO DE COLOCAÇÃO, <text:s/>PINÇAS DE REDUÇÃO, AÇO NÃO MAGNÉTICO 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24" table:style-name="ce55">
            <text:p>24</text:p>
          </table:table-cell>
          <table:table-cell office:value-type="currency" office:value="15200" table:style-name="ce57">
            <text:p>R$ 15.2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2" table:style-name="ce53">
            <text:p>2</text:p>
          </table:table-cell>
          <table:table-cell office:value-type="string" table:style-name="ce54">
            <text:p>BR3335653</text:p>
          </table:table-cell>
          <table:table-cell office:value-type="float" office:value="318352" table:style-name="ce55">
            <text:p>318352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S LCP PEDIATRICA COM FUROS COMBINADOS, <text:s/>PLACAS 3.5 E 5.0 COM FUROS NA CABEÇA, NO CORPO COM A 3 A 4 FUROS, <text:s/>COM ANGULAÇÕES DE 100 GRAUS, 110 GRAUS, 120 GRAUS E 150 GRAUS, <text:s/>COM INSTRUMENTAS QUE PERMITEM ANGULAÇÕES NO ATO OPERATORIO, <text:s/>OSTEOTOMOS E INSTRUMENTAIS COM GUIAS ESPECIFICOS, BROCAS, FIOS <text:s/>GUIAS ROSQUEADOS, PARAFUSO LCP 3.5 E 5.0 STARDRIVE BLOQUEADO.</text:p>
          </table:table-cell>
          <table:table-cell office:value-type="string" table:style-name="ce55">
            <text:p>UNIDADE</text:p>
          </table:table-cell>
          <table:table-cell office:value-type="float" office:value="6" table:style-name="ce53">
            <text:p>6</text:p>
          </table:table-cell>
          <table:table-cell office:value-type="float" office:value="24" table:style-name="ce55">
            <text:p>24</text:p>
          </table:table-cell>
          <table:table-cell office:value-type="currency" office:value="14600" table:style-name="ce57">
            <text:p>R$ 14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3" table:style-name="ce53">
            <text:p>3</text:p>
          </table:table-cell>
          <table:table-cell office:value-type="string" table:style-name="ce54">
            <text:p>BR3335661</text:p>
          </table:table-cell>
          <table:table-cell office:value-type="float" office:value="318814" table:style-name="ce55">
            <text:p>318814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S LCP 3,5 / 2,7 , PARA FRATURAS DISTAIS DO HUMERO, <text:s/>PRE MOLDADAS, POSTERO LATERAL, PLACA COM FIXAÇÃO DORSO LATERAL <text:s/>COM OU SEM SUPORTE E FIXAÇÃO MEDIAL, LADOS DIREITOS E ESQUERDOS, <text:s/>FUROS COMBINADOS CORTICAL E BLOQUEADO, PARAFUSOS STARDRIVES <text:s/>3,5 / 2,7 AUTOFREZANTES, PLACAS PRE MODELADAS COMPLACAS PRE <text:s/>MODELADAS COM TAMANHOS DE 3 A 16 FUROS COMBINADOS, COM <text:s/>INSTRUMENTAL PARA FIXAÇÃO MINIMA INVASIVA, AÇO NÃO MAGNETICO.</text:p>
          </table:table-cell>
          <table:table-cell office:value-type="string" table:style-name="ce55">
            <text:p>UNIDADE</text:p>
          </table:table-cell>
          <table:table-cell office:value-type="float" office:value="8" table:style-name="ce53">
            <text:p>8</text:p>
          </table:table-cell>
          <table:table-cell office:value-type="float" office:value="24" table:style-name="ce55">
            <text:p>24</text:p>
          </table:table-cell>
          <table:table-cell office:value-type="currency" office:value="16800" table:style-name="ce57">
            <text:p>R$ 16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4" table:style-name="ce53">
            <text:p>4</text:p>
          </table:table-cell>
          <table:table-cell office:value-type="string" table:style-name="ce54">
            <text:p>BR3335670</text:p>
          </table:table-cell>
          <table:table-cell office:value-type="float" office:value="459059" table:style-name="ce55">
            <text:p>45905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S DE PLACAS 3.5 BAIXO PERFIL, PLACA SINFESE PUBIANA, <text:s/>PLACA EM ÂNGULO VARIÁVEL EM ATE 28 GRAUS EM AÇO NÃO MAGNÉTICO, <text:s/>COM PLACAS RETAS E CURVAS ANATÔMICAS E SISTEMA PARA MODELAGEM, <text:s/>ACOMPANHADO DE INSTRUMENTAL PELVICO A.O.PINCASOSSEAS, <text:s/>CLAMPES PÉLVICO PARA REDUÇÃO, PINOS DE SHANZ, BROCAS LONGAS E <text:s/>PARAFUSOS EXTRALONGOS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2" table:style-name="ce55">
            <text:p>12</text:p>
          </table:table-cell>
          <table:table-cell office:value-type="currency" office:value="13600" table:style-name="ce57">
            <text:p>R$ 13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5" table:style-name="ce53">
            <text:p>5</text:p>
          </table:table-cell>
          <table:table-cell office:value-type="string" table:style-name="ce54">
            <text:p>BR3233795</text:p>
          </table:table-cell>
          <table:table-cell office:value-type="string" table:style-name="ce55">
            <text:p>43567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 bloqueada 3,5 PARA <text:s/>PLATO TIBIAL DE ANGULOS VARIAVEIS, DUPLA FILEIRA , <text:s/>furos <text:s text:c="2"/>BLOQUEADOS combinados, aco não magnetico, parafusos bloqueados 3.5 ANGULOS VARIAVEIS <text:s/>e corticais <text:s text:c="2"/>3,5 autofresantes, acompanhados de instrumetais, pincas de reducao, BROCAS CALIBRADAS, GUIAS FIXOS <text:s/>E DE ANGULOS VARIAVEIS, PLACAS EM L E EM T , ATE A16 FUROS fios de kirshiner para reducao intraopertoria <text:s text:c="2"/>ou de melhor qualidade<text:s text:c="2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15900" table:style-name="ce57">
            <text:p>R$ 15.9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6" table:style-name="ce53">
            <text:p>6</text:p>
          </table:table-cell>
          <table:table-cell office:value-type="float" office:value="190050405" table:style-name="ce54">
            <text:p>190050405</text:p>
          </table:table-cell>
          <table:table-cell office:value-type="float" office:value="196910" table:style-name="ce55">
            <text:p>196910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FRESAGEM INTRAMEDULAR E EXTRAÇÃO DE TECIDO ÓSSEO. PONTEIRA DE FRESA COM SISTEMA <text:s text:c="2"/>DE TUBOS, RESFRIAMENTO CONSTANTE DO FLUXO DE IRRIGAÇÃO, ARESTAS CORTANTES E PORFUNDAS PARA <text:s text:c="2"/>EVITAR ENTUPIMENTO. ASPIRAÇÃO DA MEDULA ÓSSEA E TECIDO MORSELIZADO, FILTRO COM MALHA PARA <text:s text:c="2"/>CAPTAR A MEDULA ÓSSEA COM CAPACIDADE PARA 100CC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0" table:style-name="ce55">
            <text:p>10</text:p>
          </table:table-cell>
          <table:table-cell office:value-type="currency" office:value="14100" table:style-name="ce57">
            <text:p>R$ 14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7" table:style-name="ce53">
            <text:p>7</text:p>
          </table:table-cell>
          <table:table-cell office:value-type="float" office:value="190050417" table:style-name="ce54">
            <text:p>190050417</text:p>
          </table:table-cell>
          <table:table-cell office:value-type="float" office:value="150213" table:style-name="ce55">
            <text:p>15021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LCP DHHS, PLACA DE COMPRESSÃO BLOQUEADA COM LÂMINA ESPIRAL INTEGRADA. PLACAS DE <text:s text:c="2"/>2/3/4/5 E 6 FUROS DE 130 E 150 GRAUS, LÂMINA <text:s/>SPIRAL 75 A 150MM INCREMENTOS DE 5MM, PARAFUSO <text:s text:c="2"/>CORTICAL AUTOROSQUEANTE 4.5 E PARAFUSO DE BLOQUEIO LCP 5.0, PLACAS COM FUROS COMBINADOS <text:s text:c="2"/>VARIADO SE SISTEMA DE FIXAÇÃO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0" table:style-name="ce55">
            <text:p>50</text:p>
          </table:table-cell>
          <table:table-cell office:value-type="currency" office:value="8600" table:style-name="ce57">
            <text:p>R$ 8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4">
          <table:table-cell table:style-name="ce50"/>
          <table:table-cell office:value-type="float" office:value="8" table:style-name="ce53">
            <text:p>8</text:p>
          </table:table-cell>
          <table:table-cell office:value-type="float" office:value="190050507" table:style-name="ce54">
            <text:p>190050507</text:p>
          </table:table-cell>
          <table:table-cell office:value-type="float" office:value="440667" table:style-name="ce55">
            <text:p>440667</text:p>
          </table:table-cell>
          <table:table-cell office:value-type="string" table:style-name="ce53">
            <text:p>GRUPO 1</text:p>
          </table:table-cell>
          <table:table-cell office:value-type="string" table:style-name="ce59">
            <text:p>ITEM 8 – PARAFUSO CANULADO 1.5, 2.4 e <text:s/>3.0 de espessura, COMPRESSÃO CONTROLADA, CABEÇA ROSQUEADA DE 3.5MM <text:s text:c="2"/>COM DUPLO COMEÇO,ARESTRA AUTOROSQUEANTES, NÚCLEO DE 2.0M, ROSCA DE VASTAGO DE 3.0MM, <text:s text:c="2"/>PONTA AUTO PERFURANTES CAIXA CONTENTO INSTRUMENTAIS PARA COLOCAÇÃO DO PARAFUSO HCS 3.0, <text:s text:c="2"/>GUIA DE BROCAS, SISTEMA DE COMPRESSÃO INOVADOR PARA FECHAR E COMPRIMIR DE FORMA CONTROLADA <text:s text:c="2"/>A DIÁSTAS DAS FRATURAS, CHAVE STARDRIVE CALIBRADA, FIO GUIA DE 1.1MM ROSQUEADO, BROCAS CANULADAS <text:s text:c="2"/>E PARAFUSOS DE ROSCA 32MM E 16MM - Parafuso canulado 3.0, compressão controlada, cabeça rosqueada de 3.5mm <text:s text:c="2"/>com duplo começo, arestas autorosquenates, núcleo de 2.0mm, rosca de vastago de 3.0mm, ponta auto perfurantes. - <text:s text:c="2"/>Caixa contendo instrumentais para colocação do parafuso HCS 3.0, guia de brocas, sistema de compressão inovador <text:s text:c="2"/>parafechar e comprimir de forma controlada a diástase das fraturas, chave stardrive calibrada, fio guia de 1.1mm rosqueado, <text:s text:c="2"/>brocascanuladas e parafusos de rosca 32mm e 16mm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600" table:style-name="ce55">
            <text:p>600</text:p>
          </table:table-cell>
          <table:table-cell office:value-type="currency" office:value="3100" table:style-name="ce57">
            <text:p>R$ 3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9" table:style-name="ce53">
            <text:p>9</text:p>
          </table:table-cell>
          <table:table-cell office:value-type="float" office:value="190050517" table:style-name="ce54">
            <text:p>190050517</text:p>
          </table:table-cell>
          <table:table-cell office:value-type="float" office:value="436175" table:style-name="ce55">
            <text:p>436175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EXTRARTICULAR PALMAR LCP 2.4 dupla coluna DE ANGULO VARIAVEL e ou placa tipo RIM ARTICULAR <text:s/>. <text:s text:c="2"/>FUROS COMBINADOS DE COMPRESSÃO E BLOQUEIO QUE PERMITE FORMAR ÂNGULOS COM UM DESVIO AXIAL <text:s text:c="2"/>DE ATÉ 15 GRAUS EM TODAS AS DIREÇÕES, POSSUINDO LADO ESQUERDO E DIREITO - <text:s text:c="2"/>CAIXA CONTENDO INSTRUMENTAIS PARA COLOCAÇÃO DA PLACA DE ÂNGULO VARIAVEL COM GUIAS <text:s text:c="2"/>DE BROCAS ROSQUEADAS PARA PARAFUSOS DE ANGULO FIXO E GUIAS PARA PARAFUSOS DE COMPRESSÃO, <text:s text:c="2"/>BROCAS DE 1.8, 2.0, 2.4, 2.7, MEDIDORES, CHAVE STARDRIVE ACOMPANHADOS DE TORQUIMETR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40" table:style-name="ce55">
            <text:p>140</text:p>
          </table:table-cell>
          <table:table-cell office:value-type="currency" office:value="14000" table:style-name="ce57">
            <text:p>R$ 14.0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10" table:style-name="ce53">
            <text:p>10</text:p>
          </table:table-cell>
          <table:table-cell office:value-type="string" table:style-name="ce54">
            <text:p>BR3309586</text:p>
          </table:table-cell>
          <table:table-cell office:value-type="float" office:value="443385" table:style-name="ce55">
            <text:p>443385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EXTRA ARTICULAR PALMAR E DORSAL LCP 2.4 DE ÂNGULO FIXO, FUROS COMBINADOS DE COMPRESSÃO <text:s/>E BLOQUEIO, PLACA PARA TERÇO DISTAL DO RADIO E LONGA, POSSUINDO LADO ESQUERDO E DIREIT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60" table:style-name="ce55">
            <text:p>160</text:p>
          </table:table-cell>
          <table:table-cell office:value-type="currency" office:value="12000" table:style-name="ce57">
            <text:p>R$ 12.0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11" table:style-name="ce53">
            <text:p>11</text:p>
          </table:table-cell>
          <table:table-cell office:value-type="string" table:style-name="ce54">
            <text:p>BR3309591</text:p>
          </table:table-cell>
          <table:table-cell office:value-type="float" office:value="460626" table:style-name="ce55">
            <text:p>460626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S 1.1, 1.5 E 2.0 PARA FRATURAS DE MÃO, EM AÇO NÃO MAGNÉTICO, CONTENDO PLACAS DE <text:s text:c="2"/>ADAPTAÇÃO, CONDILEA, EM T, EM Y E H, DE 02 A 12 FUROS COMBINADOS DE BLOQUEIO E CORTICAL <text:s/>AUTTOFREZANTE, PARA UTILIZAÇÃO DE PARAFUSOS BICORTICAIS OU BLOQUEADOS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office:value-type="currency" office:value="7500" table:style-name="ce57">
            <text:p>R$ 7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12" table:style-name="ce53">
            <text:p>12</text:p>
          </table:table-cell>
          <table:table-cell office:value-type="float" office:value="190038335" table:style-name="ce54">
            <text:p>190038335</text:p>
          </table:table-cell>
          <table:table-cell office:value-type="string" table:style-name="ce55">
            <text:p>443800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PLACA DISTAL FEMUR BLOQUEADA TIPO LISS, 6 A 13 FUROS, 4.5/5.0/6.5 COMPLETA EM AÇO <text:s text:c="2"/>NAO MAGNETICO, SUROS COMBINADOS, COM INSTRUMENTAL DE COLOCAÇÃO <text:s/>CONJUNTO INSTRUMENTAL <text:s text:c="2"/>MINIMAMENTE INVASIVO, GUIA EXTERNO, CHAVE STARDRIVE COM ENGATE RÁPIDO, MEDIDOR CORTICAL, <text:s text:c="2"/>MACHO PARA E ESPONJOSO, <text:s/>OUTRO COMPONENTES ESCARIADOR, BROCAS CALIBRADAS, GUIA P/ BROCAS, <text:s text:c="2"/>PINÇA P/ PARAFUSO, CX GRANDES FRAGMENTOS, ACESSÓRIOS RETORCEDOR DE PLACAS (PAR), JOGO DE <text:s text:c="2"/>PLACAS BLOQUEADAS FUROS COMBINADOS , MATERIAL AÇO INOXIDÁVEL NAO MAGNETIC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80" table:style-name="ce55">
            <text:p>80</text:p>
          </table:table-cell>
          <table:table-cell office:value-type="currency" office:value="16500" table:style-name="ce57">
            <text:p>R$ 16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13" table:style-name="ce53">
            <text:p>13</text:p>
          </table:table-cell>
          <table:table-cell office:value-type="float" office:value="190034399" table:style-name="ce54">
            <text:p>190034399</text:p>
          </table:table-cell>
          <table:table-cell office:value-type="float" office:value="308109" table:style-name="ce55">
            <text:p>30810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PLACAS DE RECONSTRUÇÃO RETAS E CURVAS EM ACO NAO MAGNETICO PARA USO EM BACIA, <text:s text:c="3"/>FRATURAS DE ACETABULO 3,5/4,5 PARAFUSOS E INSTRUMENTAL D E COLOCAÇÃO <text:s text:c="3"/>placa ortopédica,material aço inoxidável, características adicionais <text:s/>modelo reta/curva parafuso de 3,5mm <text:s/>e 4.5 mm <text:s text:c="3"/>EXTRALONGOS ATE 130 MM aplicação reconstrução de bacia, com pincas osseas e clamps para reducao intraoperatoria</text:p>
          </table:table-cell>
          <table:table-cell office:value-type="string" table:style-name="ce55">
            <text:p>CAIXA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9300" table:style-name="ce57">
            <text:p>R$ 9.3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14" table:style-name="ce53">
            <text:p>14</text:p>
          </table:table-cell>
          <table:table-cell office:value-type="string" table:style-name="ce54">
            <text:p>BR3157919</text:p>
          </table:table-cell>
          <table:table-cell office:value-type="string" table:style-name="ce55">
            <text:p>420895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OSTEOSSÍNTESE TIPO AO PARA FRATURAS PROXIMAIS DO FÊMUR - EM AÇO, MODELO DCS ÂNGULO <text:s text:c="2"/>95¨, TIPO USO NÃO DESCARTÁVEL, ESTERILIDADE NÃO ESTÉRIL, APLICAÇÃO PROCEDIMENTO CIRÚRGICO <text:s text:c="2"/>ORTOPÉDICO, COMPRIMENTO 178, QUANTIDADE FUROS 10, DIÂMETRO 3,50.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4100" table:style-name="ce57">
            <text:p>R$ 4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15" table:style-name="ce53">
            <text:p>15</text:p>
          </table:table-cell>
          <table:table-cell office:value-type="string" table:style-name="ce54">
            <text:p>BR3157933</text:p>
          </table:table-cell>
          <table:table-cell office:value-type="float" office:value="436651" table:style-name="ce55">
            <text:p>436651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15 – SISTEMA DE PARAFUSOS CANULADOS DE 3,5 a 4.0 <text:s/>COM INSTRUMENTAL DE COLOCAÇÃO, INCLUINDO ARRUELAS, <text:s text:c="2"/>FIOS GUIAS E BROCAS CANULADAS. TRATA-SE <text:s/>MATERIAL PARA FIXAS, OSSOS PEQUENOS, FRAGMENTOS SOLTOS, <text:s/>LIGAMENTOS E TENDÕES ROMPIDOS, COMO EM FRATURAS DE TORNOZELO, COTOVELO E JOELHO.<text:s text:c="4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500" table:style-name="ce55">
            <text:p>500</text:p>
          </table:table-cell>
          <table:table-cell office:value-type="currency" office:value="1800" table:style-name="ce57">
            <text:p>R$ 1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16" table:style-name="ce53">
            <text:p>16</text:p>
          </table:table-cell>
          <table:table-cell office:value-type="string" table:style-name="ce54">
            <text:p>BR3170973</text:p>
          </table:table-cell>
          <table:table-cell office:value-type="float" office:value="435678" table:style-name="ce55">
            <text:p>435678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SISTEMA DE IMPLANTES DHS, INSTRUMENTAIS DE COLOCAÇÃO, PARA CIRURGIA DE FRATURAS <text:s/>PROXIMAIS DO <text:s text:c="2"/>FÊMUR PERTROCANTEREAS E INTERTROCANTEREAS COM HASTE MÉDIAL - PLACA ESPECIAL, MATERIAL ACO <text:s text:c="2"/>NAO MAGNETICO, MODELO DHS ÂNGULO 135¨, TIPO USO NÃO DESCATÁVEL, ESTERILIDADE NÃO ESTÉRIL, <text:s text:c="2"/>APLICAÇÃO PROCEDIMENTO CIRÚRGICO ORTOPÉDICO, QUANTIDADE FUROS 4 FUROS A 20 FUROS, DIÂMETRO 4.5, <text:s/>PARAFUSOS AUTOFRESANTES, PARAFUSO DESLIZANTE E CONTRA PINO, FIOS GUIAS.<text:s text:c="6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office:value-type="currency" office:value="4100" table:style-name="ce57">
            <text:p>R$ 4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17" table:style-name="ce53">
            <text:p>17</text:p>
          </table:table-cell>
          <table:table-cell office:value-type="float" office:value="190033999" table:style-name="ce54">
            <text:p>190033999</text:p>
          </table:table-cell>
          <table:table-cell office:value-type="float" office:value="285453" table:style-name="ce55">
            <text:p>28545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CAIXA DE PEQUENOS FRAGMENTOS COMPLETA COM INSTRUMENTAL DE <text:s text:c="2"/>COLOCAÇÃO, <text:s/>INCLUINDO PLACAS ESPECIAS PARA FRATURAS <text:s text:c="2"/>CALCÂNEO/PUNHO/COTOVELO - conjunto instrumental médico, componentes 1 chave <text:s text:c="2"/>hexagonal 3,5;pinça p/chave hexagonal 3,5, tipo uso 2 pinças espanholas retas,2 curvas, <text:s/>container, outros componentes macho p/cortical 3,5 engate;macho esponjoso 4 eng., tipo <text:s text:c="2"/>embalagem cx pequenos fragmentos, acessórios escariador 3,5 engate rápido,medidor <text:s text:c="2"/>cortical 3,5, características adicionais 2 retorcedores,1 pinça p/parafuso,2 lomanns pequenos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4300" table:style-name="ce57">
            <text:p>R$ 4.3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18" table:style-name="ce53">
            <text:p>18</text:p>
          </table:table-cell>
          <table:table-cell office:value-type="float" office:value="190034000" table:style-name="ce54">
            <text:p>190034000</text:p>
          </table:table-cell>
          <table:table-cell office:value-type="float" office:value="434083" table:style-name="ce55">
            <text:p>43408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18 – CAIXA DE MINI-MICRO FRAGMENTOS COMPLETA EM ACO NAO MAGNETICO DE ANGULO VARIAVEIS, <text:s text:c="2"/>COM INSTRUMENTAL DE COLOCAÇÃO - placa ortopédica, material aço inoxidável nao magnetico,parafusos bloqueados <text:s text:c="2"/>de angulo variavel e corticais autofresantes 1.3/1.5/2.0 ,modelo reta, T, Y, CONDYLAR, BASE FALANGEANA, STRUT, <text:s text:c="2"/>METACARAPAL , tipo uso mini fragmentos- placa ortopédica, material aço inoxidável, 1.3 / <text:s/>1,5 ou 2mm, uso osteossíntese <text:s text:c="2"/>micro fragmentos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12500" table:style-name="ce57">
            <text:p>R$ 12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19" table:style-name="ce53">
            <text:p>19</text:p>
          </table:table-cell>
          <table:table-cell office:value-type="float" office:value="190034001" table:style-name="ce54">
            <text:p>190034001</text:p>
          </table:table-cell>
          <table:table-cell office:value-type="float" office:value="434083" table:style-name="ce55">
            <text:p>43408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19 – CAIXA DE PARAFUSOS CANULADOS TIPO HEBERT COMPLETA, COM <text:s text:c="2"/>INSTRUMENTAL DE COL OCAÇÃO. Parafusos ortopedicos, material de aco <text:s text:c="2"/>inoxidavel, aplicacao para`escafoide c/ diversos tamanhos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office:value-type="currency" office:value="3600" table:style-name="ce57">
            <text:p>R$ 3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20" table:style-name="ce53">
            <text:p>20</text:p>
          </table:table-cell>
          <table:table-cell office:value-type="float" office:value="190034003" table:style-name="ce54">
            <text:p>190034003</text:p>
          </table:table-cell>
          <table:table-cell office:value-type="float" office:value="285475" table:style-name="ce55">
            <text:p>285475</text:p>
          </table:table-cell>
          <table:table-cell office:value-type="string" table:style-name="ce53">
            <text:p>GRUPO 1</text:p>
          </table:table-cell>
          <table:table-cell office:value-type="string" table:style-name="ce60">
            <text:p>ITEM 20 – CAIXA DE IMPLANTES E INSTRUMENTAIS PARA CIRURGIA DE FIXAÇÃO DE FRATURAS ACETÁBULO, JOELHOS, <text:s text:c="2"/>BACIA E CABEÇA FEMURAL.- parafusos ortopedicos 7.3, material em titanio , tipo canulado, comprimento rosca 16 e 32mm <text:s text:c="3"/>diâmetro 7.3, comprimento ate 130, <text:s/>mm , ARRUELAS EM TITANIO, FIOS GUIAS ROSQUEADOS, PERCUTANE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2400" table:style-name="ce57">
            <text:p>R$ 2.4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21" table:style-name="ce53">
            <text:p>21</text:p>
          </table:table-cell>
          <table:table-cell office:value-type="float" office:value="190034337" table:style-name="ce54">
            <text:p>190034337</text:p>
          </table:table-cell>
          <table:table-cell office:value-type="float" office:value="434083" table:style-name="ce55">
            <text:p>43408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CAIXA COMPOSTA DE PLACAS LC DCP ESPECIAL COM PARAFUSOS DE DIVERSOS <text:s text:c="3"/>TAMANHOS E INSTRUMENTAL DE COLOCAÇÃO, PARA CIRURGIA DE FRATURAS <text:s text:c="2"/>COMPLEXAS <text:s/>DE FÊMUR E ÚMERO,COM MATERIAL <text:s/>DE TITANEO, DE ALTA <text:s/>RESISTENCIA, <text:s text:c="2"/>COM POUCO CONTATO COM <text:s/>O OSS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office:value-type="currency" office:value="4100" table:style-name="ce57">
            <text:p>R$ 4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22" table:style-name="ce53">
            <text:p>22</text:p>
          </table:table-cell>
          <table:table-cell office:value-type="float" office:value="190034395" table:style-name="ce54">
            <text:p>190034395</text:p>
          </table:table-cell>
          <table:table-cell office:value-type="float" office:value="308109" table:style-name="ce55">
            <text:p>30810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22 – CAIXA COMPOSTA DE PLACAS LCP 3.5 ESPECIAL COM FUROS COMBINADOS ,ACO NAO MAGNETICO, PARAFUSOS <text:s text:c="2"/>BLOQUEADOS E CORTICAIS AUTOFRESANTES DE DIVERSOS TAMANHOS E INSTRUMENTAL DE COLOCAÇÃO, <text:s text:c="2"/>PARA CIRURGIA DE FRATURAS COMPLEXAS DE RÁDIO, ULNA, TORNOZELO. PUNHO , CALCÂNEO . <text:s text:c="2"/>- placa ortopédica reta, obliqua, em T, tipo hook, reconstrucao, 1/3 cana, placas bloqueadas, material aco nao magnetico, <text:s text:c="2"/>lcp , espessura 3,50, tipo uso não descartável, esterilidade não estéril, aplicação fixação de parafuso de traumatologia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office:value-type="currency" office:value="13000" table:style-name="ce57">
            <text:p>R$ 13.0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23" table:style-name="ce53">
            <text:p>23</text:p>
          </table:table-cell>
          <table:table-cell office:value-type="float" office:value="190034396" table:style-name="ce54">
            <text:p>190034396</text:p>
          </table:table-cell>
          <table:table-cell office:value-type="float" office:value="308109" table:style-name="ce55">
            <text:p>30810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CAIXA DE PLACAS LCP (PONTOS DE CONTATO NO OSSO) 4,5 E 5,0 ESTREITA / LARGA <text:s text:c="3"/>EM TITÂNIO EM "T" PARA <text:s/>SUSTENTAÇÃO E "L" <text:s/>ESQ/DIREITA + PARAFUSOS 5,0 EM <text:s text:c="2"/>TITÂNIO. <text:s text:c="2"/>- placa reta, material aço inoxidável, modelo lcp, tipo uso orifícios combinados <text:s text:c="2"/>p/compressão dinâmica, aplicação tamanho 3,5mm, características adicionais parafusos <text:s text:c="2"/>auto-bloqueantes, quantidade furos 8 furos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10800" table:style-name="ce57">
            <text:p>R$ 10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24" table:style-name="ce53">
            <text:p>24</text:p>
          </table:table-cell>
          <table:table-cell office:value-type="float" office:value="190034397" table:style-name="ce54">
            <text:p>190034397</text:p>
          </table:table-cell>
          <table:table-cell office:value-type="float" office:value="434083" table:style-name="ce55">
            <text:p>434083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24 – CAIXA DE PLACAS PEQ/GRANDE PARA ÚMERO PROXIMAL + PARAFUSOS COM ROSCA NA CABEÇA - <text:s text:c="2"/>PLACA ORTOPÉDICA, MATERIAL TITÂNIO, COMPRIMENTO 114, CARACTERÍSTICAS ADICIONAIS PLACA DE <text:s text:c="2"/>BLOQUEIO, COM 5 FUROS, ESPESSURA 3,50, TIPO USO NÃO DESCARTÁVEL, ESTERILIDADE NÃO ESTÉRIL, <text:s text:c="2"/>APLICAÇÃO FIXAÇÃO REGIÃO PROXIMAL DO ÚMER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16900" table:style-name="ce57">
            <text:p>R$ 16.9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25" table:style-name="ce53">
            <text:p>25</text:p>
          </table:table-cell>
          <table:table-cell office:value-type="float" office:value="190034398" table:style-name="ce54">
            <text:p>190034398</text:p>
          </table:table-cell>
          <table:table-cell office:value-type="float" office:value="308109" table:style-name="ce55">
            <text:p>30810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25 – CAIXA DE PLACAS LCP (PONTOS DE CONTATO NO OSSO) 3,5MM EM TITÂNIO <text:s text:c="2"/>E ESPECIAIS TIPO T, <text:s/>T OBLÍQUO E <text:s/>TREVO + PARAFUSOS DE BLOQUEIO <text:s text:c="2"/>LCP ( COM ROSCA NA CABEÇA) 2,7/3,5 EM TITÂNIO. <text:s/>- placa reta, material aço <text:s text:c="2"/>inoxidável, modelo lcp, tipo uso orifícios combinados p/compressão dinâmica, <text:s text:c="2"/>aplicação tamanho 3,5mm, características adicionais parafusos auto-bloqueantes, <text:s text:c="2"/>quantidade furos 8 furostambem os <text:s/>seguintes<text:s text:c="2"/>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80" table:style-name="ce55">
            <text:p>80</text:p>
          </table:table-cell>
          <table:table-cell office:value-type="currency" office:value="13600" table:style-name="ce57">
            <text:p>R$ 13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26" table:style-name="ce53">
            <text:p>26</text:p>
          </table:table-cell>
          <table:table-cell office:value-type="float" office:value="190034400" table:style-name="ce54">
            <text:p>190034400</text:p>
          </table:table-cell>
          <table:table-cell office:value-type="float" office:value="308109" table:style-name="ce55">
            <text:p>30810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CAIXA DE PLACAS ESPECIAIS, PARA FRATURAS DO PLATÔ TIBIAL 3.5 MM EM L E EM T ATE 16 <text:s/>BLOQUEADA FUROS <text:s text:c="2"/>BOMBINADOS , PILÃO TIBIAL BLOQEADA COM FUROS COMBINADOS 3.5 MM COM INSERCAO MEDIAL E <text:s text:c="2"/>ANTERO LATERAL, COM INSTRUMENTAL DE COLOCAÇÃO - placa ortopédica, material aço inoxidável <text:s text:c="2"/>NAO MAGNETICO, características adicionais baixo PERFIL contato,bloqueio rosqueado, orifícios combinados, <text:s text:c="2"/>modelo tipo lcp,perfil baixo,lado direito e lado esquerdo, espessura 3,50, tipo uso <text:s text:c="2"/>compressão dinâm. p/parafusos auto-bloq 2,7/3,5mm, aplicação bloqueio cruciforme p/ pilão tibial <text:s text:c="2"/>co insercao medial e antero lateral.</text:p>
          </table:table-cell>
          <table:table-cell office:value-type="string" table:style-name="ce55">
            <text:p>UNIDADE</text:p>
          </table:table-cell>
          <table:table-cell office:value-type="float" office:value="8" table:style-name="ce53">
            <text:p>8</text:p>
          </table:table-cell>
          <table:table-cell office:value-type="float" office:value="80" table:style-name="ce55">
            <text:p>80</text:p>
          </table:table-cell>
          <table:table-cell office:value-type="currency" office:value="14800" table:style-name="ce57">
            <text:p>R$ 14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27" table:style-name="ce53">
            <text:p>27</text:p>
          </table:table-cell>
          <table:table-cell office:value-type="float" office:value="15899582" table:style-name="ce54">
            <text:p>15899582</text:p>
          </table:table-cell>
          <table:table-cell office:value-type="string" table:style-name="ce55">
            <text:p>435679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PLACA LCP 4.5/5.0 CONTATO LIMITADO PARA FÊMUR PROXIMAL SISTEMA LCP PARA OSTEOSINTESE <text:s text:c="2"/>PERIARTICULAR TIPO HOOK QUE REÚNE AS TÉCNICAS DE PARAFUSO BLOQUEADOS COM TÉCNICAS DE PARAFUSO DE COMPRESSÃO, PLACA <text:s text:c="2"/>COM FUROS COMBINADOS PODENDO SER USADO COMO COMPRESSÃO E DE BLOQUEIO. PARTE PROXIMAL DA <text:s text:c="2"/>PLACA PRÉ-MOLDADA MELHOR ADAPTAÇÃO, SEUS FUROS PROXIMAIS ESTÃO DESENHADOS PRA INSERÇÃO DE <text:s text:c="2"/>PARAFUSOS CANULADOS 7.3, PLACAS DESENHADAS PRA LADO ESQUERDO E DIREITO, FUROS PROXIMAIS <text:s text:c="2"/>APRESENTANDO ANGULAÇÕES DE 95/120 E 135 GRAUS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office:value-type="currency" office:value="18600" table:style-name="ce57">
            <text:p>R$ 18.6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28" table:style-name="ce53">
            <text:p>28</text:p>
          </table:table-cell>
          <table:table-cell office:value-type="string" table:style-name="ce54">
            <text:p>BR3309788</text:p>
          </table:table-cell>
          <table:table-cell office:value-type="float" office:value="436621" table:style-name="ce55">
            <text:p>436621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Parafusos bloqueados tipo LCP autofresantes, acompanhados de brocas e chaves stardrive com torquimentro referente <text:s/>ao tamanho do parafuso, tamanhos 1.3; 1.5; 2.0; 2.4; 2.7; 3.5; 5.0; 7.3 utilizados fora do sistema de placas, unidade.</text:p>
          </table:table-cell>
          <table:table-cell office:value-type="string" table:style-name="ce55">
            <text:p>UNIDADE</text:p>
          </table:table-cell>
          <table:table-cell office:value-type="float" office:value="20" table:style-name="ce53">
            <text:p>20</text:p>
          </table:table-cell>
          <table:table-cell office:value-type="float" office:value="200" table:style-name="ce55">
            <text:p>200</text:p>
          </table:table-cell>
          <table:table-cell office:value-type="currency" office:value="880" table:style-name="ce57">
            <text:p>R$ 88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29" table:style-name="ce53">
            <text:p>29</text:p>
          </table:table-cell>
          <table:table-cell office:value-type="string" table:style-name="ce54">
            <text:p>BR3309789</text:p>
          </table:table-cell>
          <table:table-cell office:value-type="float" office:value="443217" table:style-name="ce55">
            <text:p>443217</text:p>
          </table:table-cell>
          <table:table-cell office:value-type="string" table:style-name="ce53">
            <text:p>GRUPO 1</text:p>
          </table:table-cell>
          <table:table-cell office:value-type="string" table:style-name="ce56">
            <text:p>ITEM 29 – PARAFUSO CORTICAL AUTOFRESANTE <text:s/>Parafusos corticais autofresantes e <text:s/>esponjosos, tamanhos 1.1/1.3/1.5/2.0/2.4/2.7/3.5/4.0/4.5/5.0/6.5 <text:s text:c="2"/>utilizados fora do sistema de placas, unidade.</text:p>
          </table:table-cell>
          <table:table-cell office:value-type="string" table:style-name="ce55">
            <text:p>UNIDADE</text:p>
          </table:table-cell>
          <table:table-cell office:value-type="float" office:value="20" table:style-name="ce53">
            <text:p>20</text:p>
          </table:table-cell>
          <table:table-cell office:value-type="float" office:value="200" table:style-name="ce55">
            <text:p>200</text:p>
          </table:table-cell>
          <table:table-cell office:value-type="currency" office:value="350" table:style-name="ce57">
            <text:p>R$ 35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30" table:style-name="ce53">
            <text:p>30</text:p>
          </table:table-cell>
          <table:table-cell office:value-type="float" office:value="15714209" table:style-name="ce54">
            <text:p>15714209</text:p>
          </table:table-cell>
          <table:table-cell office:value-type="float" office:value="150186" table:style-name="ce55">
            <text:p>150186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0 – EQUIPO ESPECIAL, APLICAÇÃO P/ARTROSCOPIA , VIAS DUAS VIIAS, CARACTERÍSTICAS ADICIONAIS P/BOMBA <text:s text:c="2"/>DE INFUSÃO DE ALTO FLUX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500" table:style-name="ce55">
            <text:p>500</text:p>
          </table:table-cell>
          <table:table-cell office:value-type="currency" office:value="330" table:style-name="ce57">
            <text:p>R$ 33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31" table:style-name="ce53">
            <text:p>31</text:p>
          </table:table-cell>
          <table:table-cell office:value-type="string" table:style-name="ce54">
            <text:p>BR3321530</text:p>
          </table:table-cell>
          <table:table-cell office:value-type="float" office:value="285643" table:style-name="ce55">
            <text:p>285643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1 – Fio de sutura- Fios de alta resistência lineares e do tipo fita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335" table:style-name="ce57">
            <text:p>R$ 33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32" table:style-name="ce53">
            <text:p>32</text:p>
          </table:table-cell>
          <table:table-cell office:value-type="string" table:style-name="ce54">
            <text:p>BR3325167</text:p>
          </table:table-cell>
          <table:table-cell office:value-type="float" office:value="440351" table:style-name="ce55">
            <text:p>440351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2 – PARAFUSO MOLDADO DE ÁCIDO POLILÁCTICO BIO-ABSORVÍVEL COMPATIVEL COM O INSTRUMENTAL E O USO DE <text:s text:c="2"/>FIO GUIA EM NITINOL, COM NO MINIMO 4 TAMANHOS E DOIS COMPRIMENTOS, PARA CIRURGIAS DO PÉ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30" table:style-name="ce55">
            <text:p>30</text:p>
          </table:table-cell>
          <table:table-cell office:value-type="currency" office:value="650" table:style-name="ce57">
            <text:p>R$ 6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33" table:style-name="ce53">
            <text:p>33</text:p>
          </table:table-cell>
          <table:table-cell office:value-type="string" table:style-name="ce54">
            <text:p>BR3325054</text:p>
          </table:table-cell>
          <table:table-cell office:value-type="float" office:value="443217" table:style-name="ce55">
            <text:p>443217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3 – AGULHA SUTURA PARA MINISCO - FIO METÁLICO, MALEÁVEL, CONFECCIONADO EM NITINOL, NÃO CORTANTE, <text:s text:c="2"/>COM ALÇA PARA TRANSPORTE DE FIOS DE SUTURA</text:p>
          </table:table-cell>
          <table:table-cell office:value-type="string" table:style-name="ce55">
            <text:p>CONJUNTO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400" table:style-name="ce57">
            <text:p>R$ 4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34" table:style-name="ce53">
            <text:p>34</text:p>
          </table:table-cell>
          <table:table-cell office:value-type="string" table:style-name="ce54">
            <text:p>BR3325168</text:p>
          </table:table-cell>
          <table:table-cell office:value-type="float" office:value="443243" table:style-name="ce55">
            <text:p>443243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4 – SISTEMA DE PASSADOR DE FIO/SUTURA DO TIPO FIRST PASS OU SCORPION E FIOS DE ALTA RESISTÊNCIA, PARA CIRURGIA DO JOELHO.</text:p>
          </table:table-cell>
          <table:table-cell office:value-type="string" table:style-name="ce55">
            <text:p>CONJUNTO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685" table:style-name="ce57">
            <text:p>R$ 68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35" table:style-name="ce53">
            <text:p>35</text:p>
          </table:table-cell>
          <table:table-cell office:value-type="string" table:style-name="ce54">
            <text:p>BR3162014</text:p>
          </table:table-cell>
          <table:table-cell office:value-type="string" table:style-name="ce55">
            <text:p>364092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5 – AGRAFES LIGAMENTARES EM TITÂNIO PARA CIRURGIAS DE JOELHO H22 X L10MM .TRATA-SE DE MATERIAL <text:s text:c="2"/>ESPECIAL DE USO UNICO, DE TITANEO, DESCARTAVEL QUE SAO USADOS PARA CRAVAR OS LIGAMENTOS NAS <text:s text:c="2"/>RECONSTRUCOES LIGAMENTARES DO JOELHO.<text:s text:c="3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360" table:style-name="ce57">
            <text:p>R$ 36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36" table:style-name="ce53">
            <text:p>36</text:p>
          </table:table-cell>
          <table:table-cell office:value-type="string" table:style-name="ce54">
            <text:p>BR3185199</text:p>
          </table:table-cell>
          <table:table-cell office:value-type="string" table:style-name="ce55">
            <text:p>445274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6 – LÂMINA DE SHAVER PARA ESTRUTURAS ÓSSEAS E TECIDOS MOLES, DIÂMETRO DE 2,5 A 5,5, <text:s text:c="2"/>CARACTERÍSTICAS ADICIONAIS OSCILANTE, SENTIDOS HORÁRIO E ANTI-HORÁRIO, <text:s text:c="2"/>ESTERELIDADE ESTÉRIL E DESCARTÁVEL, COM OPÇÕES DE RETA, CURVA E LONGA.<text:s text:c="2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824" table:style-name="ce57">
            <text:p>R$ 824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37" table:style-name="ce53">
            <text:p>37</text:p>
          </table:table-cell>
          <table:table-cell office:value-type="float" office:value="996613027" table:style-name="ce54">
            <text:p>996613027</text:p>
          </table:table-cell>
          <table:table-cell office:value-type="float" office:value="449858" table:style-name="ce55">
            <text:p>449858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7 – Dispositivo para fixação fêmoral através de placa em titânio, cujo implante se ajuste a qualquer tamanho de túnel através do encurtamento <text:s text:c="2"/>regulável do mesmo e que permita tensionamento residual após fixaçã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1650" table:style-name="ce57">
            <text:p>R$ 1.6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38" table:style-name="ce53">
            <text:p>38</text:p>
          </table:table-cell>
          <table:table-cell office:value-type="string" table:style-name="ce54">
            <text:p>BR3170976</text:p>
          </table:table-cell>
          <table:table-cell office:value-type="string" table:style-name="ce55">
            <text:p>440528</text:p>
          </table:table-cell>
          <table:table-cell office:value-type="string" table:style-name="ce53">
            <text:p>GRUPO 2</text:p>
          </table:table-cell>
          <table:table-cell office:value-type="string" table:style-name="ce56">
            <text:p>ITEM 38 – PARAFUSO ORTOPÉDICO <text:s/>DE INTERFERÊNCIA BIOCOMPOSTO, <text:s text:c="2"/>APLICAÇÃO PROCEDIMENTO CIRÚRGICO <text:s text:c="2"/>ORTOPÉDICO PARA INSERÇÃO DE ENXERTOS. <text:s/>COMPRIMENTO DE 25 A 35 MM E DE DIÂMETRO DE 5 A 11MM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900" table:style-name="ce57">
            <text:p>R$ 9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39" table:style-name="ce53">
            <text:p>39</text:p>
          </table:table-cell>
          <table:table-cell office:value-type="string" table:style-name="ce54">
            <text:p>BR3321492</text:p>
          </table:table-cell>
          <table:table-cell office:value-type="float" office:value="440582" table:style-name="ce55">
            <text:p>440582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39 – SISTEMA DE FIO PARA SUTURA DE ALTA RESISTÊNCIA, COM AGULHA NÚMERO 2 E 5, USO ÚNICO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200" table:style-name="ce55">
            <text:p>200</text:p>
          </table:table-cell>
          <table:table-cell office:value-type="currency" office:value="330" table:style-name="ce57">
            <text:p>R$ 33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40" table:style-name="ce53">
            <text:p>40</text:p>
          </table:table-cell>
          <table:table-cell office:value-type="string" table:style-name="ce54">
            <text:p>BR3321493</text:p>
          </table:table-cell>
          <table:table-cell office:value-type="float" office:value="440582" table:style-name="ce55">
            <text:p>440582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0 – SISTEMA DE PASSADOR DE FIO/SUTURA DO TIPO FIRST PASS OU SCORPION E FIOS DE ALTA RESISTÊNCIA, PARA CIRURGIA DO OMBR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200" table:style-name="ce55">
            <text:p>200</text:p>
          </table:table-cell>
          <table:table-cell office:value-type="currency" office:value="449" table:style-name="ce57">
            <text:p>R$ 449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41" table:style-name="ce53">
            <text:p>41</text:p>
          </table:table-cell>
          <table:table-cell office:value-type="string" table:style-name="ce54">
            <text:p>BR3321494</text:p>
          </table:table-cell>
          <table:table-cell office:value-type="float" office:value="337888" table:style-name="ce55">
            <text:p>337888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375" table:style-name="ce57">
            <text:p>R$ 37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42" table:style-name="ce53">
            <text:p>42</text:p>
          </table:table-cell>
          <table:table-cell office:value-type="string" table:style-name="ce54">
            <text:p>BR3335667</text:p>
          </table:table-cell>
          <table:table-cell office:value-type="float" office:value="318814" table:style-name="ce55">
            <text:p>318814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60" table:style-name="ce55">
            <text:p>160</text:p>
          </table:table-cell>
          <table:table-cell office:value-type="currency" office:value="2199" table:style-name="ce57">
            <text:p>R$ 2.199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43" table:style-name="ce53">
            <text:p>43</text:p>
          </table:table-cell>
          <table:table-cell office:value-type="string" table:style-name="ce54">
            <text:p>BR3325052</text:p>
          </table:table-cell>
          <table:table-cell office:value-type="float" office:value="440582" table:style-name="ce55">
            <text:p>440582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3 – FIOS DE ALTA RESISTÊNCIA LINEARES E DO TIPO FITA</text:p>
          </table:table-cell>
          <table:table-cell office:value-type="string" table:style-name="ce55">
            <text:p>CONJUNTO</text:p>
          </table:table-cell>
          <table:table-cell office:value-type="float" office:value="10" table:style-name="ce53">
            <text:p>10</text:p>
          </table:table-cell>
          <table:table-cell office:value-type="float" office:value="150" table:style-name="ce55">
            <text:p>150</text:p>
          </table:table-cell>
          <table:table-cell office:value-type="currency" office:value="330" table:style-name="ce57">
            <text:p>R$ 33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44" table:style-name="ce53">
            <text:p>44</text:p>
          </table:table-cell>
          <table:table-cell office:value-type="string" table:style-name="ce54">
            <text:p>BR3157937</text:p>
          </table:table-cell>
          <table:table-cell office:value-type="string" table:style-name="ce55">
            <text:p>440575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TEM 44 – Sistema de passador de fio/sutura do tipo firstpass ou scorpion ou de melhor qualidade e fios de alta resistência ou de melhor <text:s text:c="2"/>qualidade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60" table:style-name="ce55">
            <text:p>60</text:p>
          </table:table-cell>
          <table:table-cell office:value-type="currency" office:value="450" table:style-name="ce57">
            <text:p>R$ 4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45" table:style-name="ce53">
            <text:p>45</text:p>
          </table:table-cell>
          <table:table-cell office:value-type="float" office:value="15714204" table:style-name="ce54">
            <text:p>15714204</text:p>
          </table:table-cell>
          <table:table-cell office:value-type="float" office:value="440581" table:style-name="ce55">
            <text:p>440581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TEM 45 – SISTEMA DE FIXAÇÃO POR ANCORAGEM EM TCP/ PLGA, OU PLLA, CANULADA, PRODUTO BIOCOMPOSTO COM <text:s text:c="2"/>FIOS DE ALTA RESISTÊNCIA #2, ROSQUEADA NO TAMANHO DE APROXIMADAMENTE 2,1MM A 6,5MM, USO ÚNIC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office:value-type="currency" office:value="1550" table:style-name="ce57">
            <text:p>R$ 1.5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46" table:style-name="ce53">
            <text:p>46</text:p>
          </table:table-cell>
          <table:table-cell office:value-type="float" office:value="15714203" table:style-name="ce54">
            <text:p>15714203</text:p>
          </table:table-cell>
          <table:table-cell office:value-type="float" office:value="440581" table:style-name="ce55">
            <text:p>440581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office:value-type="currency" office:value="1940" table:style-name="ce57">
            <text:p>R$ 1.94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47" table:style-name="ce53">
            <text:p>47</text:p>
          </table:table-cell>
          <table:table-cell office:value-type="float" office:value="15167782" table:style-name="ce54">
            <text:p>15167782</text:p>
          </table:table-cell>
          <table:table-cell office:value-type="float" office:value="440581" table:style-name="ce55">
            <text:p>440581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7 – SISTEMA DE FIXAÇÃO POR ANCORAGEM EM TITÂNIO, COM AO MENOS DOIS FIOS DE ALTA RESISTÊNCIA , <text:s text:c="2"/>TAMANHOS VARIADOS DE 1,8 A 5,5 MM USO ÚNIC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200" table:style-name="ce55">
            <text:p>200</text:p>
          </table:table-cell>
          <table:table-cell office:value-type="currency" office:value="1150" table:style-name="ce57">
            <text:p>R$ 1.1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48" table:style-name="ce53">
            <text:p>48</text:p>
          </table:table-cell>
          <table:table-cell office:value-type="float" office:value="15714207" table:style-name="ce54">
            <text:p>15714207</text:p>
          </table:table-cell>
          <table:table-cell office:value-type="float" office:value="446423" table:style-name="ce55">
            <text:p>446423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8 – SISTEMA DE CÂNULA PARA ARTROSCOPIA DE OMBRO E JOELHO COM OBTURADOR CANULADO ROSQUEADO <text:s text:c="3"/>EM TAMANHO E COMPRIMENTOS DIVERSOS, MATERIAL DESCARTÁVEL E USO ÚNICO.<text:s text:c="10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350" table:style-name="ce57">
            <text:p>R$ 3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49" table:style-name="ce53">
            <text:p>49</text:p>
          </table:table-cell>
          <table:table-cell office:value-type="float" office:value="15714212" table:style-name="ce54">
            <text:p>15714212</text:p>
          </table:table-cell>
          <table:table-cell office:value-type="float" office:value="354539" table:style-name="ce55">
            <text:p>354539</text:p>
          </table:table-cell>
          <table:table-cell office:value-type="string" table:style-name="ce61">
            <text:p>GRUPO 3</text:p>
          </table:table-cell>
          <table:table-cell office:value-type="string" table:style-name="ce56">
            <text:p>ITEM 49 – PONTEIRA DE RADIOFREQUÊNCIA DESCARTÁVEL 90 GRAUS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1900" table:style-name="ce57">
            <text:p>R$ 1.9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50" table:style-name="ce53">
            <text:p>50</text:p>
          </table:table-cell>
          <table:table-cell office:value-type="float" office:value="15714205" table:style-name="ce54">
            <text:p>15714205</text:p>
          </table:table-cell>
          <table:table-cell office:value-type="float" office:value="376650" table:style-name="ce55">
            <text:p>376650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AGULHA INICIALIZADORA PARA ARTROSCOPIA DE QUADRIL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2000" table:style-name="ce62">
            <text:p>R$ 2.0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51" table:style-name="ce53">
            <text:p>51</text:p>
          </table:table-cell>
          <table:table-cell office:value-type="string" table:style-name="ce54">
            <text:p>BR3321489</text:p>
          </table:table-cell>
          <table:table-cell office:value-type="float" office:value="413923" table:style-name="ce55">
            <text:p>413923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Broca descartável para quadril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1565" table:style-name="ce62">
            <text:p>R$ 1.56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52" table:style-name="ce53">
            <text:p>52</text:p>
          </table:table-cell>
          <table:table-cell office:value-type="string" table:style-name="ce54">
            <text:p>BR3321490</text:p>
          </table:table-cell>
          <table:table-cell office:value-type="float" office:value="480030" table:style-name="ce55">
            <text:p>480030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CÂNULA DE INTRODUÇÃO PARA QUADRIL 5,7 MM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41" table:style-name="ce55">
            <text:p>41</text:p>
          </table:table-cell>
          <table:table-cell office:value-type="currency" office:value="1005" table:style-name="ce62">
            <text:p>R$ 1.00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53" table:style-name="ce53">
            <text:p>53</text:p>
          </table:table-cell>
          <table:table-cell office:value-type="string" table:style-name="ce54">
            <text:p>BR3321449</text:p>
          </table:table-cell>
          <table:table-cell office:value-type="float" office:value="443211" table:style-name="ce55">
            <text:p>443211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PARAFUSO ÂNCORA PARA QUADRIL DE 2,0 MM A 2,4 MM EM POLIETILENO COM HIDROXAPATITA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1" table:style-name="ce55">
            <text:p>51</text:p>
          </table:table-cell>
          <table:table-cell office:value-type="currency" office:value="1700" table:style-name="ce62">
            <text:p>R$ 1.7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54" table:style-name="ce53">
            <text:p>54</text:p>
          </table:table-cell>
          <table:table-cell office:value-type="string" table:style-name="ce54">
            <text:p>BR3324692</text:p>
          </table:table-cell>
          <table:table-cell office:value-type="float" office:value="443211" table:style-name="ce55">
            <text:p>443211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ITEM 54 – PARAFUSO ÂNCORA PARA QUADRIL DE 1,8MM A 2,0 MM EM POLIESTER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1" table:style-name="ce55">
            <text:p>41</text:p>
          </table:table-cell>
          <table:table-cell office:value-type="currency" office:value="1850" table:style-name="ce62">
            <text:p>R$ 1.8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55" table:style-name="ce53">
            <text:p>55</text:p>
          </table:table-cell>
          <table:table-cell office:value-type="string" table:style-name="ce54">
            <text:p>BR3324694</text:p>
          </table:table-cell>
          <table:table-cell office:value-type="float" office:value="365867" table:style-name="ce55">
            <text:p>365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PASSADOR DE SUTURA - SISTEMA PASSADOR DE SUTURA, COM ANGULAÇÕES EM DIVERSOS GRAUS, <text:s text:c="2"/>USO ÚNICO <text:s/>COM ANGULAÇOES EM DIVERSOS GRAUS, PRODUTO USO ÚNIC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1" table:style-name="ce55">
            <text:p>41</text:p>
          </table:table-cell>
          <table:table-cell office:value-type="currency" office:value="1600" table:style-name="ce62">
            <text:p>R$ 1.6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56" table:style-name="ce53">
            <text:p>56</text:p>
          </table:table-cell>
          <table:table-cell office:value-type="string" table:style-name="ce54">
            <text:p>BR3324841</text:p>
          </table:table-cell>
          <table:table-cell office:value-type="float" office:value="365867" table:style-name="ce55">
            <text:p>365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LÂMINA DE SHAVER ÓSSEA PARA QUADRIL, LONGA, RETA ABRADER 5,5MM DE 180MM</text:p>
          </table:table-cell>
          <table:table-cell office:value-type="string" table:style-name="ce55">
            <text:p>UNIDADE</text:p>
          </table:table-cell>
          <table:table-cell office:value-type="float" office:value="6" table:style-name="ce53">
            <text:p>6</text:p>
          </table:table-cell>
          <table:table-cell office:value-type="float" office:value="41" table:style-name="ce55">
            <text:p>41</text:p>
          </table:table-cell>
          <table:table-cell office:value-type="currency" office:value="1250" table:style-name="ce62">
            <text:p>R$ 1.2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57" table:style-name="ce53">
            <text:p>57</text:p>
          </table:table-cell>
          <table:table-cell office:value-type="string" table:style-name="ce54">
            <text:p>BR3324858</text:p>
          </table:table-cell>
          <table:table-cell office:value-type="float" office:value="365867" table:style-name="ce55">
            <text:p>365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LÂMINA DE SHAVER ÓSSEA PARA QUADRIL, LONGA, RETA ABRADER 4,0MM DE 180MM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41" table:style-name="ce55">
            <text:p>41</text:p>
          </table:table-cell>
          <table:table-cell office:value-type="currency" office:value="1250" table:style-name="ce62">
            <text:p>R$ 1.2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58" table:style-name="ce53">
            <text:p>58</text:p>
          </table:table-cell>
          <table:table-cell office:value-type="string" table:style-name="ce54">
            <text:p>BR3324896</text:p>
          </table:table-cell>
          <table:table-cell office:value-type="float" office:value="365867" table:style-name="ce55">
            <text:p>365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LÂMINA DE SHAVER PARA QUADRIL, LONGA, RETA DE 180MM</text:p>
          </table:table-cell>
          <table:table-cell office:value-type="string" table:style-name="ce55">
            <text:p>UNIDADE</text:p>
          </table:table-cell>
          <table:table-cell office:value-type="float" office:value="3" table:style-name="ce63">
            <text:p>3</text:p>
          </table:table-cell>
          <table:table-cell office:value-type="float" office:value="41" table:style-name="ce55">
            <text:p>41</text:p>
          </table:table-cell>
          <table:table-cell office:value-type="currency" office:value="1250" table:style-name="ce62">
            <text:p>R$ 1.2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59" table:style-name="ce53">
            <text:p>59</text:p>
          </table:table-cell>
          <table:table-cell office:value-type="string" table:style-name="ce54">
            <text:p>BR3325055</text:p>
          </table:table-cell>
          <table:table-cell office:value-type="float" office:value="365867" table:style-name="ce55">
            <text:p>365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LÂMINAS <text:s/>DE SHAVER PARA QUADRIL, LONGA, CURVA CÔNCAVA / CONVEXA DE 180MM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41" table:style-name="ce55">
            <text:p>41</text:p>
          </table:table-cell>
          <table:table-cell office:value-type="currency" office:value="1250" table:style-name="ce62">
            <text:p>R$ 1.2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60" table:style-name="ce53">
            <text:p>60</text:p>
          </table:table-cell>
          <table:table-cell office:value-type="string" table:style-name="ce54">
            <text:p>BR3184756</text:p>
          </table:table-cell>
          <table:table-cell office:value-type="string" table:style-name="ce55">
            <text:p>422950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CINTA DE TRAÇÃO DO PÉ PARA ARTROSCOPIA 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20" table:style-name="ce55">
            <text:p>20</text:p>
          </table:table-cell>
          <table:table-cell office:value-type="currency" office:value="165" table:style-name="ce62">
            <text:p>R$ 165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61" table:style-name="ce53">
            <text:p>61</text:p>
          </table:table-cell>
          <table:table-cell office:value-type="string" table:style-name="ce54">
            <text:p>BR3186372</text:p>
          </table:table-cell>
          <table:table-cell office:value-type="float" office:value="388239" table:style-name="ce55">
            <text:p>388239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ALMOFADA DE ABDUÇÃO PARA POSICIONAMENTO DOS MEMBROS INFERIORES EM PÓS OPERATORIO DE <text:s text:c="2"/>CIRURGIA DE ARTROSCOPIA DE QUADRIL COM FECHOS ADERENTES. TAMANHO ÚNICO. (ROLO POSICIONADOR DESCARTÁVEL).<text:s text:c="2"/>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20" table:style-name="ce55">
            <text:p>20</text:p>
          </table:table-cell>
          <table:table-cell office:value-type="currency" office:value="600" table:style-name="ce62">
            <text:p>R$ 6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62" table:style-name="ce53">
            <text:p>62</text:p>
          </table:table-cell>
          <table:table-cell office:value-type="float" office:value="995358095" table:style-name="ce54">
            <text:p>995358095</text:p>
          </table:table-cell>
          <table:table-cell office:value-type="float" office:value="361900" table:style-name="ce55">
            <text:p>361900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FIO GUIA NITINOL 1,2MM X 450MM PARA ARTROSCOPIA DO QUADRIL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20" table:style-name="ce55">
            <text:p>20</text:p>
          </table:table-cell>
          <table:table-cell office:value-type="currency" office:value="500" table:style-name="ce62">
            <text:p>R$ 5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20">
          <table:table-cell table:style-name="ce50"/>
          <table:table-cell office:value-type="float" office:value="63" table:style-name="ce53">
            <text:p>63</text:p>
          </table:table-cell>
          <table:table-cell office:value-type="float" office:value="15714206" table:style-name="ce54">
            <text:p>15714206</text:p>
          </table:table-cell>
          <table:table-cell office:value-type="float" office:value="357867" table:style-name="ce55">
            <text:p>35786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BISTURI SERRILHADO PARA CIRURGAS DE QUADRIL TIPO BANANA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20" table:style-name="ce55">
            <text:p>20</text:p>
          </table:table-cell>
          <table:table-cell office:value-type="currency" office:value="350" table:style-name="ce62">
            <text:p>R$ 35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64" table:style-name="ce53">
            <text:p>64</text:p>
          </table:table-cell>
          <table:table-cell office:value-type="float" office:value="15714213" table:style-name="ce54">
            <text:p>15714213</text:p>
          </table:table-cell>
          <table:table-cell office:value-type="float" office:value="354537" table:style-name="ce55">
            <text:p>354537</text:p>
          </table:table-cell>
          <table:table-cell office:value-type="string" table:style-name="ce61">
            <text:p>GRUPO 4</text:p>
          </table:table-cell>
          <table:table-cell office:value-type="string" table:style-name="ce56">
            <text:p>ITEM 64 – PONTEIRA DE RADIOFREQUENCIA BIPOLAR PARA ABLAÇÃO CONTROLADA EM PLASMA DE BAIXA TEMPERATURA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3000" table:style-name="ce62">
            <text:p>R$ 3.0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2">
          <table:table-cell table:style-name="ce50"/>
          <table:table-cell office:value-type="float" office:value="65" table:style-name="ce53">
            <text:p>65</text:p>
          </table:table-cell>
          <table:table-cell office:value-type="string" table:style-name="ce54">
            <text:p>BR3309590</text:p>
          </table:table-cell>
          <table:table-cell office:value-type="float" office:value="435679" table:style-name="ce55">
            <text:p>435679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ITEM 65 – PLACA TIBIAL E FEMORAL, MEMBROS INFERIORES PARA CIRURGIAS COMPLEXAS E ARTRODESE, ESPESSURA 3MM, 4 À 12 FUROS, COMPRIMENTO 59MM À <text:s text:c="2"/>101MM, CALÇOS 5-7, 5-10-12, 5-15MM - LÂMINA METÁLICA PARA FIXAÇÃO EM SUPERFÍCIE DIAFISÁRIA OU <text:s text:c="2"/>DIÁFISO-METAFISÁRIA ÓSSEA POR PARAFUSOS ATRAVÉS DE SEUS ORIFÍCIOS NEUTROS, DINÂMICOS OU <text:s text:c="2"/>ROSQUEADOS.</text:p>
          </table:table-cell>
          <table:table-cell office:value-type="string" table:style-name="ce55">
            <text:p>UNIDADE</text:p>
          </table:table-cell>
          <table:table-cell office:value-type="float" office:value="8" table:style-name="ce53">
            <text:p>8</text:p>
          </table:table-cell>
          <table:table-cell office:value-type="float" office:value="30" table:style-name="ce55">
            <text:p>30</text:p>
          </table:table-cell>
          <table:table-cell office:value-type="currency" office:value="12000" table:style-name="ce57">
            <text:p>R$ 12.0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66" table:style-name="ce53">
            <text:p>66</text:p>
          </table:table-cell>
          <table:table-cell office:value-type="float" office:value="190035372" table:style-name="ce54">
            <text:p>190035372</text:p>
          </table:table-cell>
          <table:table-cell office:value-type="float" office:value="285172" table:style-name="ce55">
            <text:p>285172</text:p>
          </table:table-cell>
          <table:table-cell office:value-type="string" table:style-name="ce61">
            <text:p>GRUPO 5</text:p>
          </table:table-cell>
          <table:table-cell office:value-type="string" table:style-name="ce59">
            <text:p>ITEM 66 – ENXERTO PARA REVISÃO GRANULADO TRIFOSFATO DE CÁLCIO <text:s/>- enxerto ósseo, material biocerâmica <text:s text:c="2"/>trifosfato de cálcio, tipo reconhecimento p/osteoblastos;0,3micra porosidade, esterilidade estéril, apresentação <text:s text:c="2"/>embalagem individual<text:s text:c="4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56" table:style-name="ce55">
            <text:p>156</text:p>
          </table:table-cell>
          <table:table-cell office:value-type="currency" office:value="6900" table:style-name="ce57">
            <text:p>R$ 6.9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67" table:style-name="ce53">
            <text:p>67</text:p>
          </table:table-cell>
          <table:table-cell office:value-type="string" table:style-name="ce54">
            <text:p>BR3157927</text:p>
          </table:table-cell>
          <table:table-cell office:value-type="string" table:style-name="ce55">
            <text:p>370203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PRÓTESE TOTAL PARA JOELHO CIMENTADA COM OU SEM PRESERVAÇÃO DO LIGAMENTO CRUZADO, <text:s text:c="2"/>COM O CIMENTO ORTOPÉDICO PARA COLOCAÇÃO E OPÇÃO DE NAVEGAÇÃO . <text:s text:c="2"/>Trata-se de uma protese para substituicao do joelho, com componente femural, e componente tibial, <text:s text:c="2"/>polietileno e componente patelar cimentados.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office:value-type="currency" office:value="14000" table:style-name="ce57">
            <text:p>R$ 14.0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68" table:style-name="ce53">
            <text:p>68</text:p>
          </table:table-cell>
          <table:table-cell office:value-type="string" table:style-name="ce54">
            <text:p>BR3157928</text:p>
          </table:table-cell>
          <table:table-cell office:value-type="string" table:style-name="ce55">
            <text:p>370203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PRÓTESE TOTAL PARA JOELHO CIMENTADA. COM PRESERVAÇÃO DO LIGAMENTO CRUZADO <text:s/>COM O CIMENTO <text:s text:c="2"/>ORTOPÉDICO COM ANTIBIÓTICO PARA COLOCAÇÃO TRATA-SE <text:s/>DE UMA <text:s/>PROTESE <text:s/>PARA SUBSTITUICAO DO <text:s/>JOELHO, COM COMPONENTE FEMURAL, E COMPONENTE TIBIAL, CIMENTADOS COM CIMENTO COM ANTIBIOTICO<text:s text:c="4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14000" table:style-name="ce57">
            <text:p>R$ 14.0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69" table:style-name="ce53">
            <text:p>69</text:p>
          </table:table-cell>
          <table:table-cell office:value-type="string" table:style-name="ce54">
            <text:p>BR3170913</text:p>
          </table:table-cell>
          <table:table-cell office:value-type="string" table:style-name="ce55">
            <text:p>370203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PRÓTESE TOTAL PARA JOELHO CIMENTADA COM OU SEM PRESERVAÇÃO DO LIGAMENTO CRUZADO, <text:s text:c="2"/>POLIETILENO ULTRA CONGRUENTE, COM O CIMENTO ORTOPÉDICO PARA COLOCAÇÃO E OPÇÃO DE NAVEGAÇÃO <text:s/>Trata-se de uma protese para substituicao do joelho, com componente femural, e componente tibial, polietileno e <text:s text:c="2"/>componente patelar cimentados.</text:p>
          </table:table-cell>
          <table:table-cell office:value-type="string" table:style-name="ce55">
            <text:p>UNIDADE</text:p>
          </table:table-cell>
          <table:table-cell office:value-type="float" office:value="9" table:style-name="ce53">
            <text:p>9</text:p>
          </table:table-cell>
          <table:table-cell office:value-type="float" office:value="50" table:style-name="ce55">
            <text:p>50</text:p>
          </table:table-cell>
          <table:table-cell office:value-type="currency" office:value="14000" table:style-name="ce57">
            <text:p>R$ 14.0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21">
          <table:table-cell table:style-name="ce50"/>
          <table:table-cell office:value-type="float" office:value="70" table:style-name="ce53">
            <text:p>70</text:p>
          </table:table-cell>
          <table:table-cell office:value-type="string" table:style-name="ce54">
            <text:p>BR3170914</text:p>
          </table:table-cell>
          <table:table-cell office:value-type="string" table:style-name="ce55">
            <text:p>370203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PRÓTESE TOTAL JOELHO PARA REVISÃO com Componente femoral revisão cimentado, em liga de aço, sete tamanhos, <text:s text:c="2"/>lados direito/esquerdo (1 a <text:s/>7), com offset anteroposterior de 4mm, Componente base tibial de revisão <text:s/>com offset, cimentado, <text:s text:c="2"/>seis tamanhos (0 - 5), Componente polietileno para revisão , tamanhos 10mm a 32mm, Porca para haste extensão femoral <text:s text:c="2"/>todos os tamanhos (neutro), Haste de extensão femoral revisão 6°, cimentada, Haste tibial com offset, cimentada, <text:s text:c="2"/>tamanhos 11 a 20mm, Cunha femoral posterior, tamanhos 5, 10 e 15 mm, Cunha femoral distal, tamanhos 5, 10 e 15mm, <text:s text:c="2"/>Cunha tibial de revisão tamanhos 5mm,10mm e 15mm, com Cimento ortopédico com antibiótico eritomicina e colistina, <text:s text:c="2"/>componente líquido 20ml (metacrilato de metilo, n.n-dimetil-para-toluidina e hidroquinona) e 20g de pó (metacrilato de metilo. <text:s text:c="2"/>Copolímero de estireno, metacrilato de polimetilo, sulfato de bário, eritromicina e sulfometato sódico de colistina) <text:s text:c="2"/>e Kit de irrigação para lavagem e opção de naveg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69000" table:style-name="ce57">
            <text:p>R$ 69.0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71" table:style-name="ce53">
            <text:p>71</text:p>
          </table:table-cell>
          <table:table-cell office:value-type="string" table:style-name="ce54">
            <text:p>BR3182230</text:p>
          </table:table-cell>
          <table:table-cell office:value-type="string" table:style-name="ce55">
            <text:p>449744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SISTEMA DE NAVEGAÇÃO ORTOPÉDICA, COMPOSTO PO SENSOR TERMINAL PARA NAVEGADOR <text:s text:c="3"/>PARA CIRURGIAS DE RECONSTRUÇÃO LIGAMENTAR, ARTROPLASTIA DE JOELHO E QUADRIL E OSTEOTOMIA DE <text:s text:c="2"/>TÍBIA.TRATA-SE <text:s/>DE MATERIAL DESCARTAVEL, QUE E USADO <text:s/>NOS LOCAIS <text:s/>DAS <text:s/>CIRURGIAS <text:s/>QUE SAO FEITAS <text:s text:c="3"/>POR NAVEGACAO.RECEBEM INFORMACOES <text:s/>E TRSNMITEM <text:s/>DADOS <text:s/>D ANGULOS <text:s/>E MOVIEMNTOS <text:s/>ATRAVES <text:s/>DE <text:s/>RAIOS INFRAVERMELHOS."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6" table:style-name="ce55">
            <text:p>56</text:p>
          </table:table-cell>
          <table:table-cell office:value-type="currency" office:value="600" table:style-name="ce57">
            <text:p>R$ 6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72" table:style-name="ce53">
            <text:p>72</text:p>
          </table:table-cell>
          <table:table-cell office:value-type="string" table:style-name="ce54">
            <text:p>BR3182866</text:p>
          </table:table-cell>
          <table:table-cell office:value-type="float" office:value="464182" table:style-name="ce55">
            <text:p>464182</text:p>
          </table:table-cell>
          <table:table-cell office:value-type="string" table:style-name="ce61">
            <text:p>GRUPO 5</text:p>
          </table:table-cell>
          <table:table-cell office:value-type="string" table:style-name="ce56">
            <text:p>Sistema de Navegação Ortopédica, composto por sensor terminal para navegador <text:s/>para cirurgias de reconstrução ligamentar, <text:s text:c="2"/>artroplastia de joelho e quadril e osteotomia de tíbia. Trata-se <text:s/>de material descartavel, que e usado <text:s/>nos locais <text:s/>das <text:s/>cirurgias <text:s text:c="3"/>que são feitas <text:s/>por navegação. Recebem informações <text:s/>e transmitem <text:s/>dados <text:s/>de ângulos <text:s/>e moviemntos <text:s/>através <text:s/>de raios <text:s text:c="2"/>infravermelhos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6" table:style-name="ce55">
            <text:p>56</text:p>
          </table:table-cell>
          <table:table-cell office:value-type="currency" office:value="600" table:style-name="ce57">
            <text:p>R$ 600,00</text:p>
          </table:table-cell>
          <table:table-cell office:value-type="string" table:style-name="ce58">
            <text:p>DMO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73" table:style-name="ce53">
            <text:p>73</text:p>
          </table:table-cell>
          <table:table-cell office:value-type="string" table:style-name="ce54">
            <text:p>BR3335669</text:p>
          </table:table-cell>
          <table:table-cell office:value-type="float" office:value="460989" table:style-name="ce55">
            <text:p>460989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KIT DE IRRIGAÇÃO PARA LAVAGEM PULSÁTIL COM DUAS OPÇÕES DE VELOCIDADE, <text:s/>OU DE MELHOR QUALIDADE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240" table:style-name="ce55">
            <text:p>24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74" table:style-name="ce53">
            <text:p>74</text:p>
          </table:table-cell>
          <table:table-cell office:value-type="float" office:value="190035747" table:style-name="ce54">
            <text:p>190035747</text:p>
          </table:table-cell>
          <table:table-cell office:value-type="float" office:value="439240" table:style-name="ce55">
            <text:p>439240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CABO TRANÇADO COM SISTEMA DE TRAVAMENTO E TENSIONAMENTO CABO TRANÇADO COM SISTEMA DE TRAVAMENTO E TENSIONAMENTO- Cabo em vittalium, aplicação p/cerclagem de fraturas peri-protéticas, tamanho 1,6mm<text:s text:c="2"/>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60" table:style-name="ce55">
            <text:p>6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75" table:style-name="ce53">
            <text:p>75</text:p>
          </table:table-cell>
          <table:table-cell office:value-type="string" table:style-name="ce54">
            <text:p>BR3155190</text:p>
          </table:table-cell>
          <table:table-cell office:value-type="string" table:style-name="ce55">
            <text:p>296939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CIMENTO CIRÚRGICO, composição pó (49g polimecrilato metila+2,5 sulfato bário), apresentação líquido ( metacrilato metila) <text:s text:c="2"/>ampola grau cirúrgico, palicação autopolimerizável, para reconstrução óssea, componente com tobramicina.<text:s text:c="2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76" table:style-name="ce53">
            <text:p>76</text:p>
          </table:table-cell>
          <table:table-cell office:value-type="string" table:style-name="ce54">
            <text:p>BR3162019</text:p>
          </table:table-cell>
          <table:table-cell office:value-type="string" table:style-name="ce55">
            <text:p>428675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PRÓTESE NÃO CONVENCIONAL PARA REVISÃO DE PRÓTESE TOTAL DO QUADRIL COM O CI MENTO ORTOPÉDICO <text:s text:c="2"/>COM ANTIBIÓTICO PARA COLOCAÇÃO<text:s text:c="3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table:number-columns-repeated="2" table:style-name="ce58"/>
          <table:table-cell table:number-columns-repeated="16373"/>
        </table:table-row>
        <table:table-row table:style-name="ro21">
          <table:table-cell table:style-name="ce50"/>
          <table:table-cell office:value-type="float" office:value="77" table:style-name="ce53">
            <text:p>77</text:p>
          </table:table-cell>
          <table:table-cell office:value-type="string" table:style-name="ce54">
            <text:p>BR3162020</text:p>
          </table:table-cell>
          <table:table-cell office:value-type="string" table:style-name="ce55">
            <text:p>428675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Haste femoral não cimentada com revestimento poroso, com efeito osteocondutor de titânio puro. Offset médio de 41 a 50. <text:s text:c="2"/>Tamanhos variados, mínimo de 8, Componente acetabular não cimentado, revestimento microporoso de puro titânio, <text:s/>osteocondutor aplicado a vácuo, 50% de porosidade média, espessura da parede com possibilidade liner em polietileno <text:s text:c="2"/>com ligações cruzadas (crosslinked) de 36mm com acetábulos de 40mm a 70mm, Liner em polietileno de <text:s text:c="2"/>cadeias cruzadas (croslinked) para componente acetabular não cimentado revestimento microporoso com vitamina E, <text:s text:c="2"/>resistente ao desgaste e oxidação ou cerâmica. <text:s text:c="2"/>Simétrico 22,2mm (40/42/44), 28mm (44/46/48); 32mm (48/50/52/54/56/58/60/62/64/66/68/70), <text:s text:c="2"/>36mm (52/54/56/58/60/62/64/66/68/70), cabeça femoral em cerâmica delta, de óxido de aluminio-zircônia, <text:s text:c="2"/>de alta resistência 12/14, diâmetros 28mm à 36mm e Parafuso para componente acetabular em titânio 6,5mm de diâmetro <text:s text:c="2"/>de rosca e comprimento de 16mm a 68mm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table:number-columns-repeated="2" table:style-name="ce58"/>
          <table:table-cell table:number-columns-repeated="16373"/>
        </table:table-row>
        <table:table-row table:style-name="ro19">
          <table:table-cell table:style-name="ce50"/>
          <table:table-cell office:value-type="float" office:value="78" table:style-name="ce53">
            <text:p>78</text:p>
          </table:table-cell>
          <table:table-cell office:value-type="string" table:style-name="ce54">
            <text:p>BR3162026</text:p>
          </table:table-cell>
          <table:table-cell office:value-type="string" table:style-name="ce55">
            <text:p>435679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Sistema de reconstrução acetabular em titânio, 48 à 64, para cirurgias de grande perda óssea, incluindo parafusos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8" table:style-name="ce55">
            <text:p>28</text:p>
          </table:table-cell>
          <table:table-cell table:number-columns-repeated="2" table:style-name="ce58"/>
          <table:table-cell table:number-columns-repeated="16373"/>
        </table:table-row>
        <table:table-row table:style-name="ro18">
          <table:table-cell table:style-name="ce50"/>
          <table:table-cell office:value-type="float" office:value="79" table:style-name="ce53">
            <text:p>79</text:p>
          </table:table-cell>
          <table:table-cell office:value-type="string" table:style-name="ce54">
            <text:p>BR3162027</text:p>
          </table:table-cell>
          <table:table-cell office:value-type="string" table:style-name="ce55">
            <text:p>286637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Sistema de reconstrução acetabular em titânio puro, utilizado como componente parcial de uma prótese coxofemoral <text:s text:c="2"/>para o tratamento do acetábulo, para casos de doenças graves na articulação do quadril que não possam ser tratadas <text:s text:c="2"/>por outras terapias conservadoras ou outros tratamentos cirúrgicos, tais como: artrose degenerativa, artrite reumatóide, <text:s text:c="2"/>fraturas das articulações, necrose da cabeça do fêmur, artroplastia da articulação coxofemoral mal sucedida na área do <text:s text:c="2"/>acetábulo, Fraturas periproteticas e subproteticas, tratamento de grandes defeitos ósseos. Diâmetros 52, 58 e 64mm, <text:s text:c="2"/>direção direita e esquerda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8" table:style-name="ce55">
            <text:p>28</text:p>
          </table:table-cell>
          <table:table-cell table:number-columns-repeated="2" table:style-name="ce58"/>
          <table:table-cell table:number-columns-repeated="16373"/>
        </table:table-row>
        <table:table-row table:style-name="ro11">
          <table:table-cell table:style-name="ce50"/>
          <table:table-cell office:value-type="float" office:value="80" table:style-name="ce53">
            <text:p>80</text:p>
          </table:table-cell>
          <table:table-cell office:value-type="string" table:style-name="ce54">
            <text:p>BR3162018</text:p>
          </table:table-cell>
          <table:table-cell office:value-type="string" table:style-name="ce55">
            <text:p>428675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Acetábulo bipolar, cone 12/14, diametro externo de 39mm a 55mm, diâmetro interno de 22,2mm à 28mm, <text:s text:c="2"/>Haste femoral cimentada, sem colar, dupla ou triplamente cônica, tamanhos 6 a 14mm, <text:s text:c="2"/>Cabeça femoral em liga cromo-cobalto-molibdênio, cone 12/14, diâmetros de 22,2mm a 36mm, <text:s text:c="2"/>Centralizador distal de haste cimentada em polimetilmetacrilato, diâmetros 8mm a 16mm, <text:s text:c="2"/>Restritor (plug ) intramedular absorvível para haste cimentada, tamanhos 8mm a 18mm, <text:s text:c="2"/>com cimento ortopédico para colocação.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8" table:style-name="ce55">
            <text:p>48</text:p>
          </table:table-cell>
          <table:table-cell table:number-columns-repeated="2" table:style-name="ce58"/>
          <table:table-cell table:number-columns-repeated="16373"/>
        </table:table-row>
        <table:table-row table:style-name="ro22">
          <table:table-cell table:style-name="ce50"/>
          <table:table-cell office:value-type="float" office:value="81" table:style-name="ce53">
            <text:p>81</text:p>
          </table:table-cell>
          <table:table-cell office:value-type="string" table:style-name="ce54">
            <text:p>BR3157925</text:p>
          </table:table-cell>
          <table:table-cell office:value-type="string" table:style-name="ce55">
            <text:p>424996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Haste femoral não cimentada com revestimento poroso, com efeito osteocondutor de titânio puro. <text:s text:c="2"/>Offset médio de 41 a 50. Tamanhos variados, mínimo de 8, Componente acetabular não cimentado, <text:s text:c="2"/>revestimento microporoso de puro titânio, osteocondutor aplicado a vácuo, 50% de porosidade média, <text:s text:c="2"/>espessura da parede com possibilidade liner em polietileno com ligações cruzadas (crosslinked) de 36mm com acetábulos de <text:s text:c="2"/>40mm a 70mm, Liner em polietileno de cadeias cruzadas (croslinked) para componente acetabular não cimentado <text:s text:c="2"/>revestimento microporoso com vitamina E, resistente ao desgaste e oxidação. <text:s text:c="2"/>Simétrico 22,2mm (40/42/44), 28mm (44/46/48); 32mm (48/50/52/54/56/58/60/62/64/66/68/70), <text:s text:c="2"/>36mm (52/54/56/58/60/62/64/66/68/70), Cabeça femoral em liga cromo-cobalto-molibdênio, cone 12/14, <text:s text:c="2"/>diâmetros de 22,2mm a 36mm e Parafuso para componente acetabular em titânio 6,5mm de diâmetro de rosca e <text:s text:c="2"/>comprimento de 16mm a 68mm.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table:number-columns-repeated="2" table:style-name="ce58"/>
          <table:table-cell table:number-columns-repeated="16373"/>
        </table:table-row>
        <table:table-row table:style-name="ro12">
          <table:table-cell table:style-name="ce50"/>
          <table:table-cell office:value-type="float" office:value="82" table:style-name="ce53">
            <text:p>82</text:p>
          </table:table-cell>
          <table:table-cell office:value-type="string" table:style-name="ce54">
            <text:p>BR3157926</text:p>
          </table:table-cell>
          <table:table-cell office:value-type="string" table:style-name="ce55">
            <text:p>428675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Acetábulo cimentado, Haste femoral cimentada, sem colar, dupla ou triplamente cônica, tamanhos 6 a 14mm, <text:s text:c="2"/>Centralizador distal de haste cimentada em polimetilmetacrilato, diâmetros 8mm a 16mm, Restritor (plug ) <text:s text:c="2"/>intramedular absorvível para haste cimentada, tamanhos 8mm a 18mm, Cabeça femoral em liga cromo-cobalto-molibdênio, <text:s text:c="2"/>cone 12/14, diâmetros de 22,2mm a 36mm, com cimento ortopédico para colocaçã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200" table:style-name="ce55">
            <text:p>20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83" table:style-name="ce53">
            <text:p>83</text:p>
          </table:table-cell>
          <table:table-cell office:value-type="string" table:style-name="ce54">
            <text:p>BR3170912</text:p>
          </table:table-cell>
          <table:table-cell office:value-type="string" table:style-name="ce55">
            <text:p>413357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SISTEMA DE CIMENTAÇÃO ÓSSEA, INCLUINDO TUBOS PLÁSTICOS E PONTAS CANULADAS, APLICAÇÃO: <text:s text:c="3"/>PREPARAÇÃO CIMENTO ÓSSEO PARA ARTROPLASTIA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5" table:style-name="ce55">
            <text:p>45</text:p>
          </table:table-cell>
          <table:table-cell table:number-columns-repeated="2" table:style-name="ce58"/>
          <table:table-cell table:number-columns-repeated="16373"/>
        </table:table-row>
        <table:table-row table:style-name="ro11">
          <table:table-cell table:style-name="ce50"/>
          <table:table-cell office:value-type="float" office:value="84" table:style-name="ce53">
            <text:p>84</text:p>
          </table:table-cell>
          <table:table-cell office:value-type="string" table:style-name="ce54">
            <text:p>BR3170916</text:p>
          </table:table-cell>
          <table:table-cell office:value-type="string" table:style-name="ce55">
            <text:p>425022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Acetábulo bipolar, cone 12/14, diametro externo de 39mm a 55mm, diâmetro interno de 22,2mm à 28mm, Haste femoral <text:s text:c="2"/>cimentada polida, sem colar, dupla ou triplamente cônica, tamanhos 8 a 16mm, Centralizador distal de haste cimentada <text:s text:c="2"/>polida em polimetilmetacrilato, diâmetros 8mm a 16mm, Restritor (plug ) intramedular absorvível para haste cimentada polida, <text:s text:c="2"/>tamanhos 8mm a 18mm, Cabeça femoral em liga cromo-cobalto-molibdênio, cone 12/14, diâmetros de 22,2mm a 36mm, <text:s text:c="2"/>com cimento ortopédico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2" table:style-name="ce58"/>
          <table:table-cell table:number-columns-repeated="16373"/>
        </table:table-row>
        <table:table-row table:style-name="ro23">
          <table:table-cell table:style-name="ce50"/>
          <table:table-cell office:value-type="float" office:value="85" table:style-name="ce53">
            <text:p>85</text:p>
          </table:table-cell>
          <table:table-cell office:value-type="string" table:style-name="ce54">
            <text:p>BR3170978</text:p>
          </table:table-cell>
          <table:table-cell office:value-type="string" table:style-name="ce55">
            <text:p>20788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Haste modular em <text:s/>titânio para revisão de quadril, revestimento proximal poroso, osteocondutor de titânio puro. <text:s text:c="2"/>Estabilidade rotacional. Opções de bloqueio distal com guia. Montagem intra ou extraóssea dos componentes do implante. <text:s text:c="2"/>Haste reta diâmetros 12 a 24 nos tamanhos 200 a 320mm. Haste curva diâmetros 12 a 24 nos tamanhos 240mm a 400mm, <text:s text:c="2"/>Componente proximal nos tamanhos de 17, 19 <text:s/>e 21mm, profunidade de 0, +10, e +20mm, Componente acetabular não <text:s text:c="2"/>cimentado, até 7 furos para fixação com parafuros e revestimento microporoso de puro titânio, osteocondutor aplicado a vácuo, <text:s text:c="2"/>50% de porosidade média, espessura da parede com possibilidade liner em polietileno com <text:s text:c="2"/>ligações cruzadas (crosslinked) de 36mm com acetábulos de 40mm a 70mm, Liner em polietileno <text:s text:c="2"/>de cadeias cruzadas (croslinked) para componente acetabular não cimentado revestimento microporoso com vitamina E, <text:s text:c="2"/>resistente ao desgaste e oxidação. Simétrico 22,2mm (40/42/44), 28mm (44/46/48); 32mm (48/50/52/54/56/58/60/62/64/66/68/70), <text:s text:c="2"/>36mm (52/54/56/58/60/62/64/66/68/70), cabeça femoral em cerâmica delta, de óxido de aluminio-zircônia, <text:s text:c="2"/>de alta resistência 12/14, diâmetros 28mm à 36mm e Parafuso para componente acetabular em titânio 6,5mm de diâmetro <text:s text:c="2"/>de rosca e comprimento de 16mm a 68mm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8" table:style-name="ce55">
            <text:p>18</text:p>
          </table:table-cell>
          <table:table-cell table:number-columns-repeated="2" table:style-name="ce58"/>
          <table:table-cell table:number-columns-repeated="16373"/>
        </table:table-row>
        <table:table-row table:style-name="ro24">
          <table:table-cell table:style-name="ce50"/>
          <table:table-cell office:value-type="float" office:value="86" table:style-name="ce53">
            <text:p>86</text:p>
          </table:table-cell>
          <table:table-cell office:value-type="string" table:style-name="ce54">
            <text:p>BR3170980</text:p>
          </table:table-cell>
          <table:table-cell office:value-type="string" table:style-name="ce55">
            <text:p>20788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Haste femoral cimentada polida, sem colar, dupla ou triplamente cônica, tamanhos 8 a 16mm, Centralizador distal de haste <text:s text:c="2"/>cimentada polida em polimetilmetacrilato, diâmetros 8mm a 16mm, Restritor (plug ) intramedular absorvível para haste cimentada <text:s text:c="2"/>polida, tamanhos 8mm a 18mm, Componente acetabular não cimentado, revestimento microporoso de puro titânio, <text:s text:c="2"/>osteocondutor aplicado a vácuo, 50% de porosidade média, espessura da parede com possibilidade liner em polietileno <text:s text:c="2"/>com ligações cruzadas (crosslinked) de 36mm com acetábulos de 40mm a 70mm, Liner em polietileno de cadeias cruzadas <text:s text:c="2"/>(croslinked) para componente acetabular não cimentado revestimento microporoso com vitamina E, <text:s text:c="2"/>resistente ao desgaste e oxidação. Simétrico 22,2mm (40/42/44), 28mm (44/46/48); <text:s text:c="2"/>32mm (48/50/52/54/56/58/60/62/64/66/68/70), 36mm (52/54/56/58/60/62/64/66/68/70), <text:s text:c="3"/>Cabeça femoral em liga cromo-cobalto-molibdênio, cone 12/14, diâmetros de 22,2mm a 36mm <text:s text:c="2"/>e Parafuso para componente acetabular em titânio 6,5mm de diâmetro de rosca e comprimento de 16mm a 68mm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87" table:style-name="ce53">
            <text:p>87</text:p>
          </table:table-cell>
          <table:table-cell office:value-type="float" office:value="190034302" table:style-name="ce54">
            <text:p>190034302</text:p>
          </table:table-cell>
          <table:table-cell office:value-type="float" office:value="437349" table:style-name="ce55">
            <text:p>437349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ANILHA PARA CABOS <text:s/>- Braçadeira, material vittalium, tamanho mini, aplicação p/uso <text:s text:c="2"/>de cabos posição vertical em fixação, características adicionais de fraturas peri-protéticas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60" table:style-name="ce55">
            <text:p>60</text:p>
          </table:table-cell>
          <table:table-cell table:number-columns-repeated="2" table:style-name="ce58"/>
          <table:table-cell table:number-columns-repeated="16373"/>
        </table:table-row>
        <table:table-row table:style-name="ro11">
          <table:table-cell table:style-name="ce50"/>
          <table:table-cell office:value-type="float" office:value="88" table:style-name="ce53">
            <text:p>88</text:p>
          </table:table-cell>
          <table:table-cell office:value-type="float" office:value="190050923" table:style-name="ce54">
            <text:p>190050923</text:p>
          </table:table-cell>
          <table:table-cell office:value-type="string" table:style-name="ce55">
            <text:p>396061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<text:s/>CIMENTO ORTOPEDICO RADIOPACO, POLIMERIZAVEL, A BASE DE COMPOSTOS ACRILICOS CONSTITUIDO <text:s text:c="2"/>POR UM COMPONENTE LÍQUIDO DE MONOMERO METIL MATACRILATO (METIL MATACRILATO-MMA) E UM <text:s text:c="2"/>COMPONENTE EM PÓ DE POLIMERO DE METIL METACRILATO (POLI METIL MATACRILATO-PMMA) E SULFATO <text:s text:c="2"/>DE BARIO (BaSO4), COMPONESTES ATIVOS ATIVOS DE POLIMERIZACAO. UNICA EMBALAGEM, ESTERIL, <text:s text:c="2"/>NÃO RE-ESTERILIZAVEL E DE USO UNICO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table:number-columns-repeated="2" table:style-name="ce58"/>
          <table:table-cell table:number-columns-repeated="16373"/>
        </table:table-row>
        <table:table-row table:style-name="ro19">
          <table:table-cell table:style-name="ce50"/>
          <table:table-cell office:value-type="float" office:value="89" table:style-name="ce53">
            <text:p>89</text:p>
          </table:table-cell>
          <table:table-cell office:value-type="float" office:value="996637857" table:style-name="ce54">
            <text:p>996637857</text:p>
          </table:table-cell>
          <table:table-cell office:value-type="float" office:value="435679" table:style-name="ce55">
            <text:p>435679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PLACA PARA CABO COM 9 FUROS Trata-se <text:s/>dea material, para uso <text:s/>em cirurgias <text:s/>de artroscopias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table:number-columns-repeated="2" table:style-name="ce58"/>
          <table:table-cell table:number-columns-repeated="16373"/>
        </table:table-row>
        <table:table-row table:style-name="ro19">
          <table:table-cell table:style-name="ce50"/>
          <table:table-cell office:value-type="float" office:value="90" table:style-name="ce53">
            <text:p>90</text:p>
          </table:table-cell>
          <table:table-cell office:value-type="float" office:value="14592676" table:style-name="ce54">
            <text:p>14592676</text:p>
          </table:table-cell>
          <table:table-cell office:value-type="float" office:value="433978" table:style-name="ce55">
            <text:p>433978</text:p>
          </table:table-cell>
          <table:table-cell office:value-type="string" table:style-name="ce61">
            <text:p>GRUPO 6</text:p>
          </table:table-cell>
          <table:table-cell office:value-type="string" table:style-name="ce56">
            <text:p>PLACA PARA CABO COM 11 FUROS Trata-se <text:s/>dea material, para uso <text:s/>em cirurgias <text:s/>de artroscopias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table:number-columns-repeated="2" table:style-name="ce58"/>
          <table:table-cell table:number-columns-repeated="16373"/>
        </table:table-row>
        <table:table-row table:style-name="ro18">
          <table:table-cell table:style-name="ce50"/>
          <table:table-cell office:value-type="float" office:value="91" table:style-name="ce53">
            <text:p>91</text:p>
          </table:table-cell>
          <table:table-cell office:value-type="float" office:value="145692919" table:style-name="ce54">
            <text:p>145692919</text:p>
          </table:table-cell>
          <table:table-cell office:value-type="float" office:value="428675" table:style-name="ce55">
            <text:p>428675</text:p>
          </table:table-cell>
          <table:table-cell office:value-type="string" table:style-name="ce61">
            <text:p>GRUPO 7</text:p>
          </table:table-cell>
          <table:table-cell office:value-type="string" table:style-name="ce56">
            <text:p>KIT CONTENDO HASTE UMERAL UNIVERSAL EM TITÂNIO INTERCAMBIÁVEL POROSO PARA FIXAÇÃO BIOLOGICA <text:s text:c="3"/>OU CIMENTADA NOS DIÃMETROS DE 7, 8, 9, 10, 11, 12, 13 E 14MM, <text:s/>E COM 3 OPÇÕES DE COMPRIMENTO, <text:s text:c="2"/>COMPATÍVEL PARA <text:s/>HEMIATROPLASTIA, ARTROPLATIA TOTAL CIMENTADA E ARTROPLASTIA REVERSA DO <text:s text:c="2"/>OMBRO, CABEÇA <text:s/>UMERAL CENTRICA E EXCÊNTRICA COM COLO, PARA ARTROPLASTIA ANATOMICA DE OMBRO <text:s text:c="2"/>COM DIÂMETRO DE 44 A 50 MM <text:s/>E ALTURA DE 16 A 21 MM COMPATÍVEL COM HASTE UMERAL UNIVERSAL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office:value-type="currency" office:value="11160" table:style-name="ce57">
            <text:p>R$ 11.160,00</text:p>
          </table:table-cell>
          <table:table-cell office:value-type="string" table:style-name="ce58">
            <text:p>ATLASMED</text:p>
          </table:table-cell>
          <table:table-cell table:number-columns-repeated="16373"/>
        </table:table-row>
        <table:table-row table:style-name="ro21">
          <table:table-cell table:style-name="ce50"/>
          <table:table-cell office:value-type="float" office:value="92" table:style-name="ce53">
            <text:p>92</text:p>
          </table:table-cell>
          <table:table-cell office:value-type="float" office:value="145692932" table:style-name="ce54">
            <text:p>145692932</text:p>
          </table:table-cell>
          <table:table-cell office:value-type="float" office:value="428675" table:style-name="ce55">
            <text:p>428675</text:p>
          </table:table-cell>
          <table:table-cell office:value-type="string" table:style-name="ce61">
            <text:p>GRUPO 7</text:p>
          </table:table-cell>
          <table:table-cell office:value-type="string" table:style-name="ce56">
            <text:p>KIT CONTENDO HASTE UMERAL UNIVERSAL EM TITÂNIO INTERCAMBIÁVEL POROSO PARA FIXAÇÃO BIOLOGICA <text:s text:c="2"/>OU CIMENTADA NOS DIÃMETROS DE 7, 8, 9, 10, 11, 12, 13 E 14MM, <text:s/>E COM 3 OPÇÕES DE COMPRIMENTO, <text:s text:c="2"/>COMPATÍVEL PARA <text:s/>HEMIATROPLASTIA, ARTROPLATIA TOTAL CIMENTADA E ARTROPLASTIA REVERSA DO <text:s text:c="2"/>OMBRO, CABEÇA <text:s/>UMERAL EXCÊNTRICA COM COLO, PARA ARTROPLASTIA ANATOMICA DE OMBRO COM <text:s text:c="2"/>DIÂMETRO DE 44 A 50 MM <text:s/>E ALTURA DE 16 A 21 MM, CABEÇA UMERAL CÊNTRICA COM COLO, <text:s text:c="2"/>PARA ARTROPLASTIA ANATOMICA DIÂMETRO <text:s/>DE 40 A 54MM E ALTURA DE 15 A 21 MM COMPATÍVEL COM HASTE <text:s text:c="2"/>UMERAL UNIVERSAL, GLENE CIMENTADA <text:s/>EM POLIETILENO DE ALTA DENSIDADE COM PELO MENOS 3 PILARES <text:s text:c="2"/>DE ANCORAGEM E NO MINIMO 3 OPÇÕES DE TAMANHO, COMPATÍVEL COM CABEÇA UMERAL CÊNTRICA E <text:s text:c="2"/>EXCÊNTRICA COM COLO E CIMENTO OSSEO COM VISCOSIDADE PADR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office:value-type="currency" office:value="16000" table:style-name="ce57">
            <text:p>R$ 16.000,00</text:p>
          </table:table-cell>
          <table:table-cell office:value-type="string" table:style-name="ce58">
            <text:p>ATLASMED</text:p>
          </table:table-cell>
          <table:table-cell table:number-columns-repeated="16373"/>
        </table:table-row>
        <table:table-row table:style-name="ro25">
          <table:table-cell table:style-name="ce50"/>
          <table:table-cell office:value-type="float" office:value="93" table:style-name="ce53">
            <text:p>93</text:p>
          </table:table-cell>
          <table:table-cell office:value-type="float" office:value="145692936" table:style-name="ce54">
            <text:p>145692936</text:p>
          </table:table-cell>
          <table:table-cell office:value-type="float" office:value="428675" table:style-name="ce55">
            <text:p>428675</text:p>
          </table:table-cell>
          <table:table-cell office:value-type="string" table:style-name="ce61">
            <text:p>GRUPO 7</text:p>
          </table:table-cell>
          <table:table-cell office:value-type="string" table:style-name="ce56">
            <text:p>KIT CONTENDO HASTE UMERAL UNIVERSAL EM TITÂNIO, INTERCAMBIÁVEL CIMENTADA E NÃO CIMENTADA <text:s text:c="3"/>DIÂMENTRO DE 7, 8, 9, 10, 11, 12, 13 E 14MM, <text:s/>E COM 3 OPÇÕES DE COMPRIMENTO, COMPATÍVEL PARA <text:s text:c="2"/>HEMIARTROPLASTIA, ARTROPLASTIA <text:s/>TOTAL CIMENTADA E NÃO CIMENTADA E ARTROPLASTIA REVERSA <text:s text:c="2"/>DO OMBRO, INSERT UMERAL EM <text:s/>POLIETILENO DE ALTA DENSIDADE COM CAVIDADE PARA EVITAR IMPACTO, <text:s text:c="2"/>COM PELO MENOS 3 OPÇÕES DE TAMANHO, BANDEJA UMERAL COM PELO MENOS 3 OPÇÕES DE ALTURA, <text:s text:c="2"/>COMPATÍVEL COM GLENOSFERA CENTRICA E EXCENTRICA, COM PELO MENOS DUAS OPÇÕES DE TAMANHO, <text:s text:c="2"/>BASE DE GLENE (METAL BACK) EM TITÂNIO POROSO COM FIXAÇÃO COM AO MENOS 4 PARAFUSOS COM E <text:s text:c="2"/>SEM BLOQUEIO, PARA ARTROPLASTIA REVERSA E ANATÔMICA DE OMBR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0" table:style-name="ce55">
            <text:p>50</text:p>
          </table:table-cell>
          <table:table-cell office:value-type="currency" office:value="30880" table:style-name="ce57">
            <text:p>R$ 30.880,00</text:p>
          </table:table-cell>
          <table:table-cell office:value-type="string" table:style-name="ce58">
            <text:p>ATLASMED</text:p>
          </table:table-cell>
          <table:table-cell table:number-columns-repeated="16373"/>
        </table:table-row>
        <table:table-row table:style-name="ro26">
          <table:table-cell table:style-name="ce50"/>
          <table:table-cell office:value-type="float" office:value="94" table:style-name="ce53">
            <text:p>94</text:p>
          </table:table-cell>
          <table:table-cell office:value-type="string" table:style-name="ce54">
            <text:p>BR3335656</text:p>
          </table:table-cell>
          <table:table-cell office:value-type="float" office:value="320151" table:style-name="ce55">
            <text:p>320151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ITEM 94 – SISTEMA DE HASTE UMERAL EM TITÂNIO MULTIBLOQUEIO CANULADA, PARAFUSOS BLOQUEADOS <text:s/>3,5 DE CALÇAR QUE BLOQUEIAM NO PARAFUSO 4.5 , CORTICAL 4,0 E 4,5 COM FUROS POSSIBILADE <text:s/>DE AMARRIA DA PEQUENA E GRANDE TUBEROSIDADE, CANULADA, PARA FRATURAS PROXIMAIS, <text:s/>DIAFISÁRIAS E OUI ASSOCIADAS, COM SISTEMA DE DINAMIZAÇÃO DE ATÉ 7 CM INTRA-OPERATÓRIO. <text:s/>TAMANHOS DE 7, 8,5 E 9,5MM DE DIÂMETRO E COMPRIMENTO DE 160MM A 315MM, FIXAÇÃO E <text:s/>ESTABILIZAÇÃO, PARAFUSO DE FECHAMENTO DE 0, 2 , 5, 10 E 15MM, PARAFUSOS BLOQUEIO 3,5 / 4,0 / <text:s/>4,5MM COM INSTRUMENTAL, BROCAS , FIOS GUIAS PARA COLOCAÇÃO DE SISTEMA DE FRESAGEM OU <text:s/>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4" table:style-name="ce55">
            <text:p>24</text:p>
          </table:table-cell>
          <table:table-cell office:value-type="currency" office:value="16700" table:style-name="ce57">
            <text:p>R$ 16.7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95" table:style-name="ce53">
            <text:p>95</text:p>
          </table:table-cell>
          <table:table-cell office:value-type="string" table:style-name="ce54">
            <text:p>BR3335668</text:p>
          </table:table-cell>
          <table:table-cell office:value-type="float" office:value="290811" table:style-name="ce55">
            <text:p>290811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SISTEMA DE HASTE HUMERAL EM TITANIO CANULADA, PARA FRATURAS PROXIMAIS, <text:s/>DIAFISARIAS E OU ASSOCIADAS, COM SISTEMA DE DINAMIZAÇÃO. TAMANHO DE <text:s text:c="2"/>7, 9 E 11MM DE DIAMETRO, COMPRIMENTO DE 190 MM E 320 MM, POSSIBILIDADE DE <text:s/>FIXAÇÃO E ESTABILIZAÇÃO ATRAVES DE LAMINA ESPIRAL TAMANHO DE 34MM A <text:s/>54MM, PARAFUSO DE FECHAMENTO DE 0MM A 15MM, PARAFUSOS DE BLOQUEIO 4,0MM <text:s/>COM INSTRUMENTAL PARA COLOCAÇÃ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4" table:style-name="ce55">
            <text:p>24</text:p>
          </table:table-cell>
          <table:table-cell office:value-type="currency" office:value="11000" table:style-name="ce57">
            <text:p>R$ 11.0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21">
          <table:table-cell table:style-name="ce50"/>
          <table:table-cell office:value-type="float" office:value="96" table:style-name="ce53">
            <text:p>96</text:p>
          </table:table-cell>
          <table:table-cell office:value-type="float" office:value="190050418" table:style-name="ce54">
            <text:p>190050418</text:p>
          </table:table-cell>
          <table:table-cell office:value-type="float" office:value="314755" table:style-name="ce55">
            <text:p>314755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HASTE FEMURAL TIPO TFN LONGA EM TITÂNIO COM DIÂMETRO PROXIMAL 235MM, ANGULAÇÃO ANATÔMICA DE <text:s text:c="2"/>6 GRAUS, DIÂMETRO DISTAL DE 10/11 E 12MM, LÂMINA ESPIRA 80 A 120MM COM POSSIBILIDADE DE <text:s text:c="2"/>ENXERTIA OSSEA , PARAFUSO TAMPÃO 0 A 10MM, PARAFUSO DE BLOQUEIO 5.0MM COM <text:s text:c="2"/>TAMANHO DE 26MM A 100MM, MECANISMOS PRE-MONTADO COM BLOQUEIO ANTIROTATORIO DA <text:s text:c="2"/>MÂMINA ESPIRAL INTER OPERATORIO, BLOQUEIO ESTÁTICO E DESENHO ANATOMICO PARA ESQUERDO E <text:s text:c="2"/>DIREITO - CAIXA CONTENDO INSTRUMENTAIS PARA COLOCAÇÃO DA HASTE TFN CURTO E LONGO , <text:s text:c="2"/>MEDIDOR DE CANAL E DA HASTE, GUIAS DE BROCAS, PROTETORES DE PAREDES MOLES, MANDRIL EM T, <text:s text:c="2"/>BROCA CANULADA CALIBRADA, CHAVE <text:s/>STARDRIVE, MARTELO DESLIZANTE, GUIA DE INTRODUÇÃO DA HASTE <text:s text:c="2"/>COM BRAÇO DIRECIONAL DE 125, 130 E 135, FRESA CANULADA, IMAPACTOR PARA LAMINA ESPIRAL E SISTEMA <text:s text:c="2"/>DE COMPRESSÃO INTERFRAGMENTARIA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17500" table:style-name="ce57">
            <text:p>R$ 17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97" table:style-name="ce53">
            <text:p>97</text:p>
          </table:table-cell>
          <table:table-cell office:value-type="float" office:value="190050480" table:style-name="ce54">
            <text:p>190050480</text:p>
          </table:table-cell>
          <table:table-cell office:value-type="float" office:value="438050" table:style-name="ce55">
            <text:p>438050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HASTE INTRAMEDULAR LFN LONGA 9/10/11 E 12MM, COMPRIMIDO DE 300 A 480MM, PARAFUSO DE BLOQUEIO <text:s text:c="2"/>5.0 E 6.0, PARAFUSO 6.5MM RECONSTRUÇÃO DE COLO FEMURAL E PARAFUSO TAMPÃO DE 0 A 20MM. HASTE <text:s text:c="2"/>COM ENTRADA EXCLUSIVA LATERAL DE 10 GRAUS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13500" table:style-name="ce57">
            <text:p>R$ 13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98" table:style-name="ce53">
            <text:p>98</text:p>
          </table:table-cell>
          <table:table-cell office:value-type="float" office:value="190050506" table:style-name="ce54">
            <text:p>190050506</text:p>
          </table:table-cell>
          <table:table-cell office:value-type="float" office:value="438050" table:style-name="ce55">
            <text:p>438050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HASTE INTRAMEDULAR PARA ARTRODESE DA PARTE POSTERIOR DO PE, EM TITÂNIO COM TAMANHO <text:s text:c="2"/>DE 10-11-12MM DE EXPESSURA E 150-180 E 240MM DE COMPRIMENTO, PARAFUSOS DE BLOQUEIO 5.0 E 6.0 <text:s text:c="2"/>TAMANHOS DE 26 A 100MM ADIADIONADA LAMINA SPIRAL COM TAMANHOS DE 45 A 100MM E PARAFUSO DE <text:s text:c="2"/>TAMPONAMENTO. CAIXA CONTENDO INSTRUMENTAIS PARA COLOCAÇÃO DA HASTE CONTENDO GUIA DA HASTE, <text:s text:c="2"/>GUIAS DE BROCAS, CHAVE STARDRIVE, RÉGUA MEDIDOR DE HASTE, BROCA DIAMANTADA, GUIA DE INSERÇÃO <text:s text:c="2"/>PARA TODOS OS BLOQUEIOS, BROCA CALIBRADA, GUIA DE INSERÇÃO LAMINA ESPIRAL, MARTELO DESLIZANTE E <text:s text:c="2"/>DRILL EM T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8" table:style-name="ce55">
            <text:p>8</text:p>
          </table:table-cell>
          <table:table-cell office:value-type="currency" office:value="18000" table:style-name="ce57">
            <text:p>R$ 18.0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99" table:style-name="ce53">
            <text:p>99</text:p>
          </table:table-cell>
          <table:table-cell office:value-type="string" table:style-name="ce54">
            <text:p>BR3309588</text:p>
          </table:table-cell>
          <table:table-cell office:value-type="float" office:value="314755" table:style-name="ce55">
            <text:p>314755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SISTEMA DE HASTE FLEXIVEL EM TITANIO, COM FIXAÇÃO INTRA MEDULAR, TAMANHO 1.5, 2.0, 2.5, 3.0, 3.5 E 4.0. <text:s text:c="2"/>ACOMPANHA TODO OS INSTRUMENTOS DE INSERÇÃO, EXTRAÇÃO, IMPACTAÇÃO E CORTE DA HASTE, <text:s text:c="2"/>NÃO MAGNETIC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0" table:style-name="ce55">
            <text:p>50</text:p>
          </table:table-cell>
          <table:table-cell office:value-type="currency" office:value="1800" table:style-name="ce57">
            <text:p>R$ 1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100" table:style-name="ce53">
            <text:p>100</text:p>
          </table:table-cell>
          <table:table-cell office:value-type="string" table:style-name="ce54">
            <text:p>BR3309592</text:p>
          </table:table-cell>
          <table:table-cell office:value-type="float" office:value="290806" table:style-name="ce55">
            <text:p>290806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SISTEMA DE HASTE FEMURAL EM TITANIO, OPÇÃISTAL E DIAFISARIA DO FEMUR, OPÇÕES DE BLOQUEIO <text:s/>PARAFUSOS <text:s/>26 MM A 120 MM E LAMINA ESPIRAL 45 MM A 100 MM. HASTES EXPESSURAS 9 MM A 15 MM <text:s text:c="2"/>ESPESSURA E 160 MM A 480 MM, PARAFUSO DE FECHAMENTO 0 MM A 20 MM, ACOMPANHADOS DE <text:s text:c="2"/>INTRUMENTAIS COM BROCAS CALIBRADAS, SISTEMA DE DINAMIZAÇÃO INTRA OPERATORIA E GUIAS <text:s text:c="2"/>RADIOTRANSPARENTES, BROCAS CALIBRADAS E FIOS GUIAS PARA INSER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13500" table:style-name="ce57">
            <text:p>R$ 13.5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21">
          <table:table-cell table:style-name="ce50"/>
          <table:table-cell office:value-type="float" office:value="101" table:style-name="ce53">
            <text:p>101</text:p>
          </table:table-cell>
          <table:table-cell office:value-type="string" table:style-name="ce54">
            <text:p>BR3170975</text:p>
          </table:table-cell>
          <table:table-cell office:value-type="string" table:style-name="ce55">
            <text:p>52108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HASTE FEMURAL TIPO TFN CURTO E MINI HASTE EM TITÂNIO COM, ANGULAÇÃO ANATÔMICA DE 6 GRAUS, <text:s text:c="2"/>DIÂMETRO DISTAL DE 10/11 E 12MM, COLOCACAO DE LÂMINA ESPIRAL COM POSSIBILIDADE DE ENXERTIA <text:s/>OSSEA DE <text:s/>80 A 120MM, PARAFUSO TAMPÃO 0 A 10MM, PARAFUSO DE BLOQUEIO 5.0MM COM TAMANHO DE <text:s text:c="2"/>26MM A 100MM, MECANISMOS PRE-MONTADO COM BLOQUEIO ANTIROTATORIO DA LÂMINA ESPIRAL, <text:s text:c="2"/>BLOQUEIO ESTÁTICO E DESENHO ANATOMICO PARA ESQUERDO E DIREITO - CAIXA CONTENDO INSTRUMENTAIS <text:s text:c="2"/>PARA COLOCAÇÃO DA HASTE CURTA E MINI , MEDIDOR DE CANAL E DA HASTE, GUIAS DE BROCAS, PROTETORES <text:s text:c="2"/>DE PAREDES MOLES, MANDRIL EM T, BROCA CANULADA , CHAVE HEXAGONAL E STARDRIVE, MARTELO <text:s text:c="2"/>DESLIZANTE, GUIA DE INTRODUÇÃO DA HASTE <text:s/>COM BRAÇO DIRECIONAL DE 125, 130 E 135, FRESA CANULADA, <text:s text:c="2"/>IMAPACTOR PARA LAMINA ESPIRAL E SISTEMA DE COMPRESSÃO INTERFRAGMENTARIA.<text:s text:c="3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00" table:style-name="ce55">
            <text:p>100</text:p>
          </table:table-cell>
          <table:table-cell office:value-type="currency" office:value="13800" table:style-name="ce57">
            <text:p>R$ 13.8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102" table:style-name="ce53">
            <text:p>102</text:p>
          </table:table-cell>
          <table:table-cell office:value-type="string" table:style-name="ce54">
            <text:p>BR3309775</text:p>
          </table:table-cell>
          <table:table-cell office:value-type="float" office:value="314755" table:style-name="ce55">
            <text:p>314755</text:p>
          </table:table-cell>
          <table:table-cell office:value-type="string" table:style-name="ce61">
            <text:p>GRUPO 8</text:p>
          </table:table-cell>
          <table:table-cell office:value-type="string" table:style-name="ce56">
            <text:p>Sistema de haste umeral em titânio multibloqueio canulada, parafusos bloqueados 3,5 cortical 4,0 e 4,5 com furos <text:s/>possibilade de amarria da pequena e grande tuberosidade, canulada, para fraturas proximais, diafisárias e ou associadas , <text:s text:c="2"/>com sistema de dinamização de até 7cm intraoperatório. Tamanhos de 7,; 8,5 e 9,5 mm de diâmetro e comprimento de <text:s/>160mm a 315mm, <text:s text:c="2"/>fixação e estabilização, parafuso de fechamento de 0; 2; 5; 10 e 15mm, parafusos de bloqueio 3,5 / 4,0 / 4,5 mm com instrumental, brocas, <text:s text:c="2"/>fios guias para colocação de sistema de fresagem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office:value-type="currency" office:value="16700" table:style-name="ce57">
            <text:p>R$ 16.7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21">
          <table:table-cell table:style-name="ce50"/>
          <table:table-cell office:value-type="float" office:value="103" table:style-name="ce53">
            <text:p>103</text:p>
          </table:table-cell>
          <table:table-cell office:value-type="float" office:value="145690199" table:style-name="ce54">
            <text:p>145690199</text:p>
          </table:table-cell>
          <table:table-cell office:value-type="float" office:value="438045" table:style-name="ce55">
            <text:p>438045</text:p>
          </table:table-cell>
          <table:table-cell office:value-type="string" table:style-name="ce61">
            <text:p>GRUPO 8</text:p>
          </table:table-cell>
          <table:table-cell office:value-type="string" table:style-name="ce59">
            <text:p>ITEM 103 – HASTE TIBIAL CANULADA TIPO ETN EM TITÂNIO 8/9/10/11/12 E 13 MM, COMPRIMENTO DE 255 A 465 MM <text:s text:c="2"/>INCREMENTOS DE 15 MM, PARAFUSSO DE BLOQUEIO DE 4.0 E 5.0 MM EM TAN E 5.0 TITANIO DUPLO ROSCA, <text:s text:c="2"/>COM OPÇÕES DE BLOQUEIO PROXIMAL DE 14/20 E 30 MM E BLOQUEIO DISTAIS DE 5/13/22 E 37 MM, <text:s text:c="2"/>COM BLOQUEIOS PROXIMAIS ESTÁTICOS E OBLIQUOS EXCLUSIVAS E INOVADORAS PODENDO COMBINAR <text:s text:c="2"/>COM BLOQUEIO PARAFUSO ESPONJOSO, PARAFUSO DE FECHAMENTO 0/5/10 E 15MM. - <text:s text:c="2"/>CAIXA CONTENDO INSTRUMENTAIS PARA COLOCAÇÃO DA HASTE ETN EM TITÂNIO, CONTENDO GUIAS DE BROCAS, <text:s text:c="2"/>BROCAS COM PONTA DIAMANTADA, MANDRIL EM T, PROTETORES DE PARTES MOLES, GUIA DE INSERÇÃO, <text:s text:c="2"/>MARTELO DESLIZANTE, BRAÇO DIRECIONAL PARA BLOQUEIO PROXIMAL COM MULTIPLAS OPÇÕES DE BLOQUEIO, <text:s text:c="2"/>MEDIDOR DE PROFUNDIDADE, BROCAS CALIBRADAS, GUIA SISTEMA DE DINAMIZAÇÃO DA HASTE ETN.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70" table:style-name="ce55">
            <text:p>70</text:p>
          </table:table-cell>
          <table:table-cell office:value-type="currency" office:value="14100" table:style-name="ce57">
            <text:p>R$ 14.100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104" table:style-name="ce53">
            <text:p>104</text:p>
          </table:table-cell>
          <table:table-cell office:value-type="string" table:style-name="ce54">
            <text:p>BR3157913</text:p>
          </table:table-cell>
          <table:table-cell office:value-type="string" table:style-name="ce55">
            <text:p>423033</text:p>
          </table:table-cell>
          <table:table-cell office:value-type="string" table:style-name="ce61">
            <text:p>GRUPO 9</text:p>
          </table:table-cell>
          <table:table-cell office:value-type="string" table:style-name="ce56">
            <text:p>Haste intramedular fêmur titânio <text:s/>8, 9 e 10mm de diâmetro e comprimento de 240mm a 480mm, Parafuso fixação em titânio <text:s text:c="3"/>diâmetro <text:s/>4,5MM, comprimento 20 à 80MM,Parafuso fixação em titânio <text:s/>diâmetro <text:s/>6,0MM, comprimento 36 à 96MM, <text:s text:c="2"/>Parafuso de cobertura em titâni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table:number-columns-repeated="2" table:style-name="ce58"/>
          <table:table-cell table:number-columns-repeated="16373"/>
        </table:table-row>
        <table:table-row table:style-name="ro17">
          <table:table-cell table:style-name="ce50"/>
          <table:table-cell office:value-type="float" office:value="105" table:style-name="ce53">
            <text:p>105</text:p>
          </table:table-cell>
          <table:table-cell office:value-type="string" table:style-name="ce54">
            <text:p>BR3157915</text:p>
          </table:table-cell>
          <table:table-cell office:value-type="string" table:style-name="ce55">
            <text:p>423033</text:p>
          </table:table-cell>
          <table:table-cell office:value-type="string" table:style-name="ce61">
            <text:p>GRUPO 9</text:p>
          </table:table-cell>
          <table:table-cell office:value-type="string" table:style-name="ce56">
            <text:p>Haste intramedular úmero titânio bloqueada, diâmetros 7 à 10mm, comprimento 180 a 405mm, Parafuso fixação em titânio <text:s text:c="3"/>diâmetro <text:s/>3,5MM, comprimento 18 à 60MM,Parafuso fixação em titânio <text:s/>diâmetro <text:s/>4,5MM, comprimento 22 à 60MM, <text:s text:c="2"/>Parafuso de cobertura em titânio múltiplos bloqueios, 6 X 7 e 6 X 9mm.<text:s text:c="10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table:number-columns-repeated="2" table:style-name="ce58"/>
          <table:table-cell table:number-columns-repeated="16373"/>
        </table:table-row>
        <table:table-row table:style-name="ro13">
          <table:table-cell table:style-name="ce50"/>
          <table:table-cell office:value-type="float" office:value="106" table:style-name="ce53">
            <text:p>106</text:p>
          </table:table-cell>
          <table:table-cell office:value-type="string" table:style-name="ce54">
            <text:p>BR3157916</text:p>
          </table:table-cell>
          <table:table-cell office:value-type="string" table:style-name="ce55">
            <text:p>438050</text:p>
          </table:table-cell>
          <table:table-cell office:value-type="string" table:style-name="ce61">
            <text:p>GRUPO 9</text:p>
          </table:table-cell>
          <table:table-cell office:value-type="string" table:style-name="ce56">
            <text:p>Haste intramedular proximal do fêmur em titânio, direita e esquerda, com ângulo cervicodiafisário variável de 125º,130º e 135º, <text:s text:c="2"/>curta e longa, até 460mm, com dois ou três orifícios distais, Parafuso deslizante, diâmetro 10,5mm, comprimento 70 à 120mm, <text:s text:c="2"/>Parafuso tipo fechamento tubo, Parafuso tipo contrapino, tamanhos 45 à 110mm, Parafuso fixação em titânio diâmetro 4,5mm, <text:s text:c="2"/>comprimento 20 à 80mm.<text:s text:c="5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120" table:style-name="ce55">
            <text:p>120</text:p>
          </table:table-cell>
          <table:table-cell table:number-columns-repeated="2" table:style-name="ce58"/>
          <table:table-cell table:number-columns-repeated="16373"/>
        </table:table-row>
        <table:table-row table:style-name="ro13">
          <table:table-cell table:style-name="ce50"/>
          <table:table-cell office:value-type="float" office:value="107" table:style-name="ce53">
            <text:p>107</text:p>
          </table:table-cell>
          <table:table-cell office:value-type="string" table:style-name="ce54">
            <text:p>BR3157917</text:p>
          </table:table-cell>
          <table:table-cell office:value-type="string" table:style-name="ce55">
            <text:p>438050</text:p>
          </table:table-cell>
          <table:table-cell office:value-type="string" table:style-name="ce61">
            <text:p>GRUPO 9</text:p>
          </table:table-cell>
          <table:table-cell office:value-type="string" table:style-name="ce56">
            <text:p>Haste Intramedular fêmur titânio retrógrada bloqueada, diâmetro 10, 11 e 12mm, comprimento 160mm a 480mm, Parafuso <text:s text:c="2"/>fixação em titânio <text:s/>diâmetro <text:s/>4,5MM, comprimento 20 à 80MM,Parafuso fixação em titânio <text:s/>diâmetro <text:s/>6,0MM, comprimento <text:s text:c="2"/>36 à 116MM, Bucha com rosca autocortante em titânio com diâmetro de 4,5 à 6,5mm, Parafuso de cobertura em titâni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2" table:style-name="ce58"/>
          <table:table-cell table:number-columns-repeated="16373"/>
        </table:table-row>
        <table:table-row table:style-name="ro13">
          <table:table-cell table:style-name="ce50"/>
          <table:table-cell office:value-type="float" office:value="108" table:style-name="ce53">
            <text:p>108</text:p>
          </table:table-cell>
          <table:table-cell office:value-type="string" table:style-name="ce54">
            <text:p>BR3170977</text:p>
          </table:table-cell>
          <table:table-cell office:value-type="string" table:style-name="ce55">
            <text:p>438050</text:p>
          </table:table-cell>
          <table:table-cell office:value-type="string" table:style-name="ce61">
            <text:p>GRUPO 9</text:p>
          </table:table-cell>
          <table:table-cell office:value-type="string" table:style-name="ce56">
            <text:p>Haste intramedular tíbia titânio, múltiplos bloqueios proximais, bloqueada, canulada, diâmetros 8, 9 e 10mm, <text:s text:c="2"/>comprimento 200 a 420mm, Parafuso de compressão interna em titânio com opção de compressão até 9mm, <text:s text:c="2"/>Parafuso bloqueado em titânio 4,5mm e comprimento de 20 À 80MM, Parafuso de fecho em titânio 0mm, 5mm e 10mm.<text:s text:c="2"/></text:p>
          </table:table-cell>
          <table:table-cell office:value-type="string" table:style-name="ce55">
            <text:p>UNIDADE</text:p>
          </table:table-cell>
          <table:table-cell office:value-type="float" office:value="4" table:style-name="ce53">
            <text:p>4</text:p>
          </table:table-cell>
          <table:table-cell office:value-type="float" office:value="70" table:style-name="ce55">
            <text:p>7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109" table:style-name="ce53">
            <text:p>109</text:p>
          </table:table-cell>
          <table:table-cell office:value-type="string" table:style-name="ce54">
            <text:p>BR3157920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0</text:p>
          </table:table-cell>
          <table:table-cell office:value-type="string" table:style-name="ce56">
            <text:p>FIXADOR EXTERNO, TIPO DINÂMICO, APLICAÇÃO P/ TÍBIA <text:s/>E FÊMUR, CARACTERÍSTICAS ADICIONAIS <text:s text:c="2"/>PINA DE SCHANZ 4,5 A 6,5 MM,BARRA (TUBO-TUBO)400MM, COMPONENTES C/CONEXÃO BARRA-BARRA, <text:s/>BARRA-PIN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1150" table:style-name="ce57">
            <text:p>R$ 1.150,00</text:p>
          </table:table-cell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110" table:style-name="ce53">
            <text:p>110</text:p>
          </table:table-cell>
          <table:table-cell office:value-type="float" office:value="190033998" table:style-name="ce54">
            <text:p>190033998</text:p>
          </table:table-cell>
          <table:table-cell office:value-type="float" office:value="420943" table:style-name="ce55">
            <text:p>420943</text:p>
          </table:table-cell>
          <table:table-cell office:value-type="string" table:style-name="ce61">
            <text:p>GRUPO 10</text:p>
          </table:table-cell>
          <table:table-cell office:value-type="string" table:style-name="ce56">
            <text:p>FIXADOR EXTERNO, MATERIAL ALUMÍNIO, TIPO USO DESCARTÁVEL, ESTERILIDADE ESTÉRIL, <text:s text:c="3"/>APLICAÇÃO P/ FALANG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8" table:style-name="ce55">
            <text:p>18</text:p>
          </table:table-cell>
          <table:table-cell office:value-type="currency" office:value="890" table:style-name="ce57">
            <text:p>R$ 890,00</text:p>
          </table:table-cell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111" table:style-name="ce53">
            <text:p>111</text:p>
          </table:table-cell>
          <table:table-cell office:value-type="float" office:value="190034331" table:style-name="ce54">
            <text:p>190034331</text:p>
          </table:table-cell>
          <table:table-cell office:value-type="float" office:value="411347" table:style-name="ce55">
            <text:p>411347</text:p>
          </table:table-cell>
          <table:table-cell office:value-type="string" table:style-name="ce61">
            <text:p>GRUPO 10</text:p>
          </table:table-cell>
          <table:table-cell office:value-type="string" table:style-name="ce56">
            <text:p>FIXADOR EXTERNO, MATERIAL ALUMÍNIO, TIPO USO DESCARTÁVEL, ESTERILIDADE ESTÉRIL, <text:s text:c="2"/>APLICAÇÃO P/ FÊMUR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0" table:style-name="ce55">
            <text:p>40</text:p>
          </table:table-cell>
          <table:table-cell office:value-type="currency" office:value="700" table:style-name="ce57">
            <text:p>R$ 700,00</text:p>
          </table:table-cell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112" table:style-name="ce53">
            <text:p>112</text:p>
          </table:table-cell>
          <table:table-cell office:value-type="float" office:value="190034333" table:style-name="ce54">
            <text:p>190034333</text:p>
          </table:table-cell>
          <table:table-cell office:value-type="float" office:value="364504" table:style-name="ce55">
            <text:p>364504</text:p>
          </table:table-cell>
          <table:table-cell office:value-type="string" table:style-name="ce61">
            <text:p>GRUPO 10</text:p>
          </table:table-cell>
          <table:table-cell office:value-type="string" table:style-name="ce56">
            <text:p>FIXADOR EXTERNO, MATERIAL ALUMÍNIO, TIPO USO DESCARTÁVEL, ESTERILIDADE ESTÉRIL, <text:s text:c="3"/>APLICAÇÃO P/ RÁDIO E PUNHO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8" table:style-name="ce55">
            <text:p>18</text:p>
          </table:table-cell>
          <table:table-cell office:value-type="currency" office:value="700" table:style-name="ce57">
            <text:p>R$ 700,00</text:p>
          </table:table-cell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113" table:style-name="ce53">
            <text:p>113</text:p>
          </table:table-cell>
          <table:table-cell office:value-type="float" office:value="190034334" table:style-name="ce54">
            <text:p>190034334</text:p>
          </table:table-cell>
          <table:table-cell office:value-type="string" table:style-name="ce55">
            <text:p>443299</text:p>
          </table:table-cell>
          <table:table-cell office:value-type="string" table:style-name="ce61">
            <text:p>GRUPO 10</text:p>
          </table:table-cell>
          <table:table-cell office:value-type="string" table:style-name="ce56">
            <text:p>FIXADOR EXTERNO, MATERIAL ALUMÍNIO, TIPO USO DESCARTÁVEL, ESTERILIDADE ESTÉRIL, <text:s text:c="2"/>APLICAÇÃO P/ TÍBIA E ÚMER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office:value-type="currency" office:value="700" table:style-name="ce57">
            <text:p>R$ 700,00</text:p>
          </table:table-cell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114" table:style-name="ce53">
            <text:p>114</text:p>
          </table:table-cell>
          <table:table-cell office:value-type="string" table:style-name="ce54">
            <text:p>BR3155217</text:p>
          </table:table-cell>
          <table:table-cell office:value-type="string" table:style-name="ce55">
            <text:p>451879</text:p>
          </table:table-cell>
          <table:table-cell office:value-type="string" table:style-name="ce61">
            <text:p>GRUPO 11</text:p>
          </table:table-cell>
          <table:table-cell office:value-type="string" table:style-name="ce56">
            <text:p>ESPAÇADOR DE TENDÃO, MATERIAL SILICONE RADIOPACO, FORMATO TUBULAR CILÍNDRICO, DIÂMETRO* CERCA <text:s text:c="2"/>DE 3, TIPO USO* ESTÉRIL, USO ÚNICO, APRESENTAÇÃO EMBALAGEM INDIVIDUAL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115" table:style-name="ce53">
            <text:p>115</text:p>
          </table:table-cell>
          <table:table-cell office:value-type="string" table:style-name="ce54">
            <text:p>BR3155219</text:p>
          </table:table-cell>
          <table:table-cell office:value-type="string" table:style-name="ce55">
            <text:p>451879</text:p>
          </table:table-cell>
          <table:table-cell office:value-type="string" table:style-name="ce61">
            <text:p>GRUPO 11</text:p>
          </table:table-cell>
          <table:table-cell office:value-type="string" table:style-name="ce56">
            <text:p>ESPAÇADOR DE TENDÃO, MATERIAL SILICONE RADIOPACO, FORMATO TUBULAR CILÍNDRICO, DIÂMETRO* CERCA <text:s text:c="2"/>DE 5, TIPO USO* ESTÉRIL, USO ÚNICO, APRESENTAÇÃO EMBALAGEM INDIVIDUAL<text:s text:c="4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2" table:style-name="ce58"/>
          <table:table-cell table:number-columns-repeated="16373"/>
        </table:table-row>
        <table:table-row table:style-name="ro25">
          <table:table-cell table:style-name="ce50"/>
          <table:table-cell office:value-type="float" office:value="116" table:style-name="ce53">
            <text:p>116</text:p>
          </table:table-cell>
          <table:table-cell office:value-type="float" office:value="171245201" table:style-name="ce54">
            <text:p>171245201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APARELHO FIXADOR EXTERNO INDICADO PARA TÍBIA, COM A HASTE RÍGIDA RADIOTRANSPARENTE EM FIBRA DE <text:s text:c="2"/>CARBONO DE 300MM, ASSOCIADA A UMA UNIDADE TRACIONADORA COM SISTEMA DE COM´PRESSÃO E <text:s text:c="2"/>DISTRAÇÃO PERMITINDO TRANSPORTE E/OU ALONGAMENTO ÓSSEO, MONTAGEM BIPLANAR, CABEÇAIS <text:s text:c="2"/>DESLIZANTES EM DURALUMÍNIO, PLATAFORMAS QUE POSSIBILITAM A FIXAÇÃO LINEAR COM POSICIONAMENTO <text:s text:c="2"/>PARALELO, CONVERGENTE OU DIVERGENTE E/OU CLAMPS CIRCULARES QUE PERMITEM A FIXAÇÃO EM <text:s text:c="2"/>QUALQUER ANGULAÇÃO. PINOS DE SCHANZ CÔNICOS E CALIBRADOS, COM PONTA LANÇA OU PONTA ROMBA, <text:s text:c="2"/>CHAVE EM "L" E CHAVE FIXA PARA MÔDULO DE COMPRESSÃO. ACOMPANHA INSTRUMENTAL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30" table:style-name="ce55">
            <text:p>30</text:p>
          </table:table-cell>
          <table:table-cell office:value-type="currency" office:value="13000" table:style-name="ce57">
            <text:p>R$ 13.000,0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25">
          <table:table-cell table:style-name="ce50"/>
          <table:table-cell office:value-type="float" office:value="117" table:style-name="ce53">
            <text:p>117</text:p>
          </table:table-cell>
          <table:table-cell office:value-type="float" office:value="171245203" table:style-name="ce54">
            <text:p>171245203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APARELHO FIXADOR EXTERNO GRANDE INDICADO PARA FÊMUR, COM A HASTE RÍGIDA RADIOTRANSPARENTE <text:s text:c="2"/>EM FIBRA DE CARBONO DE 380MM ASSOCIADA A UMA UNIDADE TRACIONADORA COM SISTEMA DE COMPRESSÃO <text:s text:c="2"/>E DISTRAÇÃO PERMITINDO TRANSPORTE E/OU ALONGAMENTO ÓSSEO, MONTAGEM UNIPLANAR OU BIPLANAR, <text:s text:c="2"/>CABEÇAIS DESLIZANTES EM DURALUMÍNIO, PLATAFORMAS QUE POSSIBILITAM A FIXAÇÃO LINEAR COM <text:s text:c="2"/>POSICIONAMENTO PARALELO, CONVERGENTE OU DIVERGENTE E/OU CLAMPS CIRCULARES QUE PERMITEM A <text:s text:c="2"/>FIXAÇÃO EM QUALQUER ANGULAÇÃO. PINOS DE SCHANZ CÔNICOS E CALIBRADOS, COM PONTA LANÇA OU <text:s text:c="2"/>PONTA ROMBA. CHAVE EM "L" E CHAVE FIXA PARA MÔDULO DE COMPRESSÃO. SISTEMA 99. ACOMPANHA <text:s text:c="2"/>INSTRUMENTAL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office:value-type="currency" office:value="13000" table:style-name="ce57">
            <text:p>R$ 13.000,0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118" table:style-name="ce53">
            <text:p>118</text:p>
          </table:table-cell>
          <table:table-cell office:value-type="float" office:value="190050491" table:style-name="ce54">
            <text:p>190050491</text:p>
          </table:table-cell>
          <table:table-cell office:value-type="float" office:value="365417" table:style-name="ce55">
            <text:p>365417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FIXADOR EXTERNO GRANDE E MEDIANO QUE PERMITE AJUSTE EM TRÊS PLANOS, ROTULAS COM MECANISMO <text:s text:c="2"/>DE AJUSTE COM CLIP, CÓDIGO DE CORES PARA FÁCIL IDENTIFICAÇÃO, POSSUINDO UMA LINHA DE PRODUTOS <text:s text:c="2"/>COMPLETA.<text:s text:c="2"/>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office:value-type="currency" office:value="17500" table:style-name="ce57">
            <text:p>R$ 17.500,0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15">
          <table:table-cell table:style-name="ce50"/>
          <table:table-cell office:value-type="float" office:value="119" table:style-name="ce53">
            <text:p>119</text:p>
          </table:table-cell>
          <table:table-cell office:value-type="float" office:value="171245199" table:style-name="ce54">
            <text:p>171245199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APARELHO FIXADOR EXTERNO RÍGIDO PEQUENO, INDICADO PARA FRATURAS DE ANTEBRAÇO, PUNHO E ÚMERO <text:s text:c="2"/>COM A HASTE RÍGIDA EM FIBRA DE CARBONO RADIOTRANSPARENTE DE 195MM, MONTAGEM UNIPLANAR, <text:s text:c="2"/>CABEÇAIS DESLIZANTES EM DURALUMÍNIO, PLATAFORMAS QUE POSSIBILITAM A FIXAÇÃO LINEAR COM <text:s text:c="2"/>POSICIONAMENTO PARALELO, CONVERGENTE OU DIVERGENTE E/OU CLAMPS CIRCULARES QUE PERMITEM A <text:s text:c="2"/>FIXAÇÃO EM DIVERSAS ANGULAÇÕES. PINOS DE SCHANZ CÔNICOS E CALIBRADOS, COM PONTA LANÇA OU <text:s text:c="2"/>PONTA ROMBA. CHAVE EM "L", ACOMPANHA INSTRUMENTAL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office:value-type="currency" office:value="13000" table:style-name="ce57">
            <text:p>R$ 13.000,0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120" table:style-name="ce53">
            <text:p>120</text:p>
          </table:table-cell>
          <table:table-cell office:value-type="float" office:value="171245200" table:style-name="ce54">
            <text:p>171245200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APARELHO FIXADOR EXTERNO MÉDIO INDICADO PARA TÍBIA, COM A HASTE RÍGIDA RADIOTRANSPARENTE EM <text:s text:c="2"/>FIBRA DE CARBONO DE 300MM, MONTAGEM INIPLANAR, CABEÇAIS DESLIZANTES EM DURALUMÍNIO, <text:s text:c="2"/>PLATAFORMAS QUE POSSIBILITAM A FIXAÇÃO LINEAR COM POSICIONAMENTO PARALELO, CONVERGENTE OU <text:s text:c="2"/>DIVERGENTE E/OU CLAMPS CIRCULARES QUE PERMITEM A FIXAÇÃO EM QUALQUER ANGULAÇÃO. PINOS DE <text:s text:c="2"/>SCHANZ CÔNICOS E CALIBRADOS, COM PONTA LANÇA OU PONTA ROMBA. CHAVE EM "L", ACOMPANHA <text:s text:c="2"/>INSTRUMETAL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50" table:style-name="ce55">
            <text:p>50</text:p>
          </table:table-cell>
          <table:table-cell office:value-type="currency" office:value="17570" table:style-name="ce57">
            <text:p>R$ 17.570,0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121" table:style-name="ce53">
            <text:p>121</text:p>
          </table:table-cell>
          <table:table-cell office:value-type="float" office:value="171245202" table:style-name="ce54">
            <text:p>171245202</text:p>
          </table:table-cell>
          <table:table-cell office:value-type="float" office:value="420979" table:style-name="ce55">
            <text:p>420979</text:p>
          </table:table-cell>
          <table:table-cell office:value-type="string" table:style-name="ce61">
            <text:p>GRUPO 12</text:p>
          </table:table-cell>
          <table:table-cell office:value-type="string" table:style-name="ce56">
            <text:p>APARELHO FIXADOR EXTERNO GRANDE INDICADO PARA FÊMUR, COM A HASTE RÍGIDA RADIOTRANSPARENTE <text:s text:c="2"/>EM FIBRA DE CARBONO DE 380MM, MONTAGEM UNIPLANAR, CABEÇAIS DESLIZANTES EM DURALUMÍNIO, <text:s text:c="2"/>PLATAFORMAS QUE POSSIBILITAM A FIXAÇÃO LINEAR COM POSICIONAMENTO PARALELO, CONVERGENTE OU <text:s text:c="2"/>DIVERGENTE E/OU CLAMPS CIRCULARES QUE PERMITEM A FIXAÇÃO EM QUALQUER ANGULAÇÃO. PINOS DE <text:s text:c="2"/>SCHANZ CÔNICOS E CALIBRADOS, COM PONTA LANÇA OU PONTA ROMBA. CHAVE EM "L", ACOMPANHA <text:s text:c="2"/>INSTRUMENTAL PARA COLOCAÇÃ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6" table:style-name="ce55">
            <text:p>16</text:p>
          </table:table-cell>
          <table:table-cell office:value-type="currency" office:value="13449.5" table:style-name="ce57">
            <text:p>R$ 13.449,50</text:p>
          </table:table-cell>
          <table:table-cell office:value-type="string" table:style-name="ce58">
            <text:p>OSSEUS</text:p>
          </table:table-cell>
          <table:table-cell table:number-columns-repeated="16373"/>
        </table:table-row>
        <table:table-row table:style-name="ro24">
          <table:table-cell table:style-name="ce50"/>
          <table:table-cell office:value-type="float" office:value="122" table:style-name="ce53">
            <text:p>122</text:p>
          </table:table-cell>
          <table:table-cell office:value-type="string" table:style-name="ce54">
            <text:p>BR3332143</text:p>
          </table:table-cell>
          <table:table-cell office:value-type="float" office:value="447027" table:style-name="ce55">
            <text:p>447027</text:p>
          </table:table-cell>
          <table:table-cell office:value-type="string" table:style-name="ce61">
            <text:p>GRUPO 13</text:p>
          </table:table-cell>
          <table:table-cell office:value-type="string" table:style-name="ce56">
            <text:p>SISTEMA DE BLOQUEIO POR RADIOFREQUENCIA - AGULHA/CÂNULA COM PONTA BISELADA 25 GRAU DESTINADA <text:s text:c="2"/>A BLOQUEIO DE LEXOS E NERVOS PERIFÉRICOS, UTILIZANDO ESTIMULAÇÃO ELÈTRICA NERVOSA E/OU <text:s text:c="2"/>ULTRASSOM. USO ÚNICO, ESTÉRIL. COMPOSIÇÃO DO KIT: PKBN21-06 - COMPOSTO COM 03 UNIDADES DE <text:s text:c="2"/>AGULHA DE BLOQUEIO 21GX140MM; PKBN21-08- COMPOSTO COM 01 UNIDADE DE AGULHA DE BLOQUEIO <text:s/>21GGX140MM; PKBN22-06 - COMPOSTO COM 03 UNIDADES DE AGULHA DE BLOQUEIO 22GX90MM. TODOS OS <text:s/>KITS INCLUEM AINDA OS SEGUINTES MATERIAIS: 01 CAMPO EXTERNO 80X90 CM; 01 SERINGA LUER LOCK 20ML; <text:s text:c="2"/>01 SERINGA LUER 10ML; 01 AGULHA <text:s/>25G, 16MM; 01 AGULHAG, 12MM; 10 GAZES 10X10 CM; 01 FILTRO AZUL; <text:s text:c="2"/>02 ESPONJA COM CABO; 01 DISPOSITIVO AKUS DE SEGURANÇA; 01 OU 03 CURATIVOS PEQUENOS; 01 CAPA <text:s/>PARA PROBE DE ULTRASSOM; 01 BANDEJA PEQUENA 60ML, 72MM X 58MM X 18MM; 01 CAMPO EXTERNO <text:s/>FENESTRADO 11CM, COM 5MM DE ADESIVO EM DOIS LADOS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table:number-columns-repeated="2" table:style-name="ce58"/>
          <table:table-cell table:number-columns-repeated="16373"/>
        </table:table-row>
        <table:table-row table:style-name="ro12">
          <table:table-cell table:style-name="ce50"/>
          <table:table-cell office:value-type="float" office:value="123" table:style-name="ce53">
            <text:p>123</text:p>
          </table:table-cell>
          <table:table-cell office:value-type="string" table:style-name="ce54">
            <text:p>BR3332205</text:p>
          </table:table-cell>
          <table:table-cell office:value-type="float" office:value="617465" table:style-name="ce55">
            <text:p>617465</text:p>
          </table:table-cell>
          <table:table-cell office:value-type="string" table:style-name="ce61">
            <text:p>GRUPO 13</text:p>
          </table:table-cell>
          <table:table-cell office:value-type="string" table:style-name="ce56">
            <text:p>SISTEMA DE BLOQUEIO POR RADIOFREQUENCIA - CÂNULA PARA RIZOTOMIA PERCUTÂNEA POR <text:s text:c="2"/>RADIOFREQUENCIA. MATERIAL: AÇO INOXIDAVEL, EIXO PARCIALMENTE ISOLADO, CUBO/ALÇA DE <text:s/>PLÁSTICO E TAMPA COM ESTILETE. O CUBO/ALÇA É EQUIPADO COM UM MECANISMO QUE PERMITE <text:s/>A IMPLANTAÇÃOE RETRAÇÃO DE 3 (TRÊS) DENTES. CUBO/ALÇA COM CONECTOR COMPATÍVEL <text:s/>COM EQUIPAMENTO. ESTÉRIL, USO ÚNICO.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table:number-columns-repeated="2" table:style-name="ce58"/>
          <table:table-cell table:number-columns-repeated="16373"/>
        </table:table-row>
        <table:table-row table:style-name="ro17">
          <table:table-cell table:style-name="ce50"/>
          <table:table-cell office:value-type="float" office:value="124" table:style-name="ce53">
            <text:p>124</text:p>
          </table:table-cell>
          <table:table-cell office:value-type="string" table:style-name="ce54">
            <text:p>BR3332220</text:p>
          </table:table-cell>
          <table:table-cell office:value-type="float" office:value="617462" table:style-name="ce55">
            <text:p>617462</text:p>
          </table:table-cell>
          <table:table-cell office:value-type="string" table:style-name="ce61">
            <text:p>GRUPO 13</text:p>
          </table:table-cell>
          <table:table-cell office:value-type="string" table:style-name="ce56">
            <text:p>SISTEMA DE BLOQUIEO POR RADIOFREQUENCIA - CÂNULA PARA RIZOTOMIA PERCUTÂNEA POR <text:s text:c="2"/>RADIOFREQUENCIA. MATERIAL: AÇO INOXIDÁVEL, EIXO PARCIALMENTE ISOLADO, CABO DE PLÁSTICO, <text:s/>PONTO DE INJEÇÃO E CABO COM CONECTOR COMPATÍVEL COM EQUIPAMENTO. ESTÉRIL, USO ÚNICO.<text:s text:c="5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400" table:style-name="ce55">
            <text:p>400</text:p>
          </table:table-cell>
          <table:table-cell table:number-columns-repeated="2" table:style-name="ce58"/>
          <table:table-cell table:number-columns-repeated="16373"/>
        </table:table-row>
        <table:table-row table:style-name="ro13">
          <table:table-cell table:style-name="ce50"/>
          <table:table-cell office:value-type="float" office:value="125" table:style-name="ce53">
            <text:p>125</text:p>
          </table:table-cell>
          <table:table-cell office:value-type="string" table:style-name="ce54">
            <text:p>BR3332172</text:p>
          </table:table-cell>
          <table:table-cell office:value-type="float" office:value="440101" table:style-name="ce55">
            <text:p>440101</text:p>
          </table:table-cell>
          <table:table-cell office:value-type="string" table:style-name="ce61">
            <text:p>GRUPO 14</text:p>
          </table:table-cell>
          <table:table-cell office:value-type="string" table:style-name="ce56">
            <text:p>SISTEMA PARA ARTROPLASTIA DO TPRNOZELO - COMPONENTE TALAR DE PRÓTESE DE TORNOZELO NÃO <text:s text:c="2"/>CIMENTADO COM ANCORAGEM PARA FIXAÇÃ, CONGRUENTE COM A SUPERFICIE ARTICULAR PARA MAIOR <text:s text:c="2"/>ESTABILIDADE TIBIO-TALAR, COM GUIA EXTERNO PARA ORIENTAÇÃO PRECISA DE CORTE, COM NO MINIMO <text:s/>5 OPÇÕES DE CORT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8" table:style-name="ce55">
            <text:p>8</text:p>
          </table:table-cell>
          <table:table-cell office:value-type="currency" office:value="26000" table:style-name="ce57">
            <text:p>R$ 26.000,00</text:p>
          </table:table-cell>
          <table:table-cell office:value-type="string" table:style-name="ce58">
            <text:p>ORTOSPINE</text:p>
          </table:table-cell>
          <table:table-cell table:number-columns-repeated="16373"/>
        </table:table-row>
        <table:table-row table:style-name="ro13">
          <table:table-cell table:style-name="ce50"/>
          <table:table-cell office:value-type="float" office:value="126" table:style-name="ce53">
            <text:p>126</text:p>
          </table:table-cell>
          <table:table-cell office:value-type="string" table:style-name="ce54">
            <text:p>BR3332173</text:p>
          </table:table-cell>
          <table:table-cell office:value-type="float" office:value="440099" table:style-name="ce55">
            <text:p>440099</text:p>
          </table:table-cell>
          <table:table-cell office:value-type="string" table:style-name="ce61">
            <text:p>GRUPO 14</text:p>
          </table:table-cell>
          <table:table-cell office:value-type="string" table:style-name="ce56">
            <text:p>SISTEMA PARA ARTROPLASTIA DO TORNOZELO - COMPONENTE TIBIAL DE PRÓTESE DE TORNOZELO SEM HASTE <text:s/>INTRAMEDULAR, VISANDO MÍNIMA RESSECÇÃO ÓSSEA, COM SUPERFICIEOSTEOINTEGRANTE, COM ANCORAGEM <text:s/>EM OSSO SUBCONDRAL POR PRESSFIT PARA ESTABILIDADE, COM TRILHO PARA FIXAÇÃO DE INSERT DE <text:s text:c="2"/>POLIETILEN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8" table:style-name="ce55">
            <text:p>8</text:p>
          </table:table-cell>
          <table:table-cell office:value-type="currency" office:value="11000" table:style-name="ce57">
            <text:p>R$ 11.000,00</text:p>
          </table:table-cell>
          <table:table-cell office:value-type="string" table:style-name="ce58">
            <text:p>ORTOSPINE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127" table:style-name="ce53">
            <text:p>127</text:p>
          </table:table-cell>
          <table:table-cell office:value-type="string" table:style-name="ce54">
            <text:p>BR3332174</text:p>
          </table:table-cell>
          <table:table-cell office:value-type="float" office:value="440099" table:style-name="ce55">
            <text:p>440099</text:p>
          </table:table-cell>
          <table:table-cell office:value-type="string" table:style-name="ce61">
            <text:p>GRUPO 14</text:p>
          </table:table-cell>
          <table:table-cell office:value-type="string" table:style-name="ce56">
            <text:p>SISTEMA PARA ARTROPLASTIA DO TORNOZELO - POLIETILENO DE ALTA DENSIDADE MOLECULAR PARA PRÓTESE <text:s/>DE TORNOZELO, COM ANGULAÇÃO CÔNCAVA E DESENHO GEOMÉTRICO ANATÔMICO CORRESPONDENTE À <text:s text:c="2"/>SUPERFICIE DO TALUS, EM FORMATO TRAPEZOIDAL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8" table:style-name="ce55">
            <text:p>8</text:p>
          </table:table-cell>
          <table:table-cell office:value-type="currency" office:value="10000" table:style-name="ce57">
            <text:p>R$ 10.000,00</text:p>
          </table:table-cell>
          <table:table-cell office:value-type="string" table:style-name="ce58">
            <text:p>ORTOSPINE</text:p>
          </table:table-cell>
          <table:table-cell table:number-columns-repeated="16373"/>
        </table:table-row>
        <table:table-row table:style-name="ro18">
          <table:table-cell table:style-name="ce50"/>
          <table:table-cell office:value-type="float" office:value="128" table:style-name="ce53">
            <text:p>128</text:p>
          </table:table-cell>
          <table:table-cell office:value-type="string" table:style-name="ce54">
            <text:p>BR3332182</text:p>
          </table:table-cell>
          <table:table-cell office:value-type="float" office:value="321112" table:style-name="ce55">
            <text:p>321112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KIT DE FIXADOR EXTERNO TIPO LINEAR PARA FRATURUS DO COTOVELO COM DOBRADIÇA RADIOLUCENTE QUE <text:s/>PEMITE FÁCIL IDENTIFICAÇÃO DO CENTO DE ROTAÇÃO DO COTOVELO, FLEXÃO-EXTENSÃO (ATÉ 175º) E DISTRA- <text:s/>ÇÃO MICROMÈTRICA (15MM) DA ARTICULAÇÃO; CONTÉM DISTRATOR PARA COTOVELO, UNIDADE DE MOBILIDADE <text:s/>CONTROLADA DO COTOVELO, BARRA DE FIBRA DE CARBONO DE 9 X 150MM E 12 X 200MM, CLAMPS MULTIPINOS. <text:s text:c="2"/>COM PINOS DE SCHANZ DE 6MM COM 6,0-5,0MM DE ROSCA (CÔNICO)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4" table:style-name="ce55">
            <text:p>4</text:p>
          </table:table-cell>
          <table:table-cell table:number-columns-repeated="2" table:style-name="ce58"/>
          <table:table-cell table:number-columns-repeated="16373"/>
        </table:table-row>
        <table:table-row table:style-name="ro15">
          <table:table-cell table:style-name="ce50"/>
          <table:table-cell office:value-type="float" office:value="129" table:style-name="ce53">
            <text:p>129</text:p>
          </table:table-cell>
          <table:table-cell office:value-type="string" table:style-name="ce54">
            <text:p>BR3332191</text:p>
          </table:table-cell>
          <table:table-cell office:value-type="float" office:value="364504" table:style-name="ce55">
            <text:p>364504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KIT DE FIXADOR EXTERNO MONOLATERAL TIPO TRILHO ADULTO EM LIGA DE ALUMÍNIO PARA CORREÇÃO DE <text:s/>DEFORMIDADES ATRAVÉS DE ALONGAMENTO, TRANSPORTE ÓSSEO E CORREÇÕES ANGULARES; POSSUI TRILHO <text:s/>EM ALUMÍNIO DE 100 A 250MM DE COMPRIMENTO, COM CABEÇAS EM ALUMÍNIO INTERCAMBIÁVEIS ESPECÍFICOS <text:s/>SENDO; CLAMP RETO, EM T; GIRATÓRIO; EM T OFGARCHES; DE DINAMIZAÇÃO EM ANEL; ACOPLAMENTO COM <text:s text:c="2"/>ARTICULAÇÃO ESFÉRICA, ACOPLAMENTO EM DOBRADIÇA, COM PINOS DE SCHANZ DE 6MM COM 6,0-5,0MM DE <text:s text:c="2"/>ROSCA (CÔNICO)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64">
            <text:p>2</text:p>
          </table:table-cell>
          <table:table-cell office:value-type="float" office:value="12" table:style-name="ce55">
            <text:p>12</text:p>
          </table:table-cell>
          <table:table-cell table:number-columns-repeated="2" table:style-name="ce58"/>
          <table:table-cell table:number-columns-repeated="16373"/>
        </table:table-row>
        <table:table-row table:style-name="ro15">
          <table:table-cell table:style-name="ce50"/>
          <table:table-cell office:value-type="float" office:value="130" table:style-name="ce53">
            <text:p>130</text:p>
          </table:table-cell>
          <table:table-cell office:value-type="string" table:style-name="ce54">
            <text:p>BR3332192</text:p>
          </table:table-cell>
          <table:table-cell office:value-type="float" office:value="335879" table:style-name="ce55">
            <text:p>335879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KIT DE FIXADOR EXTERNO MONOLATERAL TIPO TRILHO PEDIATRICO EM LIGA DE ALUMÍNIO PARA CORREÇÃO DE <text:s/>DEFORMIDADES ATRAVÉS DE ALONGAMENTO, TRANSPORTE ÓSSEO E CORREÇÕES ANGULARES; POSSUI TRILHO <text:s/>EM ALUMÍNIO DE 100 A 250MM DE COMPRIMENTO, COM CABEÇAS EM ALUMÍNIO INTERCAMBIÁVEIS ESPECÍFICOS <text:s/>SENDO; CLAMP RETO, EM T; GIRATÓRIO; EM T OFGARCHES; DE DINAMIZAÇÃO EM ANEL; ACOPLAMENTO COM <text:s text:c="2"/>ARTICULAÇÃO ESFÉRICA, ACOPLAMENTO EM DOBRADIÇA, COM PINOS DE SCHANZ DE 6MM COM 6,0-5,0MM DE <text:s text:c="2"/>ROSCA (CÔNICO)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" table:style-name="ce55">
            <text:p>6</text:p>
          </table:table-cell>
          <table:table-cell table:number-columns-repeated="2" table:style-name="ce58"/>
          <table:table-cell table:number-columns-repeated="16373"/>
        </table:table-row>
        <table:table-row table:style-name="ro19">
          <table:table-cell table:style-name="ce50"/>
          <table:table-cell office:value-type="float" office:value="131" table:style-name="ce53">
            <text:p>131</text:p>
          </table:table-cell>
          <table:table-cell office:value-type="string" table:style-name="ce54">
            <text:p>BR3332193</text:p>
          </table:table-cell>
          <table:table-cell office:value-type="float" office:value="451807" table:style-name="ce55">
            <text:p>451807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ENXERTO DE HIDROXIAPATIA EM CUNHA BIOABSORVÍVEL, DOSPONÍVEL EM OITO DIMENSÕES OU MELHOR <text:s text:c="2"/>QUALIDADE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4" table:style-name="ce55">
            <text:p>24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132" table:style-name="ce53">
            <text:p>132</text:p>
          </table:table-cell>
          <table:table-cell office:value-type="string" table:style-name="ce54">
            <text:p>BR3332483</text:p>
          </table:table-cell>
          <table:table-cell office:value-type="float" office:value="443508" table:style-name="ce55">
            <text:p>443508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PINO DE SCHANZ DE 6MM COM 6,0 - 5,0 MM DE ROSCA (CÔNICO), COMPRIMENTOS DE 120-260 MM E 30-90MM DE <text:s/>COMPRIMENTO DE ROSCA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table:number-columns-repeated="2" table:style-name="ce58"/>
          <table:table-cell table:number-columns-repeated="16373"/>
        </table:table-row>
        <table:table-row table:style-name="ro13">
          <table:table-cell table:style-name="ce50"/>
          <table:table-cell office:value-type="float" office:value="133" table:style-name="ce53">
            <text:p>133</text:p>
          </table:table-cell>
          <table:table-cell office:value-type="string" table:style-name="ce54">
            <text:p>BR3332485</text:p>
          </table:table-cell>
          <table:table-cell office:value-type="float" office:value="364504" table:style-name="ce55">
            <text:p>364504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Kit de fixador externo linear em duralumínio adulto, promove compressão-distração do foco de fratura, possui kit para pino <text:s/>acessório, gerando maior força e estabilidade, clamps retos e específicos em T, para tornozelo, metafisário, para convergência, <text:s/>angulado e de duplo acoplamento ou de melhor qualidade. Compinos de Schanz de 6mm com 6,0-5,0mm de rosca (cônico) ou de <text:s text:c="2"/>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0" table:style-name="ce55">
            <text:p>1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134" table:style-name="ce53">
            <text:p>134</text:p>
          </table:table-cell>
          <table:table-cell office:value-type="string" table:style-name="ce54">
            <text:p>BR3332486</text:p>
          </table:table-cell>
          <table:table-cell office:value-type="float" office:value="443507" table:style-name="ce55">
            <text:p>443507</text:p>
          </table:table-cell>
          <table:table-cell office:value-type="string" table:style-name="ce61">
            <text:p>GRUPO 15</text:p>
          </table:table-cell>
          <table:table-cell office:value-type="string" table:style-name="ce56">
            <text:p>Pinos de Schanz de 6 mm com 6,0-5,0mm de rosca (cônico), com recobrimento de hidroxiapatita comprimentos de 120-260mm e <text:s text:c="2"/>30-90mm de comprimento de rosca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60" table:style-name="ce55">
            <text:p>60</text:p>
          </table:table-cell>
          <table:table-cell table:number-columns-repeated="2" table:style-name="ce58"/>
          <table:table-cell table:number-columns-repeated="16373"/>
        </table:table-row>
        <table:table-row table:style-name="ro11">
          <table:table-cell table:style-name="ce50"/>
          <table:table-cell office:value-type="float" office:value="135" table:style-name="ce53">
            <text:p>135</text:p>
          </table:table-cell>
          <table:table-cell office:value-type="string" table:style-name="ce54">
            <text:p>BR3332183</text:p>
          </table:table-cell>
          <table:table-cell office:value-type="float" office:value="444646" table:style-name="ce55">
            <text:p>444646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PLACA PEDIÁTRICA EM TITÂNIO, FOMATO DE OITO, IMPLANTADA NA EPÍFISE DE CRIANÇAS PARA CORRIGIR <text:s/>DEFORMIDADES AXIAIS DOS MEMBROS INFERIORES E SUPERIORES. O SEU USO VIABILIZA A CORREÇÃO DE <text:s/>DEFORMIDADES SEM A NECESSIDADE DO USO DE GESSO, FISIOTERAPIA OU OSTEOTOMIA. FUNCIONA COMO <text:s text:c="2"/>UMA BANDA DE TENSÃO, SEM INVADIR A FISE OU INIBIR O CRESCIMENTO; FIOS E PARAFUSOS CANULADO <text:s/>INCLUIDOS. INCLUI INSTRUMENTAL PARA COLOCAÇÃO OU DE MELHOR 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64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2" table:style-name="ce58"/>
          <table:table-cell table:number-columns-repeated="16373"/>
        </table:table-row>
        <table:table-row table:style-name="ro17">
          <table:table-cell table:style-name="ce50"/>
          <table:table-cell office:value-type="float" office:value="136" table:style-name="ce53">
            <text:p>136</text:p>
          </table:table-cell>
          <table:table-cell office:value-type="string" table:style-name="ce54">
            <text:p>BR3332190</text:p>
          </table:table-cell>
          <table:table-cell office:value-type="float" office:value="444206" table:style-name="ce55">
            <text:p>444206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HASTE TELESCÓPICA PEDIÁTRICA EM AÇO INOXIDÁVEL PARA CORREÇÃO DE DEFORMIDADES DAS EXTREMIDADES <text:s text:c="2"/>POR OSTEOGÊNESE IMPERFECTA; COMPONENTE MACHO COM ANCORAGEM DISTAL E COMPONENTE FÊMEA COM <text:s text:c="2"/>CABEÇA ROSQUEADA; INCLUI FIO GUIA OU DE MELHOR QUALIDADE</text:p>
          </table:table-cell>
          <table:table-cell office:value-type="string" table:style-name="ce55">
            <text:p>UNIDADE</text:p>
          </table:table-cell>
          <table:table-cell office:value-type="float" office:value="2" table:style-name="ce64">
            <text:p>2</text:p>
          </table:table-cell>
          <table:table-cell office:value-type="float" office:value="10" table:style-name="ce55">
            <text:p>10</text:p>
          </table:table-cell>
          <table:table-cell office:value-type="string" table:style-name="ce58">
            <text:p>FRACASSADO</text:p>
          </table:table-cell>
          <table:table-cell office:value-type="string" table:style-name="ce58">
            <text:p>FRACASSADO</text:p>
          </table:table-cell>
          <table:table-cell table:number-columns-repeated="16373"/>
        </table:table-row>
        <table:table-row table:style-name="ro11">
          <table:table-cell table:style-name="ce50"/>
          <table:table-cell office:value-type="float" office:value="137" table:style-name="ce53">
            <text:p>137</text:p>
          </table:table-cell>
          <table:table-cell office:value-type="string" table:style-name="ce54">
            <text:p>BR3332487</text:p>
          </table:table-cell>
          <table:table-cell office:value-type="float" office:value="321112" table:style-name="ce55">
            <text:p>321112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Kit de fixador externo linear telescópico para correção de deformidade em valgo/varo e antecurvo/retrocurvo da tíbia, por hemicalotase <text:s/>na técnica de osteotomia de abertura gradual. Possui corpo autocentrante e instrumental para colocação ou de melhor qualidade. Possui <text:s/>kit para pino acessório, gerando maior força e estabilidade, clampsretos e específicos em T, para tornozelo, metafisário, para <text:s/>convergência, angulado e de duplo acoplamento. Com pinos de Schanz de 6mm com 6,0-5,0mm de rosca (cônico) ou de melhor <text:s/>qualidade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10" table:style-name="ce55">
            <text:p>10</text:p>
          </table:table-cell>
          <table:table-cell table:number-columns-repeated="2" table:style-name="ce58"/>
          <table:table-cell table:number-columns-repeated="16373"/>
        </table:table-row>
        <table:table-row table:style-name="ro16">
          <table:table-cell table:style-name="ce50"/>
          <table:table-cell office:value-type="float" office:value="138" table:style-name="ce53">
            <text:p>138</text:p>
          </table:table-cell>
          <table:table-cell office:value-type="string" table:style-name="ce54">
            <text:p>BR3321491</text:p>
          </table:table-cell>
          <table:table-cell office:value-type="float" office:value="475808" table:style-name="ce55">
            <text:p>475808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CONJUNTO INSTRUMENTAL CIRURGICO PARA TRANSPLANTE OSTEOCONDRAL COLETOR E INTRODUTOR DE ENXERTO, COM BROCA, GUIA, ÊMBOLO, TROCARTE, ESTÉRIL E DESCARTÁVEL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2" table:style-name="ce58"/>
          <table:table-cell table:number-columns-repeated="16373"/>
        </table:table-row>
        <table:table-row table:style-name="ro17">
          <table:table-cell table:style-name="ce50"/>
          <table:table-cell office:value-type="float" office:value="139" table:style-name="ce53">
            <text:p>139</text:p>
          </table:table-cell>
          <table:table-cell office:value-type="string" table:style-name="ce54">
            <text:p>BR3321569</text:p>
          </table:table-cell>
          <table:table-cell office:value-type="float" office:value="440586" table:style-name="ce55">
            <text:p>440586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ITEM 139 – Sistema de sutura e reparo meniscal, diâmetro <text:s/>de 18mm ou menor diâmetro, com ajuste de profundidade, opções de agulha <text:s text:c="2"/>nas angulações de 0 até 24 graus, implante em peek ou superior, com fios de alta resistência, descartável, apresentando no <text:s/>instrumental empurrador/cortador de nó ou de melhor qualidade.<text:s text:c="2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300" table:style-name="ce55">
            <text:p>300</text:p>
          </table:table-cell>
          <table:table-cell office:value-type="currency" office:value="2090" table:style-name="ce57">
            <text:p>R$ 2.09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6">
          <table:table-cell table:style-name="ce50"/>
          <table:table-cell office:value-type="float" office:value="140" table:style-name="ce53">
            <text:p>140</text:p>
          </table:table-cell>
          <table:table-cell office:value-type="string" table:style-name="ce54">
            <text:p>BR3309589</text:p>
          </table:table-cell>
          <table:table-cell office:value-type="float" office:value="318814" table:style-name="ce55">
            <text:p>318814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ITEM 140 –MALHA PARA TRAÇÃO E DISTRIBUIÇÃO DE FORÇA ENTRE OS DEDOS QUE POSSIBILITA O POSICIOSAMENTO DO <text:s text:c="2"/>PACIENTE DE ACORDO COM O PROCEDIMENTO DE PUNHO E CONTOVELO.</text:p>
          </table:table-cell>
          <table:table-cell office:value-type="string" table:style-name="ce55">
            <text:p>UNIDADE</text:p>
          </table:table-cell>
          <table:table-cell office:value-type="float" office:value="2" table:style-name="ce53">
            <text:p>2</text:p>
          </table:table-cell>
          <table:table-cell office:value-type="float" office:value="24" table:style-name="ce55">
            <text:p>24</text:p>
          </table:table-cell>
          <table:table-cell office:value-type="currency" office:value="700" table:style-name="ce65">
            <text:p>R$ 700,00</text:p>
          </table:table-cell>
          <table:table-cell office:value-type="string" table:style-name="ce58">
            <text:p>CONMED</text:p>
          </table:table-cell>
          <table:table-cell table:number-columns-repeated="16373"/>
        </table:table-row>
        <table:table-row table:style-name="ro19">
          <table:table-cell table:style-name="ce50"/>
          <table:table-cell office:value-type="float" office:value="141" table:style-name="ce53">
            <text:p>141</text:p>
          </table:table-cell>
          <table:table-cell office:value-type="float" office:value="190035371" table:style-name="ce54">
            <text:p>190035371</text:p>
          </table:table-cell>
          <table:table-cell office:value-type="float" office:value="443585" table:style-name="ce55">
            <text:p>443585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FIOS DE AÇO PARA CERCLAGEM COM 0,6/0,8/1,0/1,2/1,5MM - fio ortopédico, material aço, <text:s/>para fixação ossea<text:s text:c="6"/></text:p>
          </table:table-cell>
          <table:table-cell office:value-type="string" table:style-name="ce55">
            <text:p>UNIDADE</text:p>
          </table:table-cell>
          <table:table-cell office:value-type="float" office:value="10" table:style-name="ce53">
            <text:p>10</text:p>
          </table:table-cell>
          <table:table-cell office:value-type="float" office:value="600" table:style-name="ce55">
            <text:p>600</text:p>
          </table:table-cell>
          <table:table-cell office:value-type="currency" office:value="39" table:style-name="ce65">
            <text:p>R$ 39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25">
          <table:table-cell table:style-name="ce50"/>
          <table:table-cell office:value-type="float" office:value="142" table:style-name="ce53">
            <text:p>142</text:p>
          </table:table-cell>
          <table:table-cell office:value-type="string" table:style-name="ce54">
            <text:p>BR3325048</text:p>
          </table:table-cell>
          <table:table-cell office:value-type="float" office:value="435687" table:style-name="ce55">
            <text:p>435687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SISTEMA DE RECONSTRUÇÃO LIGAMENTAR, CONTENDO 01 EQUIPO PARA BOMBA DE INFUSÃO DE ALTO FLUXO <text:s text:c="2"/>E DE CIRCULAÇÃO ASSISTIDA; 01 LAMINAS DE SHAVER DE AÇO INOXIDÁVEL, DESCATAVEL 4,5 / <text:s/>5,5 OU DE <text:s text:c="2"/>MELHOR QUALIDADE ; 01 PLACA DE FIXAÇÃO FÊMORAL ATRAVÉS DE PLACA DE TITANO, CUJO O IMPLANTE SE <text:s text:c="2"/>AJUSTE A QUALQUER TAMANHO DE TÚNEL ATRAVÉS DO ENCURTAMENTO REGULÁVEL DO MESMO E QUE <text:s text:c="2"/>PERMITA TENSIONAMENTO RESIDUAL APÓS FIXAÇÃO, OU DE MELHOR QUALIDADE; 01 SISTEMA DE PARAFUSO <text:s text:c="2"/>DE INTERFERENCIA ABSORVIVEL PLGA, BIOCOMPOSTO, TAMANHOS DE 6, 7, 8, 9, 10, 11 E 12MM DE ESPESSURA <text:s text:c="2"/>23, 28, E 35 MM DE COMPRIMENTO, USO ÚNICO. OU DE MELHOR QUALIDADE; E KIT DE FIOSGUIA DESCATAVEL.</text:p>
          </table:table-cell>
          <table:table-cell office:value-type="string" table:style-name="ce55">
            <text:p>CONJUNTO</text:p>
          </table:table-cell>
          <table:table-cell office:value-type="float" office:value="10" table:style-name="ce53">
            <text:p>10</text:p>
          </table:table-cell>
          <table:table-cell office:value-type="float" office:value="160" table:style-name="ce55">
            <text:p>160</text:p>
          </table:table-cell>
          <table:table-cell table:style-name="ce58"/>
          <table:table-cell office:value-type="string" table:style-name="ce58">
            <text:p>BIOSINTESE</text:p>
          </table:table-cell>
          <table:table-cell table:number-columns-repeated="16373"/>
        </table:table-row>
        <table:table-row table:style-name="ro17">
          <table:table-cell table:style-name="ce50"/>
          <table:table-cell office:value-type="float" office:value="143" table:style-name="ce53">
            <text:p>143</text:p>
          </table:table-cell>
          <table:table-cell office:value-type="string" table:style-name="ce54">
            <text:p>BR3157934</text:p>
          </table:table-cell>
          <table:table-cell office:value-type="string" table:style-name="ce55">
            <text:p>308109</text:p>
          </table:table-cell>
          <table:table-cell office:value-type="string" table:style-name="ce61">
            <text:p>Avulso</text:p>
          </table:table-cell>
          <table:table-cell office:value-type="string" table:style-name="ce56">
            <text:p>FIO DE KIRSHINER E STEIMAN, PARA FIXACAO DE OSTEOSSINTESE, TAMANHOS VARIANDO DE 0.8 MM, 1.0MM , <text:s text:c="2"/>1.25 MM, 1.6 MM, 2.0 MM, 2.5 MM, 3.0 MM, 3.5 MM, 4.0 MM, 4.5 MM, 5.0 MM, 5.5 MM E 6.0 MM ACO NÃO MAGNETICO<text:s text:c="8"/></text:p>
          </table:table-cell>
          <table:table-cell office:value-type="string" table:style-name="ce55">
            <text:p>UNIDADE</text:p>
          </table:table-cell>
          <table:table-cell office:value-type="float" office:value="100" table:style-name="ce53">
            <text:p>100</text:p>
          </table:table-cell>
          <table:table-cell office:value-type="float" office:value="2500" table:style-name="ce55">
            <text:p>2500</text:p>
          </table:table-cell>
          <table:table-cell office:value-type="currency" office:value="39" table:style-name="ce65">
            <text:p>R$ 39,00</text:p>
          </table:table-cell>
          <table:table-cell office:value-type="string" table:style-name="ce58">
            <text:p>RPM</text:p>
          </table:table-cell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49"/>
          <table:table-cell table:style-name="ce66"/>
          <table:table-cell table:number-columns-repeated="5" table:style-name="ce46"/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49"/>
          <table:table-cell office:value-type="string" table:number-columns-spanned="4" table:number-rows-spanned="1" table:style-name="ce97">
            <text:p>Rio de Janeiro-RJ, na data da assinatura.</text:p>
          </table:table-cell>
          <table:covered-table-cell table:number-columns-repeated="3"/>
          <table:table-cell table:number-columns-repeated="2" table:style-name="ce46"/>
          <table:table-cell table:number-columns-repeated="16373"/>
        </table:table-row>
        <table:table-row table:number-rows-repeated="5" table:style-name="ro9">
          <table:table-cell table:style-name="ce50"/>
          <table:table-cell table:number-columns-repeated="4" table:style-name="ce49"/>
          <table:table-cell table:style-name="ce51"/>
          <table:table-cell table:number-columns-repeated="3" table:style-name="ce49"/>
          <table:table-cell table:number-columns-repeated="2" table:style-name="ce46"/>
          <table:table-cell table:number-columns-repeated="16373"/>
        </table:table-row>
        <table:table-row table:style-name="ro20">
          <table:table-cell table:style-name="ce50"/>
          <table:table-cell table:number-columns-spanned="8" table:number-rows-spanned="1" table:style-name="ce98"/>
          <table:covered-table-cell table:number-columns-repeated="7"/>
          <table:table-cell table:number-columns-repeated="2" table:style-name="ce46"/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67"/>
          <table:table-cell office:value-type="string" table:style-name="ce49">
            <text:p>LEONARDO IRAN ACEVEDO PIRES</text:p>
          </table:table-cell>
          <table:table-cell table:style-name="ce68"/>
          <table:table-cell table:style-name="ce49"/>
          <table:table-cell table:style-name="ce69"/>
          <table:table-cell table:number-columns-repeated="2" table:style-name="ce46"/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69"/>
          <table:table-cell office:value-type="string" table:style-name="ce68">
            <text:p>Capitão de Corveta (IM)</text:p>
          </table:table-cell>
          <table:table-cell table:style-name="ce68"/>
          <table:table-cell table:style-name="ce49"/>
          <table:table-cell table:style-name="ce69"/>
          <table:table-cell table:number-columns-repeated="2" table:style-name="ce46"/>
          <table:table-cell table:number-columns-repeated="16373"/>
        </table:table-row>
        <table:table-row table:style-name="ro9">
          <table:table-cell table:style-name="ce50"/>
          <table:table-cell table:number-columns-repeated="4" table:style-name="ce69"/>
          <table:table-cell office:value-type="string" table:style-name="ce68">
            <text:p>Encarregado da 3ª Divisão de Suprimentos</text:p>
          </table:table-cell>
          <table:table-cell table:style-name="ce68"/>
          <table:table-cell table:style-name="ce49"/>
          <table:table-cell table:style-name="ce69"/>
          <table:table-cell table:number-columns-repeated="2" table:style-name="ce46"/>
          <table:table-cell table:number-columns-repeated="16373"/>
        </table:table-row>
        <table:table-row table:style-name="ro20">
          <table:table-cell table:style-name="ce50"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6" table:style-name="ro20">
          <table:table-cell table:style-name="ce50"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5"/>
          <table:table-cell table:number-columns-repeated="16373"/>
        </table:table-row>
        <table:table-row table:style-name="ro20">
          <table:table-cell table:style-name="ce50"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3" table:style-name="ro20">
          <table:table-cell table:style-name="ce50"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3" table:style-name="ro20">
          <table:table-cell table:style-name="ce47"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2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style-name="ce72"/>
          <table:table-cell table:style-name="ce77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number-rows-repeated="2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3" table:style-name="ro20">
          <table:table-cell/>
          <table:table-cell table:style-name="ce72"/>
          <table:table-cell table:style-name="ce77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8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4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9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6374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6374"/>
        </table:table-row>
        <table:table-row table:number-rows-repeated="6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6374"/>
        </table:table-row>
        <table:table-row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7"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9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3"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number-rows-repeated="3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11"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4" table:style-name="ro20">
          <table:table-cell/>
          <table:table-cell table:style-name="ce72"/>
          <table:table-cell table:style-name="ce77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9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61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style-name="ce72"/>
          <table:table-cell table:style-name="ce80"/>
          <table:table-cell table:style-name="ce73"/>
          <table:table-cell table:style-name="ce61"/>
          <table:table-cell table:style-name="ce81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number-rows-repeated="3"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0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2" table:style-name="ro20">
          <table:table-cell/>
          <table:table-cell table:style-name="ce72"/>
          <table:table-cell table:style-name="ce80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8" table:style-name="ce79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1"/>
          <table:table-cell table:number-columns-repeated="16373"/>
        </table:table-row>
        <table:table-row table:style-name="ro20">
          <table:table-cell/>
          <table:table-cell table:style-name="ce72"/>
          <table:table-cell table:number-columns-repeated="2" table:style-name="ce73"/>
          <table:table-cell table:style-name="ce61"/>
          <table:table-cell table:style-name="ce81"/>
          <table:table-cell table:style-name="ce61"/>
          <table:table-cell table:number-columns-repeated="2" table:style-name="ce72"/>
          <table:table-cell table:style-name="ce71"/>
          <table:table-cell table:style-name="ce1"/>
          <table:table-cell table:number-columns-repeated="16373"/>
        </table:table-row>
        <table:table-row table:number-rows-repeated="4"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number-columns-repeated="2"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number-columns-repeated="2"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2" table:style-name="ce7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2"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style-name="ce76"/>
          <table:table-cell table:number-columns-repeated="16373"/>
        </table:table-row>
        <table:table-row table:style-name="ro20">
          <table:table-cell/>
          <table:table-cell table:style-name="ce72"/>
          <table:table-cell table:style-name="ce82"/>
          <table:table-cell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72"/>
          <table:table-cell table:number-columns-repeated="2" table:style-name="ce73"/>
          <table:table-cell table:style-name="ce61"/>
          <table:table-cell table:style-name="ce74"/>
          <table:table-cell table:style-name="ce61"/>
          <table:table-cell table:number-columns-repeated="2" table:style-name="ce72"/>
          <table:table-cell table:style-name="ce71"/>
          <table:table-cell table:number-columns-repeated="1010" table:style-name="ce45"/>
          <table:table-cell table:number-columns-repeated="15364"/>
        </table:table-row>
        <table:table-row table:number-rows-repeated="4" table:style-name="ro20">
          <table:table-cell/>
          <table:table-cell table:number-columns-repeated="4" table:style-name="ce83"/>
          <table:table-cell table:style-name="ce84"/>
          <table:table-cell table:number-columns-repeated="3" table:style-name="ce83"/>
          <table:table-cell table:style-name="ce85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number-columns-repeated="5" table:style-name="ce86"/>
          <table:table-cell table:number-columns-repeated="2" table:style-name="ce87"/>
          <table:table-cell table:style-name="ce88"/>
          <table:table-cell table:style-name="ce85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88"/>
          <table:table-cell table:number-columns-repeated="4" table:style-name="ce89"/>
          <table:table-cell table:number-columns-repeated="2" table:style-name="ce87"/>
          <table:table-cell table:style-name="ce90"/>
          <table:table-cell table:style-name="ce85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46"/>
          <table:table-cell table:number-columns-repeated="4" table:style-name="ce89"/>
          <table:table-cell table:number-columns-repeated="2" table:style-name="ce87"/>
          <table:table-cell table:style-name="ce90"/>
          <table:table-cell table:style-name="ce85"/>
          <table:table-cell table:number-columns-repeated="1010" table:style-name="ce45"/>
          <table:table-cell table:number-columns-repeated="15364"/>
        </table:table-row>
        <table:table-row table:style-name="ro20">
          <table:table-cell/>
          <table:table-cell table:style-name="ce88"/>
          <table:table-cell table:number-columns-repeated="4" table:style-name="ce89"/>
          <table:table-cell table:style-name="ce87"/>
          <table:table-cell table:style-name="ce88"/>
          <table:table-cell table:style-name="ce90"/>
          <table:table-cell table:style-name="ce85"/>
          <table:table-cell table:number-columns-repeated="1010" table:style-name="ce45"/>
          <table:table-cell table:number-columns-repeated="15364"/>
        </table:table-row>
        <table:table-row table:number-rows-repeated="2" table:style-name="ro20">
          <table:table-cell/>
          <table:table-cell table:number-columns-repeated="4" table:style-name="ce86"/>
          <table:table-cell table:style-name="ce91"/>
          <table:table-cell table:style-name="ce92"/>
          <table:table-cell table:number-columns-repeated="2" table:style-name="ce90"/>
          <table:table-cell table:style-name="ce85"/>
          <table:table-cell table:number-columns-repeated="1010" table:style-name="ce45"/>
          <table:table-cell table:number-columns-repeated="15364"/>
        </table:table-row>
        <table:table-row table:number-rows-repeated="2" table:style-name="ro20">
          <table:table-cell/>
          <table:table-cell table:number-columns-repeated="4" table:style-name="ce86"/>
          <table:table-cell table:style-name="ce91"/>
          <table:table-cell table:style-name="ce92"/>
          <table:table-cell table:number-columns-repeated="2" table:style-name="ce90"/>
          <table:table-cell table:style-name="ce85"/>
          <table:table-cell table:number-columns-repeated="16374"/>
        </table:table-row>
        <table:table-row table:number-rows-repeated="1048270" table:style-name="ro1">
          <table:table-cell table:number-columns-repeated="16384"/>
        </table:table-row>
      </table:table>
      <table:table table:name="Plan1" table:style-name="ta3">
        <table:table-column table:style-name="co22" table:default-cell-style-name="ce101"/>
        <table:table-column table:style-name="co24" table:default-cell-style-name="ce105"/>
        <table:table-column table:style-name="co25" table:default-cell-style-name="ce99"/>
        <table:table-column table:style-name="co26" table:default-cell-style-name="ce99"/>
        <table:table-column table:style-name="co17" table:number-columns-repeated="4" table:default-cell-style-name="ce99"/>
        <table:table-column table:style-name="co4" table:default-cell-style-name="ce100"/>
        <table:table-column table:style-name="co27" table:number-columns-repeated="3" table:default-cell-style-name="ce99"/>
        <table:table-column table:style-name="co28" table:default-cell-style-name="ce99"/>
        <table:table-column table:style-name="co7" table:number-columns-repeated="245" table:default-cell-style-name="ce99"/>
        <table:table-column table:style-name="co7" table:number-columns-repeated="766" table:default-cell-style-name="ce101"/>
        <table:table-column table:style-name="co16" table:number-columns-repeated="15360" table:default-cell-style-name="ce1"/>
        <table:table-row table:style-name="ro19">
          <table:table-cell office:value-type="float" office:value="30" table:style-name="ce16">
            <text:p>30</text:p>
          </table:table-cell>
          <table:table-cell office:value-type="float" office:value="15714209" table:style-name="ce17">
            <text:p>15714209</text:p>
          </table:table-cell>
          <table:table-cell office:value-type="string" table:style-name="ce18">
            <text:p>ITEM 30 – EQUIPO ESPECIAL, APLICAÇÃO P/ARTROSCOPIA , VIAS DUAS VIIAS, CARACTERÍSTICAS ADICIONAIS P/BOMBA <text:s text:c="2"/>DE INFUSÃO DE ALTO FLUXO.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76">
            <text:p>2</text:p>
          </table:table-cell>
          <table:table-cell office:value-type="currency" office:value="330" table:style-name="ce20">
            <text:p>R$ 330,00</text:p>
          </table:table-cell>
          <table:table-cell table:number-columns-repeated="16378"/>
        </table:table-row>
        <table:table-row table:style-name="ro20">
          <table:table-cell office:value-type="float" office:value="40" table:number-columns-spanned="1" table:number-rows-spanned="2" table:style-name="ce106">
            <text:p>40</text:p>
          </table:table-cell>
          <table:table-cell office:value-type="string" table:number-columns-spanned="1" table:number-rows-spanned="2" table:style-name="ce107">
            <text:p>BR3321493</text:p>
          </table:table-cell>
          <table:table-cell office:value-type="string" table:number-columns-spanned="1" table:number-rows-spanned="2" table:style-name="ce108">
            <text:p>ITEM 40 – SISTEMA DE PASSADOR DE FIO/SUTURA DO TIPO FIRST PASS OU SCORPION E FIOS DE ALTA RESISTÊNCIA, PARA CIRURGIA DO OMBRO.</text:p>
          </table:table-cell>
          <table:table-cell office:value-type="float" office:value="1" table:style-name="ce19">
            <text:p>1</text:p>
          </table:table-cell>
          <table:table-cell office:value-type="float" office:value="2" table:number-columns-spanned="1" table:number-rows-spanned="2" table:style-name="ce109">
            <text:p>2</text:p>
          </table:table-cell>
          <table:table-cell office:value-type="currency" office:value="449" table:number-columns-spanned="1" table:number-rows-spanned="2" table:style-name="ce110">
            <text:p>R$ 449,00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20">
          <table:table-cell office:value-type="float" office:value="41" table:number-columns-spanned="1" table:number-rows-spanned="2" table:style-name="ce106">
            <text:p>41</text:p>
          </table:table-cell>
          <table:table-cell office:value-type="string" table:number-columns-spanned="1" table:number-rows-spanned="2" table:style-name="ce107">
            <text:p>BR3321494</text:p>
          </table:table-cell>
          <table:table-cell office:value-type="string" table:number-columns-spanned="1" table:number-rows-spanned="2" table:style-name="ce108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office:value-type="float" office:value="1" table:style-name="ce19">
            <text:p>1</text:p>
          </table:table-cell>
          <table:table-cell office:value-type="float" office:value="2" table:number-columns-spanned="1" table:number-rows-spanned="2" table:style-name="ce109">
            <text:p>2</text:p>
          </table:table-cell>
          <table:table-cell office:value-type="currency" office:value="375" table:number-columns-spanned="1" table:number-rows-spanned="2" table:style-name="ce110">
            <text:p>R$ 375,00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17">
          <table:table-cell office:value-type="float" office:value="42" table:style-name="ce16">
            <text:p>42</text:p>
          </table:table-cell>
          <table:table-cell office:value-type="string" table:style-name="ce17">
            <text:p>BR3335667</text:p>
          </table:table-cell>
          <table:table-cell office:value-type="string" table:style-name="ce18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currency" office:value="2199" table:style-name="ce20">
            <text:p>R$ 2.199,00</text:p>
          </table:table-cell>
          <table:table-cell table:number-columns-repeated="16378"/>
        </table:table-row>
        <table:table-row table:style-name="ro16">
          <table:table-cell office:value-type="float" office:value="46" table:style-name="ce16">
            <text:p>46</text:p>
          </table:table-cell>
          <table:table-cell office:value-type="float" office:value="15714203" table:style-name="ce17">
            <text:p>15714203</text:p>
          </table:table-cell>
          <table:table-cell office:value-type="string" table:style-name="ce18">
            <text:p>ITEM 46 – 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currency" office:value="1940" table:style-name="ce20">
            <text:p>R$ 1.940,00</text:p>
          </table:table-cell>
          <table:table-cell table:number-columns-repeated="16378"/>
        </table:table-row>
        <table:table-row table:style-name="ro20">
          <table:table-cell office:value-type="float" office:value="48" table:number-columns-spanned="1" table:number-rows-spanned="2" table:style-name="ce106">
            <text:p>48</text:p>
          </table:table-cell>
          <table:table-cell office:value-type="float" office:value="15714207" table:number-columns-spanned="1" table:number-rows-spanned="2" table:style-name="ce107">
            <text:p>15714207</text:p>
          </table:table-cell>
          <table:table-cell office:value-type="string" table:number-columns-spanned="1" table:number-rows-spanned="2" table:style-name="ce108">
            <text:p>ITEM 48 – SISTEMA DE CÂNULA PARA ARTROSCOPIA DE OMBRO E JOELHO COM OBTURADOR CANULADO ROSQUEADO <text:s text:c="3"/>EM TAMANHO E COMPRIMENTOS DIVERSOS, MATERIAL DESCARTÁVEL E USO ÚNICO.<text:s text:c="10"/></text:p>
          </table:table-cell>
          <table:table-cell office:value-type="float" office:value="2" table:style-name="ce19">
            <text:p>2</text:p>
          </table:table-cell>
          <table:table-cell office:value-type="float" office:value="3" table:number-columns-spanned="1" table:number-rows-spanned="2" table:style-name="ce109">
            <text:p>3</text:p>
          </table:table-cell>
          <table:table-cell office:value-type="currency" office:value="350" table:number-columns-spanned="1" table:number-rows-spanned="2" table:style-name="ce110">
            <text:p>R$ 350,00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20">
          <table:table-cell office:value-type="float" office:value="49" table:number-columns-spanned="1" table:number-rows-spanned="2" table:style-name="ce106">
            <text:p>49</text:p>
          </table:table-cell>
          <table:table-cell office:value-type="float" office:value="15714212" table:number-columns-spanned="1" table:number-rows-spanned="2" table:style-name="ce107">
            <text:p>15714212</text:p>
          </table:table-cell>
          <table:table-cell office:value-type="string" table:number-columns-spanned="1" table:number-rows-spanned="2" table:style-name="ce108">
            <text:p>ITEM 49 – PONTEIRA DE RADIOFREQUÊNCIA DESCARTÁVEL 90 GRAUS.</text:p>
          </table:table-cell>
          <table:table-cell office:value-type="float" office:value="1" table:style-name="ce19">
            <text:p>1</text:p>
          </table:table-cell>
          <table:table-cell office:value-type="float" office:value="2" table:number-columns-spanned="1" table:number-rows-spanned="2" table:style-name="ce109">
            <text:p>2</text:p>
          </table:table-cell>
          <table:table-cell office:value-type="currency" office:value="1900" table:number-columns-spanned="1" table:number-rows-spanned="2" table:style-name="ce110">
            <text:p>R$ 1.900,00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number-rows-repeated="2"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number-rows-repeated="3"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number-rows-repeated="3"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7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8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9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3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31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32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number-rows-repeated="3" table:style-name="ro20">
          <table:table-cell table:style-name="ce16"/>
          <table:table-cell table:style-name="ce17"/>
          <table:table-cell table:style-name="ce18"/>
          <table:table-cell table:number-columns-repeated="3" table:style-name="ce19"/>
          <table:table-cell table:number-columns-repeated="16378"/>
        </table:table-row>
        <table:table-row table:number-rows-repeated="2" table:style-name="ro20">
          <table:table-cell table:style-name="ce102"/>
          <table:table-cell table:style-name="ce103"/>
          <table:table-cell table:style-name="ce18"/>
          <table:table-cell table:number-columns-repeated="3" table:style-name="ce19"/>
          <table:table-cell table:number-columns-repeated="16378"/>
        </table:table-row>
        <table:table-row table:number-rows-repeated="3"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33">
          <table:table-cell table:style-name="ce102"/>
          <table:table-cell table:style-name="ce103"/>
          <table:table-cell table:style-name="ce18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04"/>
          <table:table-cell table:number-columns-repeated="3" table:style-name="ce19"/>
          <table:table-cell table:number-columns-repeated="16378"/>
        </table:table-row>
        <table:table-row table:style-name="ro20">
          <table:table-cell table:style-name="ce102"/>
          <table:table-cell table:style-name="ce103"/>
          <table:table-cell table:style-name="ce18"/>
          <table:table-cell table:number-columns-repeated="3" table:style-name="ce19"/>
          <table:table-cell table:number-columns-repeated="16378"/>
        </table:table-row>
        <table:table-row table:number-rows-repeated="1048522" table:style-name="ro34">
          <table:table-cell table:number-columns-repeated="16384"/>
        </table:table-row>
      </table:table>
      <table:table table:name="IMH" table:style-name="ta4">
        <table:shapes>
          <draw:custom-shape svg:x="8.1437in" svg:y="2.31496in" svg:width="2.40079in" svg:height="0.66575in" draw:z-index="1" draw:id="id3" draw:style-name="a29" draw:name="TextShape 1">
            <svg:title/>
            <svg:desc/>
            <text:p text:style-name="a24" text:class-names="" text:cond-style-name=""><text:span text:style-name="a23" text:class-names="">CF (Md) Vania Giselda Dávila</text:span></text:p>
            <text:p text:style-name="a26" text:class-names="" text:cond-style-name=""><text:span text:style-name="a25" text:class-names=""><text:s text:c="1"/>Ortopedia</text:span></text:p>
            <text:p text:style-name="a28" text:class-names="" text:cond-style-name=""><text:span text:style-name="a27" text:class-names=""><text:s text:c="9"/>CRM 82.59286-1</text:span></text:p>
            <draw:enhanced-geometry xmlns:dr3d="urn:oasis:names:tc:opendocument:xmlns:dr3d:1.0" draw:path-stretchpoint-x="21600" draw:path-stretchpoint-y="21600" draw:type="non-primitive" svg:viewBox="0 0 21600 21600" draw:enhanced-path="M ?f6 ?f6 L ?f8 ?f6 ?f8 ?f7 ?f6 ?f7 Z N" draw:text-areas="?f11 ?f14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0"/>
              <draw:equation draw:name="f7" draw:formula="1696"/>
              <draw:equation draw:name="f8" draw:formula="6104"/>
              <draw:equation draw:name="f9" draw:formula="?f5 / 0"/>
              <draw:equation draw:name="f10" draw:formula="?f4 / 0"/>
              <draw:equation draw:name="f11" draw:formula="0 * ?f9"/>
              <draw:equation draw:name="f12" draw:formula="?f8 * ?f9"/>
              <draw:equation draw:name="f13" draw:formula="?f7 * ?f10"/>
              <draw:equation draw:name="f14" draw:formula="0 * ?f10"/>
            </draw:enhanced-geometry>
          </draw:custom-shape>
        </table:shapes>
        <table:table-column table:style-name="co29" table:default-cell-style-name="ce127"/>
        <table:table-column table:style-name="co2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27"/>
        <table:table-column table:style-name="co34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27"/>
        <table:table-column table:style-name="co37" table:number-columns-repeated="1014" table:default-cell-style-name="ce1"/>
        <table:table-column table:style-name="co16" table:number-columns-repeated="15360" table:default-cell-style-name="ce1"/>
        <table:table-row table:style-name="ro35">
          <table:table-cell office:value-type="string" table:number-columns-spanned="10" table:number-rows-spanned="1" table:style-name="ce128">
            <text:p>MARINHA DO BRASIL</text:p>
          </table:table-cell>
          <table:covered-table-cell table:number-columns-repeated="9"/>
          <table:table-cell table:number-columns-repeated="16374"/>
        </table:table-row>
        <table:table-row table:style-name="ro36">
          <table:table-cell office:value-type="string" table:number-columns-spanned="6" table:number-rows-spanned="1" table:style-name="ce129">
            <text:p><text:s text:c="101"/>HOSPITAL NAVAL MARCÍLIO DIAS</text:p>
          </table:table-cell>
          <table:covered-table-cell table:number-columns-repeated="5"/>
          <table:table-cell office:value-type="string" table:number-columns-spanned="2" table:number-rows-spanned="1" table:style-name="ce135">
            <text:p>ANEXO DA CP - Nº CP</text:p>
          </table:table-cell>
          <table:covered-table-cell/>
          <table:table-cell office:value-type="string" table:style-name="ce111">
            <text:p>25/2026</text:p>
          </table:table-cell>
          <table:table-cell table:style-name="ce112"/>
          <table:table-cell table:number-columns-repeated="16374"/>
        </table:table-row>
        <table:table-row table:style-name="ro35">
          <table:table-cell office:value-type="string" table:number-columns-spanned="10" table:number-rows-spanned="1" table:style-name="ce136">
            <text:p>CLÍNICA DE TRAUMATO-ORTOPEDIA</text:p>
          </table:table-cell>
          <table:covered-table-cell table:number-columns-repeated="9"/>
          <table:table-cell table:number-columns-repeated="16374" table:style-name="ce113"/>
        </table:table-row>
        <table:table-row table:style-name="ro37">
          <table:table-cell office:value-type="string" table:style-name="ce114">
            <text:p>DATA</text:p>
          </table:table-cell>
          <table:table-cell office:value-type="string" table:style-name="ce115">
            <text:p>NIP</text:p>
          </table:table-cell>
          <table:table-cell office:value-type="string" table:style-name="ce115">
            <text:p>NOME DO USUÁRIO</text:p>
          </table:table-cell>
          <table:table-cell office:value-type="string" table:style-name="ce116">
            <text:p>VÍNCULO</text:p>
          </table:table-cell>
          <table:table-cell office:value-type="string" table:style-name="ce116">
            <text:p>DESCRIÇÃO DO PROCEDIMENTO/MEDICAMENTO</text:p>
          </table:table-cell>
          <table:table-cell office:value-type="string" table:style-name="ce117">
            <text:p>NIP DO TITULAR</text:p>
          </table:table-cell>
          <table:table-cell office:value-type="string" table:style-name="ce115">
            <text:p>VALOR UNIT</text:p>
          </table:table-cell>
          <table:table-cell office:value-type="string" table:style-name="ce115">
            <text:p>QUANTI.</text:p>
          </table:table-cell>
          <table:table-cell office:value-type="string" table:style-name="ce115">
            <text:p>VALOR TOTAL</text:p>
          </table:table-cell>
          <table:table-cell office:value-type="string" table:style-name="ce115">
            <text:p><text:s/>% A INDENIZAR</text:p>
          </table:table-cell>
          <table:table-cell table:number-columns-repeated="16374" table:style-name="ce118"/>
        </table:table-row>
        <table:table-row table:style-name="ro38">
          <table:table-cell office:value-type="date" office:date-value="2026-06-24T00:00:00" table:style-name="ce119">
            <text:p>24/06/26</text:p>
          </table:table-cell>
          <table:table-cell office:value-type="string" table:style-name="ce120">
            <text:p>86.4094.68</text:p>
          </table:table-cell>
          <table:table-cell office:value-type="string" table:style-name="ce121">
            <text:p>JOSÉ ALEXANDRE BARBOSA LIMA</text:p>
          </table:table-cell>
          <table:table-cell office:value-type="string" table:style-name="ce122">
            <text:p>TITULAR</text:p>
          </table:table-cell>
          <table:table-cell office:value-type="string" table:style-name="ce123">
            <text:p>REPARO ARTROSCOPICO DO MANGUITO ROTADOR A DIREITA</text:p>
          </table:table-cell>
          <table:table-cell office:value-type="string" table:style-name="ce122">
            <text:p>86.4094.68</text:p>
          </table:table-cell>
          <table:table-cell office:value-type="currency" office:value="10351" table:style-name="ce124">
            <text:p>R$ 10.351,00</text:p>
          </table:table-cell>
          <table:table-cell office:value-type="float" office:value="1" table:style-name="ce19">
            <text:p>1</text:p>
          </table:table-cell>
          <table:table-cell office:value-type="currency" office:value="10351" table:style-name="ce124">
            <text:p>R$ 10.351,00</text:p>
          </table:table-cell>
          <table:table-cell table:style-name="ce125"/>
          <table:table-cell table:number-columns-repeated="16374"/>
        </table:table-row>
        <table:table-row table:style-name="ro39">
          <table:table-cell office:value-type="date" office:date-value="2026-06-24T00:00:00" table:style-name="ce119">
            <text:p>24/06/26</text:p>
          </table:table-cell>
          <table:table-cell office:value-type="string" table:style-name="ce120">
            <text:p>87.1913.51</text:p>
          </table:table-cell>
          <table:table-cell office:value-type="string" table:style-name="ce121">
            <text:p>LEIFSON FERREIRA PASSOS</text:p>
          </table:table-cell>
          <table:table-cell office:value-type="string" table:style-name="ce122">
            <text:p>TITULAR</text:p>
          </table:table-cell>
          <table:table-cell office:value-type="string" table:style-name="ce126">
            <text:p>REPARO ARTROSCOPICO <text:s/>DE BANKART À ESQUERDA</text:p>
          </table:table-cell>
          <table:table-cell office:value-type="string" table:style-name="ce120">
            <text:p>87.1913.51</text:p>
          </table:table-cell>
          <table:table-cell office:value-type="currency" office:value="9224" table:style-name="ce124">
            <text:p>R$ 9.224,00</text:p>
          </table:table-cell>
          <table:table-cell office:value-type="float" office:value="1" table:style-name="ce19">
            <text:p>1</text:p>
          </table:table-cell>
          <table:table-cell office:value-type="currency" office:value="9224" table:style-name="ce124">
            <text:p>R$ 9.224,00</text:p>
          </table:table-cell>
          <table:table-cell table:style-name="ce125"/>
          <table:table-cell table:number-columns-repeated="16374"/>
        </table:table-row>
        <table:table-row table:number-rows-repeated="4" table:style-name="ro20">
          <table:table-cell table:style-name="ce127"/>
          <table:table-cell table:number-columns-repeated="4" table:style-name="ce1"/>
          <table:table-cell table:style-name="ce127"/>
          <table:table-cell table:number-columns-repeated="3" table:style-name="ce1"/>
          <table:table-cell table:style-name="ce127"/>
          <table:table-cell table:number-columns-repeated="16374"/>
        </table:table-row>
        <table:table-row table:style-name="ro1">
          <table:table-cell table:style-name="ce127"/>
          <table:table-cell table:number-columns-repeated="3" table:style-name="ce1"/>
          <table:table-cell office:value-type="string" table:number-columns-spanned="4" table:number-rows-spanned="1" table:style-name="ce43">
            <text:p>Chefe da Clínica</text:p>
          </table:table-cell>
          <table:covered-table-cell table:number-columns-repeated="3"/>
          <table:table-cell table:style-name="ce1"/>
          <table:table-cell table:style-name="ce127"/>
          <table:table-cell table:number-columns-repeated="16374"/>
        </table:table-row>
        <table:table-row table:number-rows-repeated="1048565" table:style-name="ro3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1" svg:font-family="Calibri1"/>
    <style:font-face style:name="Arial1" svg:font-family="Arial1"/>
    <style:font-face style:name="Calibri" svg:font-family="Calibri"/>
    <style:font-face style:name="Calibri2" svg:font-family="Calibri2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/>
      <number:text>/</number:text>
      <number:month/>
      <number:text>/</number:text>
      <number:year number:style="long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/>
      <number:text>/</number:text>
      <number:month/>
      <number:text>/</number:text>
      <number:year/>
    </number:dat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number number:decimal-places="2" number:min-decimal-places="2" number:min-integer-digits="1" number:grouping="true"/>
      <number:text> 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BuiltIn_Comma" style:family="table-cell" style:data-style-name="N40">
      <style:table-cell-properties style:vertical-align="automatic" fo:background-color="transparent"/>
      <style:text-properties fo:font-size="10pt" style:font-size-asian="10pt" style:font-size-complex="10pt"/>
    </style:style>
    <style:style style:name="Excel_BuiltIn_Currency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Explicativo_32_2" style:display-name="Texto Explicativo 2" style:family="table-cell" style:data-style-name="N0">
      <style:table-cell-properties style:vertical-align="automatic" fo:background-color="transparent"/>
      <style:text-properties fo:color="#7F7F7F" style:font-name="Calibri" style:font-name-asian="Calibri" style:font-name-complex="Calibri" fo:font-style="italic" style:font-style-asian="italic" style:font-style-complex="italic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47992125984252in" fo:margin-bottom="0.354330708661417in" fo:margin-left="0.509842519685039in" fo:margin-right="0.540157480314961in" style:print-orientation="landscape" style:print-page-order="ltr" style:first-page-number="continue" style:scale-to="100%" style:table-centering="both" style:print="objects charts drawings"/>
      <style:header-style>
        <style:header-footer-properties fo:min-height="0.489763779527559in" fo:margin-left="0in" fo:margin-right="0in" fo:margin-bottom="0in"/>
      </style:header-style>
      <style:footer-style>
        <style:header-footer-properties fo:min-height="0.32244094488189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71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landscape" style:print-page-order="ltr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HOSPITAL</text:span><text:span text:style-name="T1"> </text:span><text:span text:style-name="T1">NAVAL</text:span><text:span text:style-name="T1"> </text:span><text:span text:style-name="T1">MARCÍLIO</text:span><text:span text:style-name="T1"> </text:span><text:span text:style-name="T1">DIAS</text:span></text:p>
        <text:p><text:span text:style-name="T1">VICE</text:span><text:span text:style-name="T1"> </text:span><text:span text:style-name="T1">DIRETORIA</text:span><text:span text:style-name="T1"> </text:span><text:span text:style-name="T1">DE</text:span><text:span text:style-name="T1"> </text:span><text:span text:style-name="T1">SAÚDE</text:span></text:p>
        <text:p><text:span text:style-name="T1">CLÍNICA</text:span><text:span text:style-name="T1"> </text:span><text:span text:style-name="T1">DE</text:span><text:span text:style-name="T1"> </text:span><text:span text:style-name="T1">ORTOPEDIA</text:span></text:p>
        <text:p><text:span text:style-name="T1">MAPA</text:span><text:span text:style-name="T1"> </text:span><text:span text:style-name="T1">DE</text:span><text:span text:style-name="T1"> </text:span><text:span text:style-name="T1">USO</text:span><text:span text:style-name="T1"> </text:span><text:span text:style-name="T1">PARA</text:span><text:span text:style-name="T1"> </text:span><text:span text:style-name="T1">MATERIAL</text:span><text:span text:style-name="T1"> </text:span><text:span text:style-name="T1">CONSIGNADO</text:span></text:p>
      </style:header>
      <style:header-left style:display="false"/>
      <style:header-first/>
      <style:footer>
        <style:region-center>
          <text:p><text:span text:style-name="T2"><text:page-number>1</text:page-number></text:span><text:span text:style-name="T2">/</text:span><text:span text:style-name="T2"><text:page-count>99</text:page-count></text:span></text:p>
        </style:region-center>
        <style:region-right>
          <text:p><text:span text:style-name="T2"><text:date>???</text:date></text:span>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hnmd</meta:initial-creator>
    <dc:creator>DELL</dc:creator>
    <meta:creation-date>2013-01-10T16:22:04Z</meta:creation-date>
    <dc:date>2026-07-06T16:49:13Z</dc:date>
    <meta:editing-cycles>228</meta:editing-cycles>
    <meta:editing-duration>PT132866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