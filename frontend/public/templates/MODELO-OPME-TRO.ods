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libri2" svg:font-family="Calibri" style:font-family-generic="swiss"/>
    <style:font-face style:name="Garamond-Normal" svg:font-family="Garamond-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3.37mm"/>
    </style:style>
    <style:style style:name="co5" style:family="table-column">
      <style:table-column-properties fo:break-before="auto" style:column-width="78.37mm"/>
    </style:style>
    <style:style style:name="co6" style:family="table-column">
      <style:table-column-properties fo:break-before="auto" style:column-width="16.21mm"/>
    </style:style>
    <style:style style:name="co7" style:family="table-column">
      <style:table-column-properties fo:break-before="auto" style:column-width="18.04mm"/>
    </style:style>
    <style:style style:name="co8" style:family="table-column">
      <style:table-column-properties fo:break-before="auto" style:column-width="14.45mm"/>
    </style:style>
    <style:style style:name="co9" style:family="table-column">
      <style:table-column-properties fo:break-before="auto" style:column-width="21.73mm"/>
    </style:style>
    <style:style style:name="co10" style:family="table-column">
      <style:table-column-properties fo:break-before="auto" style:column-width="250.65mm"/>
    </style:style>
    <style:style style:name="co11" style:family="table-column">
      <style:table-column-properties fo:break-before="auto" style:column-width="10.09mm"/>
    </style:style>
    <style:style style:name="co12" style:family="table-column">
      <style:table-column-properties fo:break-before="auto" style:column-width="25.36mm"/>
    </style:style>
    <style:style style:name="co13" style:family="table-column">
      <style:table-column-properties fo:break-before="auto" style:column-width="28.49mm"/>
    </style:style>
    <style:style style:name="co14" style:family="table-column">
      <style:table-column-properties fo:break-before="auto" style:column-width="33.58mm"/>
    </style:style>
    <style:style style:name="co15" style:family="table-column">
      <style:table-column-properties fo:break-before="auto" style:column-width="5.84mm"/>
    </style:style>
    <style:style style:name="co16" style:family="table-column">
      <style:table-column-properties fo:break-before="auto" style:column-width="55.35mm"/>
    </style:style>
    <style:style style:name="co17" style:family="table-column">
      <style:table-column-properties fo:break-before="auto" style:column-width="24.85mm"/>
    </style:style>
    <style:style style:name="co18" style:family="table-column">
      <style:table-column-properties fo:break-before="auto" style:column-width="17.23mm"/>
    </style:style>
    <style:style style:name="co19" style:family="table-column">
      <style:table-column-properties fo:break-before="auto" style:column-width="19.83mm"/>
    </style:style>
    <style:style style:name="co20" style:family="table-column">
      <style:table-column-properties fo:break-before="page" style:column-width="15.65mm"/>
    </style:style>
    <style:style style:name="co21" style:family="table-column">
      <style:table-column-properties fo:break-before="auto" style:column-width="138.55mm"/>
    </style:style>
    <style:style style:name="co22" style:family="table-column">
      <style:table-column-properties fo:break-before="auto" style:column-width="9.1mm"/>
    </style:style>
    <style:style style:name="co23" style:family="table-column">
      <style:table-column-properties fo:break-before="auto" style:column-width="17.71mm"/>
    </style:style>
    <style:style style:name="co24" style:family="table-column">
      <style:table-column-properties fo:break-before="auto" style:column-width="24.75mm"/>
    </style:style>
    <style:style style:name="co25" style:family="table-column">
      <style:table-column-properties fo:break-before="auto" style:column-width="9mm"/>
    </style:style>
    <style:style style:name="co26" style:family="table-column">
      <style:table-column-properties fo:break-before="auto" style:column-width="24.09mm"/>
    </style:style>
    <style:style style:name="co27" style:family="table-column">
      <style:table-column-properties fo:break-before="auto" style:column-width="178.4mm"/>
    </style:style>
    <style:style style:name="co28" style:family="table-column">
      <style:table-column-properties fo:break-before="auto" style:column-width="5.31mm"/>
    </style:style>
    <style:style style:name="co29" style:family="table-column">
      <style:table-column-properties fo:break-before="auto" style:column-width="24.84mm"/>
    </style:style>
    <style:style style:name="co30" style:family="table-column">
      <style:table-column-properties fo:break-before="auto" style:column-width="23.18mm"/>
    </style:style>
    <style:style style:name="co31" style:family="table-column">
      <style:table-column-properties fo:break-before="auto" style:column-width="20.94mm"/>
    </style:style>
    <style:style style:name="co32" style:family="table-column">
      <style:table-column-properties fo:break-before="auto" style:column-width="3.32mm"/>
    </style:style>
    <style:style style:name="co33" style:family="table-column">
      <style:table-column-properties fo:break-before="auto" style:column-width="17.87mm"/>
    </style:style>
    <style:style style:name="co34" style:family="table-column">
      <style:table-column-properties fo:break-before="auto" style:column-width="18.57mm"/>
    </style:style>
    <style:style style:name="co35" style:family="table-column">
      <style:table-column-properties fo:break-before="auto" style:column-width="25.49mm"/>
    </style:style>
    <style:style style:name="co36" style:family="table-column">
      <style:table-column-properties fo:break-before="auto" style:column-width="80.43mm"/>
    </style:style>
    <style:style style:name="co37" style:family="table-column">
      <style:table-column-properties fo:break-before="auto" style:column-width="29.37mm"/>
    </style:style>
    <style:style style:name="co38" style:family="table-column">
      <style:table-column-properties fo:break-before="auto" style:column-width="94.69mm"/>
    </style:style>
    <style:style style:name="co39" style:family="table-column">
      <style:table-column-properties fo:break-before="auto" style:column-width="33.78mm"/>
    </style:style>
    <style:style style:name="co40" style:family="table-column">
      <style:table-column-properties fo:break-before="auto" style:column-width="27.22mm"/>
    </style:style>
    <style:style style:name="co41" style:family="table-column">
      <style:table-column-properties fo:break-before="auto" style:column-width="19.95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33.43mm"/>
    </style:style>
    <style:style style:name="co44" style:family="table-column">
      <style:table-column-properties fo:break-before="auto" style:column-width="22.58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15.15mm" fo:break-before="auto" style:use-optimal-row-height="false"/>
    </style:style>
    <style:style style:name="ro4" style:family="table-row">
      <style:table-row-properties style:row-height="6.33mm" fo:break-before="auto" style:use-optimal-row-height="false"/>
    </style:style>
    <style:style style:name="ro5" style:family="table-row">
      <style:table-row-properties style:row-height="5.98mm" fo:break-before="auto" style:use-optimal-row-height="false"/>
    </style:style>
    <style:style style:name="ro6" style:family="table-row">
      <style:table-row-properties style:row-height="6.69mm" fo:break-before="auto" style:use-optimal-row-height="false"/>
    </style:style>
    <style:style style:name="ro7" style:family="table-row">
      <style:table-row-properties style:row-height="5.63mm" fo:break-before="auto" style:use-optimal-row-height="false"/>
    </style:style>
    <style:style style:name="ro8" style:family="table-row">
      <style:table-row-properties style:row-height="4.66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1.82mm" fo:break-before="auto" style:use-optimal-row-height="true"/>
    </style:style>
    <style:style style:name="ro11" style:family="table-row">
      <style:table-row-properties style:row-height="25.21mm" fo:break-before="auto" style:use-optimal-row-height="true"/>
    </style:style>
    <style:style style:name="ro12" style:family="table-row">
      <style:table-row-properties style:row-height="21.47mm" fo:break-before="auto" style:use-optimal-row-height="true"/>
    </style:style>
    <style:style style:name="ro13" style:family="table-row">
      <style:table-row-properties style:row-height="25.51mm" fo:break-before="auto" style:use-optimal-row-height="true"/>
    </style:style>
    <style:style style:name="ro14" style:family="table-row">
      <style:table-row-properties style:row-height="17.43mm" fo:break-before="auto" style:use-optimal-row-height="true"/>
    </style:style>
    <style:style style:name="ro15" style:family="table-row">
      <style:table-row-properties style:row-height="53.83mm" fo:break-before="auto" style:use-optimal-row-height="true"/>
    </style:style>
    <style:style style:name="ro16" style:family="table-row">
      <style:table-row-properties style:row-height="29.56mm" fo:break-before="auto" style:use-optimal-row-height="true"/>
    </style:style>
    <style:style style:name="ro17" style:family="table-row">
      <style:table-row-properties style:row-height="13.37mm" fo:break-before="auto" style:use-optimal-row-height="true"/>
    </style:style>
    <style:style style:name="ro18" style:family="table-row">
      <style:table-row-properties style:row-height="33.6mm" fo:break-before="auto" style:use-optimal-row-height="true"/>
    </style:style>
    <style:style style:name="ro19" style:family="table-row">
      <style:table-row-properties style:row-height="8.94mm" fo:break-before="auto" style:use-optimal-row-height="true"/>
    </style:style>
    <style:style style:name="ro20" style:family="table-row">
      <style:table-row-properties style:row-height="5.17mm" fo:break-before="auto" style:use-optimal-row-height="true"/>
    </style:style>
    <style:style style:name="ro21" style:family="table-row">
      <style:table-row-properties style:row-height="12.89mm" fo:break-before="auto" style:use-optimal-row-height="true"/>
    </style:style>
    <style:style style:name="ro22" style:family="table-row">
      <style:table-row-properties style:row-height="16.85mm" fo:break-before="auto" style:use-optimal-row-height="true"/>
    </style:style>
    <style:style style:name="ro23" style:family="table-row">
      <style:table-row-properties style:row-height="5.27mm" fo:break-before="auto" style:use-optimal-row-height="true"/>
    </style:style>
    <style:style style:name="ro24" style:family="table-row">
      <style:table-row-properties style:row-height="9.33mm" fo:break-before="auto" style:use-optimal-row-height="true"/>
    </style:style>
    <style:style style:name="ro25" style:family="table-row">
      <style:table-row-properties style:row-height="49.79mm" fo:break-before="auto" style:use-optimal-row-height="true"/>
    </style:style>
    <style:style style:name="ro26" style:family="table-row">
      <style:table-row-properties style:row-height="65.97mm" fo:break-before="auto" style:use-optimal-row-height="true"/>
    </style:style>
    <style:style style:name="ro27" style:family="table-row">
      <style:table-row-properties style:row-height="45.74mm" fo:break-before="auto" style:use-optimal-row-height="true"/>
    </style:style>
    <style:style style:name="ro28" style:family="table-row">
      <style:table-row-properties style:row-height="41.08mm" fo:break-before="auto" style:use-optimal-row-height="true"/>
    </style:style>
    <style:style style:name="ro29" style:family="table-row">
      <style:table-row-properties style:row-height="37.02mm" fo:break-before="auto" style:use-optimal-row-height="true"/>
    </style:style>
    <style:style style:name="ro30" style:family="table-row">
      <style:table-row-properties style:row-height="48.86mm" fo:break-before="auto" style:use-optimal-row-height="true"/>
    </style:style>
    <style:style style:name="ro31" style:family="table-row">
      <style:table-row-properties style:row-height="17.11mm" fo:break-before="auto" style:use-optimal-row-height="true"/>
    </style:style>
    <style:style style:name="ro32" style:family="table-row">
      <style:table-row-properties style:row-height="37.66mm" fo:break-before="auto" style:use-optimal-row-height="true"/>
    </style:style>
    <style:style style:name="ro33" style:family="table-row">
      <style:table-row-properties style:row-height="6.53mm" fo:break-before="auto" style:use-optimal-row-height="true"/>
    </style:style>
    <style:style style:name="ro34" style:family="table-row">
      <style:table-row-properties style:row-height="5.57mm" fo:break-before="auto" style:use-optimal-row-height="true"/>
    </style:style>
    <style:style style:name="ro35" style:family="table-row">
      <style:table-row-properties style:row-height="10.57mm" fo:break-before="auto" style:use-optimal-row-height="true"/>
    </style:style>
    <style:style style:name="ro36" style:family="table-row">
      <style:table-row-properties style:row-height="15.15mm" fo:break-before="auto" style:use-optimal-row-height="true"/>
    </style:style>
    <style:style style:name="ro37" style:family="table-row">
      <style:table-row-properties style:row-height="13.74mm" fo:break-before="auto" style:use-optimal-row-height="false"/>
    </style:style>
    <style:style style:name="ro38" style:family="table-row">
      <style:table-row-properties style:row-height="7.04mm" fo:break-before="auto" style:use-optimal-row-height="false"/>
    </style:style>
    <style:style style:name="ro39" style:family="table-row">
      <style:table-row-properties style:row-height="8.45mm" fo:break-before="auto" style:use-optimal-row-height="false"/>
    </style:style>
    <style:style style:name="ro40" style:family="table-row">
      <style:table-row-properties style:row-height="7.74mm" fo:break-before="auto" style:use-optimal-row-height="false"/>
    </style:style>
    <style:style style:name="ro41" style:family="table-row">
      <style:table-row-properties style:row-height="14.45mm" fo:break-before="auto" style:use-optimal-row-height="false"/>
    </style:style>
    <style:style style:name="ro42" style:family="table-row">
      <style:table-row-properties style:row-height="8.1mm" fo:break-before="auto" style:use-optimal-row-height="false"/>
    </style:style>
    <style:style style:name="ro43" style:family="table-row">
      <style:table-row-properties style:row-height="9.51mm" fo:break-before="auto" style:use-optimal-row-height="false"/>
    </style:style>
    <style:style style:name="ro44" style:family="table-row">
      <style:table-row-properties style:row-height="7.66mm" fo:break-before="auto" style:use-optimal-row-height="false"/>
    </style:style>
    <style:style style:name="ro45" style:family="table-row">
      <style:table-row-properties style:row-height="8.94mm" fo:break-before="auto" style:use-optimal-row-height="false"/>
    </style:style>
    <style:style style:name="ro46" style:family="table-row">
      <style:table-row-properties style:row-height="11.27mm" fo:break-before="auto" style:use-optimal-row-height="false"/>
    </style:style>
    <style:style style:name="ta1" style:family="table" style:master-page-name="PageStyle_5f_MODELO">
      <style:table-properties table:display="true" style:writing-mode="lr-tb"/>
    </style:style>
    <style:style style:name="ta2" style:family="table" style:master-page-name="PageStyle_5f_LISTA_20_DE_20_MATERIAIS">
      <style:table-properties table:display="true" style:writing-mode="lr-tb"/>
    </style:style>
    <style:style style:name="ta3" style:family="table" style:master-page-name="PageStyle_5f_Plan1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5pt solid #000000" fo:background-color="#ffffff" style:diagonal-bl-tr="none" style:diagonal-tl-br="none" style:text-align-source="fix" style:repeat-content="false" fo:wrap-option="no-wrap" fo:border-left="1.5pt solid #000000" style:direction="ltr" fo:padding="0.71mm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5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mm" style:writing-mode="page"/>
      <style:text-properties fo:color="#231f2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outline="false" style:text-line-through-style="none" style:text-line-through-type="none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5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mm" style:writing-mode="page"/>
      <style:text-properties fo:color="#231f2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231f2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3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3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3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3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3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4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4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 style:data-style-name="N4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2" style:family="table-cell" style:parent-style-name="Excel_5f_BuiltIn_5f_Comma" style:data-style-name="N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 style:data-style-name="N4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Excel_5f_BuiltIn_5f_Comma" style:data-style-name="N4">
      <style:table-cell-properties style:glyph-orientation-vertical="0" fo:border-bottom="1.5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5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 style:data-style-name="N104">
      <style:table-cell-properties fo:background-color="transparent" fo:border="0.06pt solid #000000" style:vertical-align="middl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aramond-Normal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4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 style:data-style-name="N4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Excel_5f_BuiltIn_5f_Comma">
      <style:table-cell-properties style:glyph-orientation-vertical="0" fo:border-bottom="1.5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Excel_5f_BuiltIn_5f_Comma">
      <style:table-cell-properties style:glyph-orientation-vertical="0" fo:background-color="#ff0000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000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5" style:family="table-cell" style:parent-style-name="Default">
      <style:table-cell-properties fo:wrap-option="no-wrap" style:vertical-align="middle"/>
      <style:text-properties style:font-name="Calibri" fo:font-size="12pt" style:font-size-asian="12pt" style:font-size-complex="12pt"/>
    </style:style>
    <style:style style:name="ce76" style:family="table-cell" style:parent-style-name="Default">
      <style:table-cell-properties fo:wrap-option="no-wrap" fo:padding="0.71mm"/>
    </style:style>
    <style:style style:name="ce77" style:family="table-cell" style:parent-style-name="Default">
      <style:table-cell-properties fo:background-color="#ffffff" fo:wrap-option="no-wrap" fo:padding="0.71mm"/>
    </style:style>
    <style:style style:name="ce7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82" style:family="table-cell" style:parent-style-name="Default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8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8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87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bold" style:font-size-asian="10pt" style:font-style-asian="normal" style:font-weight-asian="bold" style:font-name-complex="Calibri2" style:font-size-complex="10pt" style:font-style-complex="normal" style:font-weight-complex="bold"/>
    </style:style>
    <style:style style:name="ce88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89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bold" style:font-size-asian="10pt" style:font-style-asian="normal" style:font-weight-asian="bold" style:font-name-complex="Calibri2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bold" style:font-size-asian="10pt" style:font-style-asian="normal" style:font-weight-asian="bold" style:font-name-complex="Calibri2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9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9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97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9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00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01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0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0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1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1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bold" style:font-size-asian="10pt" style:font-style-asian="normal" style:font-weight-asian="bold" style:font-name-complex="Calibri2" style:font-size-complex="10pt" style:font-style-complex="normal" style:font-weight-complex="bold"/>
    </style:style>
    <style:style style:name="ce1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19" style:family="table-cell" style:parent-style-name="Excel_5f_BuiltIn_5f_Currency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2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2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23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25" style:family="table-cell" style:parent-style-name="Default" style:data-style-name="N104">
      <style:table-cell-properties style:vertical-align="middl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aramond-Normal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04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aramond-Normal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.65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28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.65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29" style:family="table-cell" style:parent-style-name="Default" style:data-style-name="N10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0" style:family="table-cell" style:parent-style-name="Default" style:data-style-name="N104">
      <style:table-cell-properties style:text-align-source="fix" style:repeat-content="false" fo:wrap-option="no-wrap" fo:border="0.06pt solid #000000" fo:padding="0.71mm" style:vertical-align="middle"/>
      <style:paragraph-properties fo:text-align="center" fo:margin-left="0mm"/>
    </style:style>
    <style:style style:name="ce131" style:family="table-cell" style:parent-style-name="Default" style:data-style-name="N104">
      <style:table-cell-properties style:text-align-source="fix" style:repeat-content="false" fo:wrap-option="no-wrap" fo:padding="0.71mm" style:vertical-align="middle"/>
      <style:paragraph-properties fo:text-align="center" fo:margin-left="0mm"/>
    </style:style>
    <style:style style:name="ce13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4" style:family="table-cell" style:parent-style-name="Default">
      <style:table-cell-properties style:text-align-source="fix" style:repeat-content="false" fo:wrap-option="no-wrap" fo:padding="0.71mm" style:vertical-align="middle"/>
      <style:paragraph-properties fo:text-align="center" fo:margin-left="0mm"/>
    </style:style>
    <style:style style:name="ce135" style:family="table-cell" style:parent-style-name="Default">
      <style:table-cell-properties fo:wrap-option="no-wrap" fo:padding="0.71mm" style:vertical-align="middle"/>
    </style:style>
    <style:style style:name="ce136" style:family="table-cell" style:parent-style-name="Default">
      <style:table-cell-properties fo:wrap-option="no-wrap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31f2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4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4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4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4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4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4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4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4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4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4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5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5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5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5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5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5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5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5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5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5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6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6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6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6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6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6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6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6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6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6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7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7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7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7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7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7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7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7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7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8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8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8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8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8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8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9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20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20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20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2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2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2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2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2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22" style:family="table-cell" style:parent-style-name="Default" style:data-style-name="N10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aramond-Normal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1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226" style:family="table-cell" style:parent-style-name="Default" style:data-style-name="N3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227" style:family="table-cell" style:parent-style-name="Default" style:data-style-name="N30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28" style:family="table-cell" style:parent-style-name="Default" style:data-style-name="N37">
      <style:table-cell-properties fo:border-bottom="0.51pt solid #000000" style:text-align-source="fix" style:repeat-content="false" fo:background-color="transparent" fo:border-left="0.51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31" style:family="table-cell" style:parent-style-name="Default">
      <style:table-cell-properties fo:border-bottom="0.51pt solid #000000" style:text-align-source="fix" style:repeat-content="false" fo:background-color="transparent" fo:border-left="0.51pt solid #000000" fo:border-right="none" fo:border-top="none" style:vertical-align="middle"/>
      <style:paragraph-properties fo:text-align="center" fo:margin-left="0m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order-bottom="0.51pt solid #000000" style:text-align-source="fix" style:repeat-content="false" fo:background-color="transparent" fo:border-left="0.51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style:rotation-align="none"/>
    </style:style>
    <style:style style:name="ce234" style:family="table-cell" style:parent-style-name="Default">
      <style:table-cell-properties fo:border-bottom="0.51pt solid #000000" style:text-align-source="value-type" style:repeat-content="false" fo:background-color="transparent" fo:border-left="0.51pt solid #000000" fo:border-right="none" fo:border-top="none" style:vertical-align="middle"/>
      <style:paragraph-properties fo:margin-left="0m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order-bottom="0.51pt solid #000000" style:text-align-source="fix" style:repeat-content="false" fo:background-color="transparent" fo:wrap-option="wrap" fo:border-left="0.51pt solid #000000" fo:border-right="none" fo:border-top="none" style:vertical-align="top"/>
      <style:paragraph-properties fo:text-align="start" fo:margin-left="0m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0.51pt solid #000000" style:text-align-source="fix" style:repeat-content="false" fo:background-color="transparent" fo:wrap-option="wrap" fo:border-left="0.51pt solid #000000" fo:border-right="none" fo:border-top="none" style:vertical-align="middle"/>
      <style:paragraph-properties fo:text-align="start" fo:margin-left="0m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10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4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241" style:family="table-cell" style:parent-style-name="Default" style:data-style-name="N104">
      <style:table-cell-properties fo:border-bottom="0.51pt solid #000000" style:text-align-source="fix" style:repeat-content="false" fo:background-color="transparent" fo:border-left="0.51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244" style:family="table-cell" style:parent-style-name="Default" style:data-style-name="N1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2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18.68mm" fo:min-width="54.31mm" fo:padding-top="0mm" fo:padding-bottom="0mm" fo:padding-left="0mm" fo:padding-right="0mm" fo:wrap-option="wrap" draw:shadow-color="#808080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6.91mm" fo:min-width="60.98mm" fo:padding-top="0mm" fo:padding-bottom="0mm" fo:padding-left="0mm" fo:padding-right="0mm" fo:wrap-option="wrap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fo:font-size="12pt" fo:font-style="normal" fo:text-shadow="none" style:text-underline-style="none" fo:font-weight="normal" style:font-size-asian="12pt" style:font-style-asian="normal" style:font-weight-asian="normal" style:font-family-complex="'Times New Roman'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DELO" table:style-name="ta1" table:print-ranges="MODELO.A1:MODELO.M28">
        <office:forms form:automatic-focus="false" form:apply-design-mode="false"/>
        <table:shapes>
          <draw:custom-shape draw:z-index="0" draw:name="TextShape 1" draw:style-name="gr1" draw:text-style-name="P2" svg:width="54.31mm" svg:height="18.68mm" svg:x="356.95mm" svg:y="151.83mm">
            <text:p text:style-name="P1"><text:span text:style-name="T1">Diógenes Silva de Lima</text:span></text:p>
            <text:p text:style-name="P1"><text:span text:style-name="T1">COREN-RJ 1000416 - TE</text:span></text:p>
            <text:p text:style-name="P1"><text:span text:style-name="T1"><text:s text:c="6"/></text:span><text:span text:style-name="T1">2SG-EF 09.0139.38</text:span></text:p>
            <text:p text:style-name="P1"><text:span text:style-name="T1">Técnico de Enfermagem</text:span></text:p>
            <draw:enhanced-geometry svg:viewBox="0 0 0 0" draw:text-areas="0 0 ?f3 ?f2" draw:type="rectangle" draw:enhanced-path="M 0 0 L ?f3 0 ?f3 ?f2 0 ?f2 Z N">
              <draw:equation draw:name="f0" draw:formula="2719"/>
              <draw:equation draw:name="f1" draw:formula="1*1873/2"/>
              <draw:equation draw:name="f2" draw:formula="1873"/>
              <draw:equation draw:name="f3" draw:formula="5438"/>
            </draw:enhanced-geometry>
          </draw:custom-shape>
          <draw:custom-shape draw:z-index="1" draw:name="TextShape 1" draw:style-name="gr2" draw:text-style-name="P2" svg:width="60.98mm" svg:height="16.91mm" svg:x="147.6mm" svg:y="157.74mm">
            <text:p text:style-name="P1"><text:span text:style-name="T1">CF (Md) Vania Giselda Dávila</text:span></text:p>
            <text:p text:style-name="P1"><text:span text:style-name="T1"><text:s/></text:span><text:span text:style-name="T1">Ortopedia</text:span></text:p>
            <text:p text:style-name="P1"><text:span text:style-name="T1"><text:s text:c="9"/></text:span><text:span text:style-name="T1">CRM 82.59286-1</text:span></text:p>
            <draw:enhanced-geometry svg:viewBox="0 0 0 0" draw:text-areas="0 0 ?f3 ?f2" draw:type="rectangle" draw:enhanced-path="M 0 0 L ?f3 0 ?f3 ?f2 0 ?f2 Z N">
              <draw:equation draw:name="f0" draw:formula="3052"/>
              <draw:equation draw:name="f1" draw:formula="848"/>
              <draw:equation draw:name="f2" draw:formula="1696"/>
              <draw:equation draw:name="f3" draw:formula="6104"/>
            </draw:enhanced-geometry>
          </draw:custom-shape>
          <draw:custom-shape draw:z-index="2" draw:name="TextShape 1" draw:style-name="gr2" draw:text-style-name="P2" svg:width="60.98mm" svg:height="16.91mm" svg:x="4.7mm" svg:y="156.97mm">
            <text:p text:style-name="P1"><text:span text:style-name="T1">CF (Md) Vania Giselda Dávila</text:span></text:p>
            <text:p text:style-name="P1"><text:span text:style-name="T1"><text:s/></text:span><text:span text:style-name="T1">Ortopedia</text:span></text:p>
            <text:p text:style-name="P1"><text:span text:style-name="T1"><text:s text:c="9"/></text:span><text:span text:style-name="T1">CRM 82.59286-1</text:span></text:p>
            <draw:enhanced-geometry svg:viewBox="0 0 0 0" draw:mirror-horizontal="false" draw:mirror-vertical="false" draw:text-areas="0 0 ?f3 ?f2" draw:type="rectangle" draw:enhanced-path="M 0 0 L ?f3 0 ?f3 ?f2 0 ?f2 Z N">
              <draw:equation draw:name="f0" draw:formula="3052"/>
              <draw:equation draw:name="f1" draw:formula="848"/>
              <draw:equation draw:name="f2" draw:formula="1696"/>
              <draw:equation draw:name="f3" draw:formula="6104"/>
            </draw:enhanced-geometry>
          </draw:custom-shap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20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20"/>
        <table:table-column table:style-name="co11" table:default-cell-style-name="ce4"/>
        <table:table-column table:style-name="co12" table:default-cell-style-name="ce62"/>
        <table:table-column table:style-name="co13" table:default-cell-style-name="ce69"/>
        <table:table-column table:style-name="co14" table:default-cell-style-name="ce69"/>
        <table:table-column table:style-name="co15" table:default-cell-style-name="ce4"/>
        <table:table-column table:style-name="co16" table:number-columns-repeated="243" table:default-cell-style-name="ce4"/>
        <table:table-column table:style-name="co16" table:number-columns-repeated="766" table:default-cell-style-name="ce75"/>
        <table:table-row table:style-name="ro1">
          <table:table-cell table:style-name="ce1" office:value-type="string" calcext:value-type="string" table:number-columns-spanned="2" table:number-rows-spanned="1">
            <text:p>Nº</text:p>
          </table:table-cell>
          <table:covered-table-cell table:style-name="ce1"/>
          <table:table-cell table:style-name="ce15" office:value-type="string" calcext:value-type="string" table:number-columns-spanned="2" table:number-rows-spanned="1">
            <text:p>25/2026</text:p>
          </table:table-cell>
          <table:covered-table-cell table:style-name="ce15"/>
          <table:table-cell/>
          <table:table-cell table:style-name="ce27" office:value-type="string" calcext:value-type="string" table:number-columns-spanned="3" table:number-rows-spanned="1">
            <text:p>PREGÃO/TAD</text:p>
          </table:table-cell>
          <table:covered-table-cell table:number-columns-repeated="2" table:style-name="ce27"/>
          <table:table-cell table:style-name="ce27"/>
          <table:table-cell table:style-name="ce42" office:value-type="string" calcext:value-type="string" table:number-columns-spanned="3" table:number-rows-spanned="1">
            <text:p>58/2025 COMRJ</text:p>
          </table:table-cell>
          <table:covered-table-cell table:style-name="ce55"/>
          <table:covered-table-cell table:style-name="ce5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2" table:number-rows-spanned="1">
            <text:p>DATA:</text:p>
          </table:table-cell>
          <table:covered-table-cell table:style-name="ce2"/>
          <table:table-cell table:style-name="ce16" table:formula="of:=NOW()" office:value-type="date" office:date-value="2026-07-06T06:52:50.767" calcext:value-type="date" table:number-columns-spanned="2" table:number-rows-spanned="1">
            <text:p>6/7/2026</text:p>
          </table:table-cell>
          <table:covered-table-cell table:style-name="ce16"/>
          <table:table-cell/>
          <table:table-cell table:style-name="ce28" office:value-type="string" calcext:value-type="string" table:number-columns-spanned="3" table:number-rows-spanned="1">
            <text:p>VIGÊNCIA</text:p>
          </table:table-cell>
          <table:covered-table-cell table:number-columns-repeated="2" table:style-name="ce28"/>
          <table:table-cell table:style-name="ce28"/>
          <table:table-cell table:style-name="ce43" table:number-columns-spanned="3" table:number-rows-spanned="1"/>
          <table:covered-table-cell table:style-name="ce56"/>
          <table:covered-table-cell table:style-name="ce60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2" table:number-rows-spanned="1">
            <text:p>PROCESSO:</text:p>
          </table:table-cell>
          <table:covered-table-cell table:style-name="ce3"/>
          <table:table-cell table:style-name="ce17" table:number-columns-spanned="2" table:number-rows-spanned="1"/>
          <table:covered-table-cell table:style-name="ce17"/>
          <table:table-cell/>
          <table:table-cell table:style-name="ce29" office:value-type="string" calcext:value-type="string" table:number-columns-spanned="3" table:number-rows-spanned="1">
            <text:p>FORNECEDOR</text:p>
          </table:table-cell>
          <table:covered-table-cell table:number-columns-repeated="2" table:style-name="ce29"/>
          <table:table-cell table:style-name="ce29"/>
          <table:table-cell table:style-name="ce44" office:value-type="string" calcext:value-type="string" table:number-columns-spanned="3" table:number-rows-spanned="1">
            <text:p>CONMED – <text:s/>23.351.545/0003-00</text:p>
          </table:table-cell>
          <table:covered-table-cell table:style-name="ce57"/>
          <table:covered-table-cell table:style-name="ce6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1" office:value-type="string" calcext:value-type="string" table:number-columns-spanned="4" table:number-rows-spanned="1">
            <text:p>DADOS DO PACIENTE</text:p>
          </table:table-cell>
          <table:covered-table-cell table:number-columns-repeated="2" table:style-name="ce11"/>
          <table:covered-table-cell table:style-name="ce21"/>
          <table:table-cell table:style-name="ce30" office:value-type="string" calcext:value-type="string" table:number-columns-spanned="8" table:number-rows-spanned="1">
            <text:p>DADOS DO MATERIAL</text:p>
          </table:table-cell>
          <table:covered-table-cell table:number-columns-repeated="3" table:style-name="ce30"/>
          <table:covered-table-cell table:style-name="ce45"/>
          <table:covered-table-cell table:style-name="ce30"/>
          <table:covered-table-cell table:style-name="ce63"/>
          <table:covered-table-cell table:style-name="ce30"/>
          <table:table-cell table:number-columns-repeated="1011"/>
        </table:table-row>
        <table:table-row table:style-name="ro3">
          <table:table-cell table:style-name="ce5" office:value-type="string" calcext:value-type="string">
            <text:p>N°</text:p>
          </table:table-cell>
          <table:table-cell table:style-name="ce12" office:value-type="string" calcext:value-type="string">
            <text:p>NIP</text:p>
          </table:table-cell>
          <table:table-cell table:style-name="ce12" office:value-type="string" calcext:value-type="string">
            <text:p>INICIAIS</text:p>
          </table:table-cell>
          <table:table-cell table:style-name="ce12" office:value-type="string" calcext:value-type="string">
            <text:p>DATA</text:p>
          </table:table-cell>
          <table:table-cell table:style-name="ce22" office:value-type="string" calcext:value-type="string">
            <text:p>PROCEDIMENTO</text:p>
          </table:table-cell>
          <table:table-cell table:style-name="ce22" office:value-type="string" calcext:value-type="string">
            <text:p>Mapa de Sala</text:p>
          </table:table-cell>
          <table:table-cell table:style-name="ce12" office:value-type="string" calcext:value-type="string">
            <text:p>DANFE</text:p>
          </table:table-cell>
          <table:table-cell table:style-name="ce12" office:value-type="string" calcext:value-type="string">
            <text:p>ITEM</text:p>
          </table:table-cell>
          <table:table-cell table:style-name="ce12" office:value-type="string" calcext:value-type="string">
            <text:p>NEB/PI</text:p>
          </table:table-cell>
          <table:table-cell table:style-name="ce22" office:value-type="string" calcext:value-type="string">
            <text:p>DESCRIÇÃO DO MATERIAL</text:p>
          </table:table-cell>
          <table:table-cell table:style-name="ce12" office:value-type="string" calcext:value-type="string">
            <text:p>QT</text:p>
          </table:table-cell>
          <table:table-cell table:style-name="ce64" office:value-type="string" calcext:value-type="string">
            <text:p>V. UNIT.</text:p>
          </table:table-cell>
          <table:table-cell table:style-name="ce70" office:value-type="string" office:string-value="V. TOTAL" calcext:value-type="string">
            <text:p><text:s/>V. TOTAL </text:p>
          </table:table-cell>
          <table:table-cell table:style-name="ce72"/>
          <table:table-cell table:number-columns-repeated="1010"/>
        </table:table-row>
        <table:table-row table:style-name="ro4">
          <table:table-cell table:style-name="ce6" office:value-type="float" office:value="1" calcext:value-type="float" table:number-columns-spanned="1" table:number-rows-spanned="6">
            <text:p>1</text:p>
          </table:table-cell>
          <table:table-cell table:style-name="ce13" office:value-type="string" calcext:value-type="string" table:number-columns-spanned="1" table:number-rows-spanned="6">
            <text:p>86.4094.68</text:p>
          </table:table-cell>
          <table:table-cell table:style-name="ce18" office:value-type="string" calcext:value-type="string" table:number-columns-spanned="1" table:number-rows-spanned="6">
            <text:p>JABL</text:p>
          </table:table-cell>
          <table:table-cell table:style-name="ce19" office:value-type="date" office:date-value="2026-06-24" calcext:value-type="date" table:number-columns-spanned="1" table:number-rows-spanned="6">
            <text:p>24/06/26</text:p>
          </table:table-cell>
          <table:table-cell table:style-name="ce23" office:value-type="string" calcext:value-type="string" table:number-columns-spanned="1" table:number-rows-spanned="6">
            <text:p>REPARO ARTROSCOPICO DO MANGUITO ROTADOR A DIREITA </text:p>
          </table:table-cell>
          <table:table-cell table:style-name="ce31" office:value-type="float" office:value="245" calcext:value-type="float" table:number-columns-spanned="1" table:number-rows-spanned="6">
            <text:p>245</text:p>
          </table:table-cell>
          <table:table-cell table:style-name="ce31" table:number-columns-spanned="1" table:number-rows-spanned="6"/>
          <table:table-cell table:style-name="ce32" office:value-type="float" office:value="30" calcext:value-type="float">
            <text:p>30</text:p>
          </table:table-cell>
          <table:table-cell table:style-name="ce33" office:value-type="float" office:value="15714209" calcext:value-type="float">
            <text:p>15714209</text:p>
          </table:table-cell>
          <table:table-cell table:style-name="ce46" office:value-type="string" calcext:value-type="string">
            <text:p>ITEM 30 – EQUIPO ESPECIAL, APLICAÇÃO P/ARTROSCOPIA , VIAS DUAS VIIAS, CARACTERÍSTICAS ADICIONAIS P/BOMBA <text:s text:c="2"/>DE INFUSÃO DE ALTO FLUXO.</text:p>
          </table:table-cell>
          <table:table-cell table:style-name="ce58" office:value-type="float" office:value="1" calcext:value-type="float">
            <text:p>1</text:p>
          </table:table-cell>
          <table:table-cell table:style-name="ce65" office:value-type="currency" office:currency="BRL" office:value="330" calcext:value-type="currency">
            <text:p>R$ 330,00</text:p>
          </table:table-cell>
          <table:table-cell table:style-name="ce71" table:formula="of:=[.K7]*[.L7]" office:value-type="float" office:value="330" calcext:value-type="float">
            <text:p><text:s/>330,00 </text:p>
          </table:table-cell>
          <table:table-cell table:style-name="ce73" table:formula="of:=SUM([.M7:.M12])" office:value-type="float" office:value="10351" calcext:value-type="float" table:number-columns-spanned="1" table:number-rows-spanned="6">
            <text:p><text:s/>10.351,00 </text:p>
          </table:table-cell>
          <table:table-cell/>
          <table:table-cell table:style-name="ce74"/>
          <table:table-cell table:number-columns-repeated="1008"/>
        </table:table-row>
        <table:table-row table:style-name="ro4">
          <table:covered-table-cell table:style-name="ce6"/>
          <table:covered-table-cell table:style-name="ce13"/>
          <table:covered-table-cell table:style-name="ce18"/>
          <table:covered-table-cell table:style-name="ce19"/>
          <table:covered-table-cell table:style-name="ce23"/>
          <table:covered-table-cell table:number-columns-repeated="2" table:style-name="ce31"/>
          <table:table-cell table:style-name="ce32" office:value-type="float" office:value="40" calcext:value-type="float">
            <text:p>40</text:p>
          </table:table-cell>
          <table:table-cell table:style-name="ce34" office:value-type="string" calcext:value-type="string">
            <text:p>BR3321493</text:p>
          </table:table-cell>
          <table:table-cell table:style-name="ce47" office:value-type="string" calcext:value-type="string">
            <text:p>ITEM 40 – SISTEMA DE PASSADOR DE FIO/SUTURA DO TIPO FIRST PASS OU SCORPION E FIOS DE ALTA RESISTÊNCIA, PARA CIRURGIA DO OMBRO.</text:p>
          </table:table-cell>
          <table:table-cell table:style-name="ce58" office:value-type="float" office:value="1" calcext:value-type="float">
            <text:p>1</text:p>
          </table:table-cell>
          <table:table-cell table:style-name="ce65" office:value-type="currency" office:currency="BRL" office:value="449" calcext:value-type="currency">
            <text:p>R$ 449,00</text:p>
          </table:table-cell>
          <table:table-cell table:style-name="ce71" table:formula="of:=[.K8]*[.L8]" office:value-type="float" office:value="449" calcext:value-type="float">
            <text:p><text:s/>449,00 </text:p>
          </table:table-cell>
          <table:covered-table-cell table:style-name="ce73"/>
          <table:table-cell/>
          <table:table-cell table:style-name="ce74"/>
          <table:table-cell table:number-columns-repeated="1008"/>
        </table:table-row>
        <table:table-row table:style-name="ro5">
          <table:covered-table-cell table:number-columns-repeated="5" table:style-name="ce7"/>
          <table:covered-table-cell table:number-columns-repeated="2" table:style-name="ce31"/>
          <table:table-cell table:style-name="ce32" office:value-type="float" office:value="41" calcext:value-type="float">
            <text:p>41</text:p>
          </table:table-cell>
          <table:table-cell table:style-name="ce35" office:value-type="string" calcext:value-type="string">
            <text:p>BR3321494</text:p>
          </table:table-cell>
          <table:table-cell table:style-name="ce48" office:value-type="string" calcext:value-type="string">
            <text:p>ITEM 41 – SISTEMA DE LÂMINAS DE MICRODEBRIDAÇÃO DE OMBRO, PARA TECIDOS MOLES E OSSEOS , EM AÇO, CONTROLE MANUAL, <text:s text:c="2"/>PEÇA DE MÃO, PONTAS LISAS, DENTADAS E OU DUPLO DENTADAS EM DIVERSOS TAMANHOS, USO ÚNICO.</text:p>
          </table:table-cell>
          <table:table-cell table:style-name="ce58" office:value-type="float" office:value="1" calcext:value-type="float">
            <text:p>1</text:p>
          </table:table-cell>
          <table:table-cell table:style-name="ce65" office:value-type="currency" office:currency="BRL" office:value="375" calcext:value-type="currency">
            <text:p>R$ 375,00</text:p>
          </table:table-cell>
          <table:table-cell table:style-name="ce71" table:formula="of:=[.K9]*[.L9]" office:value-type="float" office:value="375" calcext:value-type="float">
            <text:p><text:s/>375,00 </text:p>
          </table:table-cell>
          <table:covered-table-cell table:style-name="ce73" table:formula="of:=SUM([.M9])" office:value-type="float" office:value="375" calcext:value-type="float">
            <text:p><text:s/>375,00 </text:p>
          </table:covered-table-cell>
          <table:table-cell/>
          <table:table-cell table:style-name="ce74"/>
          <table:table-cell table:number-columns-repeated="1008"/>
        </table:table-row>
        <table:table-row table:style-name="ro4">
          <table:covered-table-cell table:number-columns-repeated="5" table:style-name="ce7"/>
          <table:covered-table-cell table:number-columns-repeated="2" table:style-name="ce31"/>
          <table:table-cell table:style-name="ce32" office:value-type="float" office:value="42" calcext:value-type="float">
            <text:p>42</text:p>
          </table:table-cell>
          <table:table-cell table:style-name="ce36" office:value-type="string" calcext:value-type="string">
            <text:p>BR3335667</text:p>
          </table:table-cell>
          <table:table-cell table:style-name="ce48" office:value-type="string" calcext:value-type="string">
            <text:p>ITEM 42 – SISTEMA DE FIXAÇÃO POR ANCORAGEM EM TCP/PLGA, INSTRUMENTO E TECNOLOGIA DE ROSCA <text:s/>DUPLA CANULADA PARA FIXAÇÃO CORTICAL E ESPONJOSA, PRODUTO BIOCOMPOSTO ACOMPANHADOS <text:s/>COM FIOS DE ALTARESISTENCIA PARCIALMENTE ABSORVIVEL #2, TAMANHOS 4.5 , 4.75 , 5.5 E 6.5MM, <text:s/>USO ÚNICO.</text:p>
          </table:table-cell>
          <table:table-cell table:style-name="ce58" office:value-type="float" office:value="3" calcext:value-type="float">
            <text:p>3</text:p>
          </table:table-cell>
          <table:table-cell table:style-name="ce65" office:value-type="currency" office:currency="BRL" office:value="2199" calcext:value-type="currency">
            <text:p>R$ 2.199,00</text:p>
          </table:table-cell>
          <table:table-cell table:style-name="ce71" table:formula="of:=[.K10]*[.L10]" office:value-type="float" office:value="6597" calcext:value-type="float">
            <text:p><text:s/>6.597,00 </text:p>
          </table:table-cell>
          <table:covered-table-cell table:style-name="ce73" table:formula="of:=SUM([.M10])" office:value-type="float" office:value="6597" calcext:value-type="float">
            <text:p><text:s/>6.597,00 </text:p>
          </table:covered-table-cell>
          <table:table-cell/>
          <table:table-cell table:style-name="ce74"/>
          <table:table-cell table:number-columns-repeated="1008"/>
        </table:table-row>
        <table:table-row table:style-name="ro6">
          <table:covered-table-cell table:number-columns-repeated="5" table:style-name="ce7"/>
          <table:covered-table-cell table:number-columns-repeated="2" table:style-name="ce31"/>
          <table:table-cell table:style-name="ce32" office:value-type="float" office:value="48" calcext:value-type="float">
            <text:p>48</text:p>
          </table:table-cell>
          <table:table-cell table:style-name="ce37" office:value-type="float" office:value="15714207" calcext:value-type="float">
            <text:p>15714207</text:p>
          </table:table-cell>
          <table:table-cell table:style-name="ce49" office:value-type="string" calcext:value-type="string">
            <text:p>ITEM 48 – SISTEMA DE CÂNULA PARA ARTROSCOPIA DE OMBRO E JOELHO COM OBTURADOR CANULADO ROSQUEADO <text:s text:c="3"/>EM TAMANHO E COMPRIMENTOS DIVERSOS, MATERIAL DESCARTÁVEL E USO ÚNICO. <text:s text:c="9"/></text:p>
          </table:table-cell>
          <table:table-cell table:style-name="ce58" office:value-type="float" office:value="2" calcext:value-type="float">
            <text:p>2</text:p>
          </table:table-cell>
          <table:table-cell table:style-name="ce65" office:value-type="currency" office:currency="BRL" office:value="350" calcext:value-type="currency">
            <text:p>R$ 350,00</text:p>
          </table:table-cell>
          <table:table-cell table:style-name="ce71" table:formula="of:=[.K11]*[.L11]" office:value-type="float" office:value="700" calcext:value-type="float">
            <text:p><text:s/>700,00 </text:p>
          </table:table-cell>
          <table:covered-table-cell table:style-name="ce73" table:formula="of:=SUM([.M11])" office:value-type="float" office:value="700" calcext:value-type="float">
            <text:p><text:s/>700,00 </text:p>
          </table:covered-table-cell>
          <table:table-cell/>
          <table:table-cell table:style-name="ce74"/>
          <table:table-cell table:number-columns-repeated="1008"/>
        </table:table-row>
        <table:table-row table:style-name="ro4">
          <table:covered-table-cell table:style-name="ce6"/>
          <table:covered-table-cell table:style-name="ce13"/>
          <table:covered-table-cell table:style-name="ce18"/>
          <table:covered-table-cell table:style-name="ce19"/>
          <table:covered-table-cell table:style-name="ce24"/>
          <table:covered-table-cell table:number-columns-repeated="2" table:style-name="ce31"/>
          <table:table-cell table:style-name="ce32" office:value-type="float" office:value="49" calcext:value-type="float">
            <text:p>49</text:p>
          </table:table-cell>
          <table:table-cell table:style-name="ce37" office:value-type="float" office:value="15714212" calcext:value-type="float">
            <text:p>15714212</text:p>
          </table:table-cell>
          <table:table-cell table:style-name="ce49" office:value-type="string" calcext:value-type="string">
            <text:p>ITEM 49 – PONTEIRA DE RADIOFREQUÊNCIA DESCARTÁVEL 90 GRAUS.</text:p>
          </table:table-cell>
          <table:table-cell table:style-name="ce58" office:value-type="float" office:value="1" calcext:value-type="float">
            <text:p>1</text:p>
          </table:table-cell>
          <table:table-cell table:style-name="ce65" office:value-type="currency" office:currency="BRL" office:value="1900" calcext:value-type="currency">
            <text:p>R$ 1.900,00</text:p>
          </table:table-cell>
          <table:table-cell table:style-name="ce71" table:formula="of:=[.K12]*[.L12]" office:value-type="float" office:value="1900" calcext:value-type="float">
            <text:p><text:s/>1.900,00 </text:p>
          </table:table-cell>
          <table:covered-table-cell table:style-name="ce73" table:formula="of:=SUM([.M12])" office:value-type="float" office:value="1900" calcext:value-type="float">
            <text:p><text:s/>1.900,00 </text:p>
          </table:covered-table-cell>
          <table:table-cell/>
          <table:table-cell table:style-name="ce74"/>
          <table:table-cell table:number-columns-repeated="1008"/>
        </table:table-row>
        <table:table-row table:style-name="ro4">
          <table:table-cell table:style-name="ce6" office:value-type="float" office:value="2" calcext:value-type="float" table:number-columns-spanned="1" table:number-rows-spanned="6">
            <text:p>2</text:p>
          </table:table-cell>
          <table:table-cell table:style-name="ce13" office:value-type="string" calcext:value-type="string" table:number-columns-spanned="1" table:number-rows-spanned="6">
            <text:p>87.1913.51</text:p>
          </table:table-cell>
          <table:table-cell table:style-name="ce18" office:value-type="string" calcext:value-type="string" table:number-columns-spanned="1" table:number-rows-spanned="6">
            <text:p>LFP</text:p>
          </table:table-cell>
          <table:table-cell table:style-name="ce19" office:value-type="date" office:date-value="2026-06-24" calcext:value-type="date" table:number-columns-spanned="1" table:number-rows-spanned="6">
            <text:p>24/06/26</text:p>
          </table:table-cell>
          <table:table-cell table:style-name="ce23" office:value-type="string" calcext:value-type="string" table:number-columns-spanned="1" table:number-rows-spanned="6">
            <text:p>REPARO ARTROSCOPICO <text:s/>DE BANKART À ESQUERDA </text:p>
          </table:table-cell>
          <table:table-cell table:style-name="ce31" office:value-type="float" office:value="246" calcext:value-type="float" table:number-columns-spanned="1" table:number-rows-spanned="6">
            <text:p>246</text:p>
          </table:table-cell>
          <table:table-cell table:style-name="ce31" table:number-columns-spanned="1" table:number-rows-spanned="6"/>
          <table:table-cell table:style-name="ce32" office:value-type="float" office:value="30" calcext:value-type="float">
            <text:p>30</text:p>
          </table:table-cell>
          <table:table-cell table:style-name="ce33" office:value-type="float" office:value="15714209" calcext:value-type="float">
            <text:p>15714209</text:p>
          </table:table-cell>
          <table:table-cell table:style-name="ce46" office:value-type="string" calcext:value-type="string">
            <text:p>ITEM 30 – EQUIPO ESPECIAL, APLICAÇÃO P/ARTROSCOPIA , VIAS DUAS VIIAS, CARACTERÍSTICAS ADICIONAIS P/BOMBA <text:s text:c="2"/>DE INFUSÃO DE ALTO FLUXO.</text:p>
          </table:table-cell>
          <table:table-cell table:style-name="ce58" office:value-type="float" office:value="1" calcext:value-type="float">
            <text:p>1</text:p>
          </table:table-cell>
          <table:table-cell table:style-name="ce65" office:value-type="currency" office:currency="BRL" office:value="330" calcext:value-type="currency">
            <text:p>R$ 330,00</text:p>
          </table:table-cell>
          <table:table-cell table:style-name="ce71" table:formula="of:=[.K13]*[.L13]" office:value-type="float" office:value="330" calcext:value-type="float">
            <text:p><text:s/>330,00 </text:p>
          </table:table-cell>
          <table:table-cell table:style-name="ce73" table:formula="of:=SUM([.M13:.M18])" office:value-type="float" office:value="9224" calcext:value-type="float" table:number-columns-spanned="1" table:number-rows-spanned="6">
            <text:p><text:s/>9.224,00 </text:p>
          </table:table-cell>
          <table:table-cell/>
          <table:table-cell table:style-name="ce74"/>
          <table:table-cell table:number-columns-repeated="1008"/>
        </table:table-row>
        <table:table-row table:style-name="ro4">
          <table:covered-table-cell table:style-name="ce6"/>
          <table:covered-table-cell table:style-name="ce13"/>
          <table:covered-table-cell table:style-name="ce18"/>
          <table:covered-table-cell table:style-name="ce19"/>
          <table:covered-table-cell table:style-name="ce23"/>
          <table:covered-table-cell table:number-columns-repeated="2" table:style-name="ce31"/>
          <table:table-cell table:style-name="ce32" office:value-type="float" office:value="40" calcext:value-type="float">
            <text:p>40</text:p>
          </table:table-cell>
          <table:table-cell table:style-name="ce38" office:value-type="string" calcext:value-type="string">
            <text:p>BR3321493</text:p>
          </table:table-cell>
          <table:table-cell table:style-name="ce50" office:value-type="string" calcext:value-type="string">
            <text:p>ITEM 40 – SISTEMA DE PASSADOR DE FIO/SUTURA DO TIPO FIRST PASS OU SCORPION E FIOS DE ALTA RESISTÊNCIA, PARA CIRURGIA DO OMBRO.</text:p>
          </table:table-cell>
          <table:table-cell table:style-name="ce58" office:value-type="float" office:value="1" calcext:value-type="float">
            <text:p>1</text:p>
          </table:table-cell>
          <table:table-cell table:style-name="ce65" office:value-type="currency" office:currency="BRL" office:value="449" calcext:value-type="currency">
            <text:p>R$ 449,00</text:p>
          </table:table-cell>
          <table:table-cell table:style-name="ce71" table:formula="of:=[.K14]*[.L14]" office:value-type="float" office:value="449" calcext:value-type="float">
            <text:p><text:s/>449,00 </text:p>
          </table:table-cell>
          <table:covered-table-cell table:style-name="ce73"/>
          <table:table-cell/>
          <table:table-cell table:style-name="ce74"/>
          <table:table-cell table:number-columns-repeated="1008"/>
        </table:table-row>
        <table:table-row table:style-name="ro6">
          <table:covered-table-cell table:number-columns-repeated="5" table:style-name="ce7"/>
          <table:covered-table-cell table:number-columns-repeated="2" table:style-name="ce31"/>
          <table:table-cell table:style-name="ce32" office:value-type="float" office:value="41" calcext:value-type="float">
            <text:p>41</text:p>
          </table:table-cell>
          <table:table-cell table:style-name="ce39" office:value-type="string" calcext:value-type="string">
            <text:p>BR3321494</text:p>
          </table:table-cell>
          <table:table-cell table:style-name="ce51" office:value-type="string" calcext:value-type="string">
            <text:p>ITEM 41 – SISTEMA DE LÂMINAS DE MICRODEBRIDAÇÃO DE OMBRO, PARA TECIDOS MOLES E OSSEOS , EM AÇO, CONTROLE MANUAL, <text:s text:c="2"/>PEÇA DE MÃO, PONTAS LISAS, DENTADAS E OU DUPLO DENTADAS EM DIVERSOS TAMANHOS, USO ÚNICO.</text:p>
          </table:table-cell>
          <table:table-cell table:style-name="ce58" office:value-type="float" office:value="1" calcext:value-type="float">
            <text:p>1</text:p>
          </table:table-cell>
          <table:table-cell table:style-name="ce65" office:value-type="currency" office:currency="BRL" office:value="375" calcext:value-type="currency">
            <text:p>R$ 375,00</text:p>
          </table:table-cell>
          <table:table-cell table:style-name="ce71" table:formula="of:=[.K15]*[.L15]" office:value-type="float" office:value="375" calcext:value-type="float">
            <text:p><text:s/>375,00 </text:p>
          </table:table-cell>
          <table:covered-table-cell table:style-name="ce73" table:formula="of:=SUM([.M15])" office:value-type="float" office:value="375" calcext:value-type="float">
            <text:p><text:s/>375,00 </text:p>
          </table:covered-table-cell>
          <table:table-cell/>
          <table:table-cell table:style-name="ce74"/>
          <table:table-cell table:number-columns-repeated="1008"/>
        </table:table-row>
        <table:table-row table:style-name="ro7">
          <table:covered-table-cell table:number-columns-repeated="5" table:style-name="ce7"/>
          <table:covered-table-cell table:number-columns-repeated="2" table:style-name="ce31"/>
          <table:table-cell table:style-name="ce32" office:value-type="float" office:value="46" calcext:value-type="float">
            <text:p>46</text:p>
          </table:table-cell>
          <table:table-cell table:style-name="ce40" office:value-type="float" office:value="15714203" calcext:value-type="float">
            <text:p>15714203</text:p>
          </table:table-cell>
          <table:table-cell table:style-name="ce52" office:value-type="string" calcext:value-type="string">
            <text:p>ITEM 46 – ÂNCORA <text:s/>BIOABSORVÍVEL AB <text:s/>5.0 MM <text:s/>(ROSQUEÁVEL) ESTÉRIL PLLA, <text:s/>COM 2 FIOS DE SUTURAS, <text:s/>PARA FRESA DILATADORA COM MARCAÇÃO DE <text:s text:c="2"/>PROFUNDIDADE, GUIA DE INSTALAÇÃO <text:s text:c="2"/>E INSTRUMENTAL DE COLOCAÇÃO.</text:p>
          </table:table-cell>
          <table:table-cell table:style-name="ce58" office:value-type="float" office:value="3" calcext:value-type="float">
            <text:p>3</text:p>
          </table:table-cell>
          <table:table-cell table:style-name="ce65" office:value-type="currency" office:currency="BRL" office:value="1940" calcext:value-type="currency">
            <text:p>R$ 1.940,00</text:p>
          </table:table-cell>
          <table:table-cell table:style-name="ce71" table:formula="of:=[.K16]*[.L16]" office:value-type="float" office:value="5820" calcext:value-type="float">
            <text:p><text:s/>5.820,00 </text:p>
          </table:table-cell>
          <table:covered-table-cell table:style-name="ce73" table:formula="of:=SUM([.M16])" office:value-type="float" office:value="5820" calcext:value-type="float">
            <text:p><text:s/>5.820,00 </text:p>
          </table:covered-table-cell>
          <table:table-cell/>
          <table:table-cell table:style-name="ce74"/>
          <table:table-cell table:number-columns-repeated="1008"/>
        </table:table-row>
        <table:table-row table:style-name="ro7">
          <table:covered-table-cell table:style-name="ce6"/>
          <table:covered-table-cell table:style-name="ce13"/>
          <table:covered-table-cell table:style-name="ce18"/>
          <table:covered-table-cell table:style-name="ce19"/>
          <table:covered-table-cell table:style-name="ce24"/>
          <table:covered-table-cell table:number-columns-repeated="2" table:style-name="ce31"/>
          <table:table-cell table:style-name="ce32" office:value-type="float" office:value="48" calcext:value-type="float">
            <text:p>48</text:p>
          </table:table-cell>
          <table:table-cell table:style-name="ce41" office:value-type="float" office:value="15714207" calcext:value-type="float">
            <text:p>15714207</text:p>
          </table:table-cell>
          <table:table-cell table:style-name="ce53" office:value-type="string" calcext:value-type="string">
            <text:p>ITEM 48 – SISTEMA DE CÂNULA PARA ARTROSCOPIA DE OMBRO E JOELHO COM OBTURADOR CANULADO ROSQUEADO <text:s text:c="3"/>EM TAMANHO E COMPRIMENTOS DIVERSOS, MATERIAL DESCARTÁVEL E USO ÚNICO. <text:s text:c="9"/></text:p>
          </table:table-cell>
          <table:table-cell table:style-name="ce58" office:value-type="float" office:value="1" calcext:value-type="float">
            <text:p>1</text:p>
          </table:table-cell>
          <table:table-cell table:style-name="ce65" office:value-type="currency" office:currency="BRL" office:value="350" calcext:value-type="currency">
            <text:p>R$ 350,00</text:p>
          </table:table-cell>
          <table:table-cell table:style-name="ce71" table:formula="of:=[.K17]*[.L17]" office:value-type="float" office:value="350" calcext:value-type="float">
            <text:p><text:s/>350,00 </text:p>
          </table:table-cell>
          <table:covered-table-cell table:style-name="ce73" table:formula="of:=SUM([.M17])" office:value-type="float" office:value="350" calcext:value-type="float">
            <text:p><text:s/>350,00 </text:p>
          </table:covered-table-cell>
          <table:table-cell/>
          <table:table-cell table:style-name="ce74"/>
          <table:table-cell table:number-columns-repeated="1008"/>
        </table:table-row>
        <table:table-row table:style-name="ro4">
          <table:covered-table-cell table:style-name="ce6"/>
          <table:covered-table-cell table:number-columns-repeated="4" table:style-name="ce7"/>
          <table:covered-table-cell table:number-columns-repeated="2" table:style-name="ce31"/>
          <table:table-cell table:style-name="ce32" office:value-type="float" office:value="49" calcext:value-type="float">
            <text:p>49</text:p>
          </table:table-cell>
          <table:table-cell table:style-name="ce41" office:value-type="float" office:value="15714212" calcext:value-type="float">
            <text:p>15714212</text:p>
          </table:table-cell>
          <table:table-cell table:style-name="ce53" office:value-type="string" calcext:value-type="string">
            <text:p>ITEM 49 – PONTEIRA DE RADIOFREQUÊNCIA DESCARTÁVEL 90 GRAUS.</text:p>
          </table:table-cell>
          <table:table-cell table:style-name="ce58" office:value-type="float" office:value="1" calcext:value-type="float">
            <text:p>1</text:p>
          </table:table-cell>
          <table:table-cell table:style-name="ce65" office:value-type="currency" office:currency="BRL" office:value="1900" calcext:value-type="currency">
            <text:p>R$ 1.900,00</text:p>
          </table:table-cell>
          <table:table-cell table:style-name="ce71" table:formula="of:=[.K18]*[.L18]" office:value-type="float" office:value="1900" calcext:value-type="float">
            <text:p><text:s/>1.900,00 </text:p>
          </table:table-cell>
          <table:covered-table-cell table:style-name="ce73" table:formula="of:=SUM([.M18])" office:value-type="float" office:value="1900" calcext:value-type="float">
            <text:p><text:s/>1.900,00 </text:p>
          </table:covered-table-cell>
          <table:table-cell/>
          <table:table-cell table:style-name="ce74"/>
          <table:table-cell table:number-columns-repeated="1008"/>
        </table:table-row>
        <table:table-row table:style-name="ro8">
          <table:table-cell/>
          <table:table-cell table:style-name="ce14"/>
          <table:table-cell table:number-columns-repeated="10"/>
          <table:table-cell table:formula="of:=SUM([.M7:.M18])" office:value-type="float" office:value="19575" calcext:value-type="float">
            <text:p><text:s/>19.575,00 </text:p>
          </table:table-cell>
          <table:table-cell table:formula="of:=SUM([.N7:.N18])" office:value-type="float" office:value="37592" calcext:value-type="float">
            <text:p><text:s/>37.592,00 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 table:number-columns-spanned="12" table:number-rows-spanned="1">
            <text:p>1)O processo de renovação da licitação do material consignado deverá ser iniciado pelas respectivas clínicas,no mínimo,com 6 meses de antecedência.</text:p>
          </table:table-cell>
          <table:covered-table-cell table:number-columns-repeated="3" table:style-name="ce8"/>
          <table:covered-table-cell table:style-name="ce25"/>
          <table:covered-table-cell table:number-columns-repeated="4" table:style-name="ce8"/>
          <table:covered-table-cell table:style-name="ce25"/>
          <table:covered-table-cell table:style-name="ce8"/>
          <table:covered-table-cell table:style-name="ce66"/>
          <table:table-cell table:number-columns-repeated="1012"/>
        </table:table-row>
        <table:table-row table:style-name="ro2">
          <table:table-cell table:style-name="ce9" office:value-type="string" calcext:value-type="string" table:number-columns-spanned="12" table:number-rows-spanned="1">
            <text:p>2)Em princípio, a data do procedimento não poderá ocorrer após da vigência do processo licitatório.</text:p>
          </table:table-cell>
          <table:covered-table-cell table:number-columns-repeated="3" table:style-name="ce9"/>
          <table:covered-table-cell table:style-name="ce26"/>
          <table:covered-table-cell table:number-columns-repeated="4" table:style-name="ce9"/>
          <table:covered-table-cell table:style-name="ce26"/>
          <table:covered-table-cell table:style-name="ce9"/>
          <table:covered-table-cell table:style-name="ce67"/>
          <table:table-cell table:number-columns-repeated="1012"/>
        </table:table-row>
        <table:table-row table:style-name="ro2">
          <table:table-cell table:style-name="ce10" office:value-type="string" calcext:value-type="string" table:number-columns-spanned="2" table:number-rows-spanned="1">
            <text:p>Observação:</text:p>
          </table:table-cell>
          <table:covered-table-cell table:style-name="ce10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4" table:number-rows-spanned="1">
            <text:p>________________________</text:p>
          </table:table-cell>
          <table:covered-table-cell table:number-columns-repeated="3" table:style-name="ce10"/>
          <table:table-cell/>
          <table:table-cell table:style-name="ce10" office:value-type="string" calcext:value-type="string" table:number-columns-spanned="3" table:number-rows-spanned="1">
            <text:p>________________________</text:p>
          </table:table-cell>
          <table:covered-table-cell table:number-columns-repeated="2" table:style-name="ce10"/>
          <table:table-cell table:style-name="ce10"/>
          <table:table-cell table:style-name="ce54" office:value-type="string" calcext:value-type="string" table:number-columns-spanned="4" table:number-rows-spanned="1">
            <text:p>________________________</text:p>
          </table:table-cell>
          <table:covered-table-cell table:style-name="ce10"/>
          <table:covered-table-cell table:style-name="ce68"/>
          <table:covered-table-cell table:style-name="ce10"/>
          <table:table-cell table:number-columns-repeated="1011"/>
        </table:table-row>
        <table:table-row table:style-name="ro1">
          <table:table-cell table:style-name="ce10" office:value-type="string" calcext:value-type="string" table:number-columns-spanned="4" table:number-rows-spanned="1">
            <text:p>Chefe da Clínica</text:p>
          </table:table-cell>
          <table:covered-table-cell table:number-columns-repeated="3" table:style-name="ce10"/>
          <table:table-cell/>
          <table:table-cell table:style-name="ce10" office:value-type="string" calcext:value-type="string" table:number-columns-spanned="3" table:number-rows-spanned="1">
            <text:p>Enc Consignado</text:p>
          </table:table-cell>
          <table:covered-table-cell table:number-columns-repeated="2" table:style-name="ce10"/>
          <table:table-cell table:style-name="ce10"/>
          <table:table-cell table:style-name="ce54" office:value-type="string" calcext:value-type="string" table:number-columns-spanned="4" table:number-rows-spanned="1">
            <text:p><text:s text:c="3"/>Ecônomo</text:p>
          </table:table-cell>
          <table:covered-table-cell table:style-name="ce10"/>
          <table:covered-table-cell table:style-name="ce68"/>
          <table:covered-table-cell table:style-name="ce10"/>
          <table:table-cell table:number-columns-repeated="1011"/>
        </table:table-row>
        <table:table-row table:style-name="ro2" table:number-rows-repeated="1048474">
          <table:table-cell table:number-columns-repeated="1024"/>
        </table:table-row>
        <table:table-row table:style-name="ro9" table:number-rows-repeated="7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MODELO.$A$1" table:cell-range-address="$MODELO.$A$1:.$M$28" table:range-usable-as="print-range"/>
          <table:named-range table:name="Print_Area_0" table:base-cell-address="$MODELO.$A$1" table:cell-range-address="$MODELO.$A$1:.$M$28"/>
          <table:named-range table:name="Print_Area_0_0" table:base-cell-address="$MODELO.$A$1" table:cell-range-address="$MODELO.$A$1:.$M$28"/>
        </table:named-expressions>
        <calcext:conditional-formats>
          <calcext:conditional-format calcext:target-range-address="MODELO.I10:MODELO.I10">
            <calcext:condition calcext:apply-style-name="ConditionalStyle_2" calcext:value="duplicate" calcext:base-cell-address="MODELO.I10"/>
          </calcext:conditional-format>
          <calcext:conditional-format calcext:target-range-address="MODELO.I10:MODELO.I10">
            <calcext:condition calcext:apply-style-name="ConditionalStyle_2" calcext:value="duplicate" calcext:base-cell-address="MODELO.I10"/>
          </calcext:conditional-format>
          <calcext:conditional-format calcext:target-range-address="MODELO.I10:MODELO.I10">
            <calcext:condition calcext:apply-style-name="ConditionalStyle_2" calcext:value="duplicate" calcext:base-cell-address="MODELO.I10"/>
          </calcext:conditional-format>
          <calcext:conditional-format calcext:target-range-address="MODELO.I10:MODELO.I10">
            <calcext:condition calcext:apply-style-name="ConditionalStyle_2" calcext:value="duplicate" calcext:base-cell-address="MODELO.I10"/>
          </calcext:conditional-format>
          <calcext:conditional-format calcext:target-range-address="MODELO.J15:MODELO.J15">
            <calcext:condition calcext:apply-style-name="ConditionalStyle_1" calcext:value="duplicate" calcext:base-cell-address="MODELO.J15"/>
          </calcext:conditional-format>
          <calcext:conditional-format calcext:target-range-address="MODELO.I10:MODELO.I10">
            <calcext:condition calcext:apply-style-name="ConditionalStyle_2" calcext:value="duplicate" calcext:base-cell-address="MODELO.I10"/>
          </calcext:conditional-format>
          <calcext:conditional-format calcext:target-range-address="MODELO.I10:MODELO.I10">
            <calcext:condition calcext:apply-style-name="ConditionalStyle_2" calcext:value="duplicate" calcext:base-cell-address="MODELO.I10"/>
          </calcext:conditional-format>
          <calcext:conditional-format calcext:target-range-address="MODELO.I10:MODELO.I10">
            <calcext:condition calcext:apply-style-name="ConditionalStyle_2" calcext:value="duplicate" calcext:base-cell-address="MODELO.I10"/>
          </calcext:conditional-format>
          <calcext:conditional-format calcext:target-range-address="MODELO.I10:MODELO.I10">
            <calcext:condition calcext:apply-style-name="ConditionalStyle_2" calcext:value="duplicate" calcext:base-cell-address="MODELO.I10"/>
          </calcext:conditional-format>
          <calcext:conditional-format calcext:target-range-address="MODELO.J15:MODELO.J15">
            <calcext:condition calcext:apply-style-name="ConditionalStyle_1" calcext:value="duplicate" calcext:base-cell-address="MODELO.J15"/>
          </calcext:conditional-format>
          <calcext:conditional-format calcext:target-range-address="MODELO.I10:MODELO.I10">
            <calcext:condition calcext:apply-style-name="ConditionalStyle_2" calcext:value="duplicate" calcext:base-cell-address="MODELO.I10"/>
          </calcext:conditional-format>
          <calcext:conditional-format calcext:target-range-address="MODELO.J15:MODELO.J15">
            <calcext:condition calcext:apply-style-name="ConditionalStyle_1" calcext:value="duplicate" calcext:base-cell-address="MODELO.J15"/>
          </calcext:conditional-format>
          <calcext:conditional-format calcext:target-range-address="MODELO.I10:MODELO.I10">
            <calcext:condition calcext:apply-style-name="ConditionalStyle_2" calcext:value="duplicate" calcext:base-cell-address="MODELO.I10"/>
          </calcext:conditional-format>
          <calcext:conditional-format calcext:target-range-address="MODELO.J15:MODELO.J15">
            <calcext:condition calcext:apply-style-name="ConditionalStyle_1" calcext:value="duplicate" calcext:base-cell-address="MODELO.J15"/>
          </calcext:conditional-format>
          <calcext:conditional-format calcext:target-range-address="MODELO.I10:MODELO.I10">
            <calcext:condition calcext:apply-style-name="ConditionalStyle_2" calcext:value="duplicate" calcext:base-cell-address="MODELO.I10"/>
          </calcext:conditional-format>
          <calcext:conditional-format calcext:target-range-address="MODELO.J15:MODELO.J15">
            <calcext:condition calcext:apply-style-name="ConditionalStyle_1" calcext:value="duplicate" calcext:base-cell-address="MODELO.J15"/>
          </calcext:conditional-format>
          <calcext:conditional-format calcext:target-range-address="MODELO.I10:MODELO.I10">
            <calcext:condition calcext:apply-style-name="ConditionalStyle_2" calcext:value="duplicate" calcext:base-cell-address="MODELO.I10"/>
          </calcext:conditional-format>
          <calcext:conditional-format calcext:target-range-address="MODELO.J15:MODELO.J15">
            <calcext:condition calcext:apply-style-name="ConditionalStyle_1" calcext:value="duplicate" calcext:base-cell-address="MODELO.J15"/>
          </calcext:conditional-format>
          <calcext:conditional-format calcext:target-range-address="MODELO.I10:MODELO.I10">
            <calcext:condition calcext:apply-style-name="ConditionalStyle_2" calcext:value="duplicate" calcext:base-cell-address="MODELO.I10"/>
          </calcext:conditional-format>
          <calcext:conditional-format calcext:target-range-address="MODELO.J15:MODELO.J15">
            <calcext:condition calcext:apply-style-name="ConditionalStyle_1" calcext:value="duplicate" calcext:base-cell-address="MODELO.J15"/>
          </calcext:conditional-format>
          <calcext:conditional-format calcext:target-range-address="MODELO.I10:MODELO.I10">
            <calcext:condition calcext:apply-style-name="ConditionalStyle_2" calcext:value="duplicate" calcext:base-cell-address="MODELO.I10"/>
          </calcext:conditional-format>
          <calcext:conditional-format calcext:target-range-address="MODELO.J15:MODELO.J15">
            <calcext:condition calcext:apply-style-name="ConditionalStyle_1" calcext:value="duplicate" calcext:base-cell-address="MODELO.J15"/>
          </calcext:conditional-format>
          <calcext:conditional-format calcext:target-range-address="MODELO.I10:MODELO.I10">
            <calcext:condition calcext:apply-style-name="ConditionalStyle_2" calcext:value="duplicate" calcext:base-cell-address="MODELO.I10"/>
          </calcext:conditional-format>
          <calcext:conditional-format calcext:target-range-address="MODELO.J15:MODELO.J15">
            <calcext:condition calcext:apply-style-name="ConditionalStyle_1" calcext:value="duplicate" calcext:base-cell-address="MODELO.J15"/>
          </calcext:conditional-format>
          <calcext:conditional-format calcext:target-range-address="MODELO.I10:MODELO.I10">
            <calcext:condition calcext:apply-style-name="ConditionalStyle_2" calcext:value="duplicate" calcext:base-cell-address="MODELO.I10"/>
          </calcext:conditional-format>
          <calcext:conditional-format calcext:target-range-address="MODELO.J15:MODELO.J15">
            <calcext:condition calcext:apply-style-name="ConditionalStyle_1" calcext:value="duplicate" calcext:base-cell-address="MODELO.J15"/>
          </calcext:conditional-format>
          <calcext:conditional-format calcext:target-range-address="MODELO.I10:MODELO.I10">
            <calcext:condition calcext:apply-style-name="ConditionalStyle_2" calcext:value="duplicate" calcext:base-cell-address="MODELO.I10"/>
          </calcext:conditional-format>
          <calcext:conditional-format calcext:target-range-address="MODELO.J15:MODELO.J15">
            <calcext:condition calcext:apply-style-name="ConditionalStyle_1" calcext:value="duplicate" calcext:base-cell-address="MODELO.J15"/>
          </calcext:conditional-format>
          <calcext:conditional-format calcext:target-range-address="MODELO.I10:MODELO.I10">
            <calcext:condition calcext:apply-style-name="ConditionalStyle_2" calcext:value="duplicate" calcext:base-cell-address="MODELO.I10"/>
          </calcext:conditional-format>
          <calcext:conditional-format calcext:target-range-address="MODELO.J15:MODELO.J15">
            <calcext:condition calcext:apply-style-name="ConditionalStyle_1" calcext:value="duplicate" calcext:base-cell-address="MODELO.J15"/>
          </calcext:conditional-format>
          <calcext:conditional-format calcext:target-range-address="MODELO.I10:MODELO.I10">
            <calcext:condition calcext:apply-style-name="ConditionalStyle_2" calcext:value="duplicate" calcext:base-cell-address="MODELO.I10"/>
          </calcext:conditional-format>
          <calcext:conditional-format calcext:target-range-address="MODELO.I11:MODELO.I12">
            <calcext:condition calcext:apply-style-name="ConditionalStyle_2" calcext:value="duplicate" calcext:base-cell-address="MODELO.I11"/>
          </calcext:conditional-format>
          <calcext:conditional-format calcext:target-range-address="MODELO.J11:MODELO.J12">
            <calcext:condition calcext:apply-style-name="ConditionalStyle_1" calcext:value="duplicate" calcext:base-cell-address="MODELO.J11"/>
          </calcext:conditional-format>
          <calcext:conditional-format calcext:target-range-address="MODELO.J9:MODELO.J10">
            <calcext:condition calcext:apply-style-name="ConditionalStyle_1" calcext:value="duplicate" calcext:base-cell-address="MODELO.J9"/>
          </calcext:conditional-format>
          <calcext:conditional-format calcext:target-range-address="MODELO.J15:MODELO.J15">
            <calcext:condition calcext:apply-style-name="ConditionalStyle_1" calcext:value="duplicate" calcext:base-cell-address="MODELO.J15"/>
          </calcext:conditional-format>
          <calcext:conditional-format calcext:target-range-address="MODELO.I17:MODELO.I18">
            <calcext:condition calcext:apply-style-name="ConditionalStyle_2" calcext:value="duplicate" calcext:base-cell-address="MODELO.I17"/>
          </calcext:conditional-format>
          <calcext:conditional-format calcext:target-range-address="MODELO.J17:MODELO.J18">
            <calcext:condition calcext:apply-style-name="ConditionalStyle_1" calcext:value="duplicate" calcext:base-cell-address="MODELO.J17"/>
          </calcext:conditional-format>
          <calcext:conditional-format calcext:target-range-address="MODELO.I16:MODELO.I16">
            <calcext:condition calcext:apply-style-name="ConditionalStyle_2" calcext:value="duplicate" calcext:base-cell-address="MODELO.I16"/>
          </calcext:conditional-format>
          <calcext:conditional-format calcext:target-range-address="MODELO.J16:MODELO.J16">
            <calcext:condition calcext:apply-style-name="ConditionalStyle_1" calcext:value="duplicate" calcext:base-cell-address="MODELO.J16"/>
          </calcext:conditional-format>
          <calcext:conditional-format calcext:target-range-address="MODELO.I9:MODELO.I9">
            <calcext:condition calcext:apply-style-name="ConditionalStyle_2" calcext:value="duplicate" calcext:base-cell-address="MODELO.I9"/>
          </calcext:conditional-format>
          <calcext:conditional-format calcext:target-range-address="MODELO.I15:MODELO.I15">
            <calcext:condition calcext:apply-style-name="ConditionalStyle_2" calcext:value="duplicate" calcext:base-cell-address="MODELO.I15"/>
          </calcext:conditional-format>
          <calcext:conditional-format calcext:target-range-address="MODELO.I8:MODELO.I8">
            <calcext:condition calcext:apply-style-name="ConditionalStyle_2" calcext:value="duplicate" calcext:base-cell-address="MODELO.I8"/>
          </calcext:conditional-format>
          <calcext:conditional-format calcext:target-range-address="MODELO.J8:MODELO.J8">
            <calcext:condition calcext:apply-style-name="ConditionalStyle_1" calcext:value="duplicate" calcext:base-cell-address="MODELO.J8"/>
          </calcext:conditional-format>
          <calcext:conditional-format calcext:target-range-address="MODELO.I14:MODELO.I14">
            <calcext:condition calcext:apply-style-name="ConditionalStyle_2" calcext:value="duplicate" calcext:base-cell-address="MODELO.I14"/>
          </calcext:conditional-format>
          <calcext:conditional-format calcext:target-range-address="MODELO.J14:MODELO.J14">
            <calcext:condition calcext:apply-style-name="ConditionalStyle_1" calcext:value="duplicate" calcext:base-cell-address="MODELO.J14"/>
          </calcext:conditional-format>
        </calcext:conditional-formats>
      </table:table>
      <table:table table:name="LISTA DE MATERIAIS" table:style-name="ta2">
        <office:forms form:automatic-focus="false" form:apply-design-mode="false"/>
        <table:table-column table:style-name="co17" table:visibility="collapse" table:default-cell-style-name="ce77"/>
        <table:table-column table:style-name="co18" table:default-cell-style-name="ce94"/>
        <table:table-column table:style-name="co19" table:default-cell-style-name="ce94"/>
        <table:table-column table:style-name="co20" table:default-cell-style-name="ce105"/>
        <table:table-column table:style-name="co18" table:default-cell-style-name="ce94"/>
        <table:table-column table:style-name="co21" table:default-cell-style-name="ce119"/>
        <table:table-column table:style-name="co22" table:default-cell-style-name="ce76"/>
        <table:table-column table:style-name="co18" table:default-cell-style-name="ce76"/>
        <table:table-column table:style-name="co23" table:default-cell-style-name="ce76"/>
        <table:table-column table:style-name="co24" table:default-cell-style-name="ce76"/>
        <table:table-column table:style-name="co23" table:number-columns-repeated="243" table:default-cell-style-name="ce76"/>
        <table:table-column table:style-name="co23" table:number-columns-repeated="767" table:default-cell-style-name="ce136"/>
        <table:table-column table:style-name="co23" table:number-columns-repeated="4" table:default-cell-style-name="Default"/>
        <table:table-row table:style-name="ro2">
          <table:table-cell table:style-name="ce76"/>
          <table:table-cell table:style-name="ce80" office:value-type="string" calcext:value-type="string" table:number-columns-spanned="8" table:number-rows-spanned="1">
            <text:p>MARINHA DO BRASIL</text:p>
          </table:table-cell>
          <table:covered-table-cell table:number-columns-repeated="7" table:style-name="ce95"/>
          <table:table-cell table:style-name="ce93" table:number-columns-repeated="2"/>
          <table:table-cell table:number-columns-repeated="1013"/>
        </table:table-row>
        <table:table-row table:style-name="ro2">
          <table:table-cell table:style-name="ce76"/>
          <table:table-cell table:style-name="ce80" office:value-type="string" calcext:value-type="string" table:number-columns-spanned="8" table:number-rows-spanned="1">
            <text:p>CENTRO DE OBTENÇÃO DA MARINHA NO RIO DE JANEIRO</text:p>
          </table:table-cell>
          <table:covered-table-cell table:number-columns-repeated="7" table:style-name="ce95"/>
          <table:table-cell table:style-name="ce93" table:number-columns-repeated="2"/>
          <table:table-cell table:number-columns-repeated="1013"/>
        </table:table-row>
        <table:table-row table:style-name="ro2">
          <table:table-cell/>
          <table:table-cell table:style-name="ce80" office:value-type="string" calcext:value-type="string" table:number-columns-spanned="8" table:number-rows-spanned="1">
            <text:p>APÊNDICE III - PE 90058/2025</text:p>
          </table:table-cell>
          <table:covered-table-cell table:number-columns-repeated="7" table:style-name="ce95"/>
          <table:table-cell table:style-name="ce93" table:number-columns-repeated="2"/>
          <table:table-cell table:number-columns-repeated="1013"/>
        </table:table-row>
        <table:table-row table:style-name="ro2">
          <table:table-cell table:style-name="ce76"/>
          <table:table-cell table:style-name="ce80" office:value-type="string" calcext:value-type="string" table:number-columns-spanned="8" table:number-rows-spanned="1">
            <text:p>RELAÇÃO DE ITENS </text:p>
          </table:table-cell>
          <table:covered-table-cell table:number-columns-repeated="7" table:style-name="ce95"/>
          <table:table-cell table:style-name="ce93" table:number-columns-repeated="2"/>
          <table:table-cell table:number-columns-repeated="1013"/>
        </table:table-row>
        <table:table-row table:style-name="ro2" table:number-rows-repeated="2">
          <table:table-cell table:style-name="ce78"/>
          <table:table-cell table:style-name="ce81" table:number-columns-repeated="8"/>
          <table:table-cell table:style-name="ce93" table:number-columns-repeated="2"/>
          <table:table-cell table:number-columns-repeated="1013"/>
        </table:table-row>
        <table:table-row table:style-name="ro2">
          <table:table-cell table:style-name="ce79"/>
          <table:table-cell table:style-name="ce81" table:number-columns-repeated="4"/>
          <table:table-cell table:style-name="ce106"/>
          <table:table-cell table:style-name="ce81" table:number-columns-repeated="3"/>
          <table:table-cell table:style-name="ce93" table:number-columns-repeated="2"/>
          <table:table-cell table:number-columns-repeated="1013"/>
        </table:table-row>
        <table:table-row table:style-name="ro10">
          <table:table-cell table:style-name="ce79"/>
          <table:table-cell table:style-name="ce82" office:value-type="string" calcext:value-type="string">
            <text:p>ITEM</text:p>
          </table:table-cell>
          <table:table-cell table:style-name="ce82" office:value-type="string" calcext:value-type="string">
            <text:p>PI</text:p>
          </table:table-cell>
          <table:table-cell table:style-name="ce82" office:value-type="string" calcext:value-type="string">
            <text:p>CATMAT</text:p>
          </table:table-cell>
          <table:table-cell table:style-name="ce82" office:value-type="string" calcext:value-type="string">
            <text:p>LOTE</text:p>
          </table:table-cell>
          <table:table-cell table:style-name="ce82" office:value-type="string" calcext:value-type="string">
            <text:p>ESPECIFICAÇÃO</text:p>
          </table:table-cell>
          <table:table-cell table:style-name="ce82" office:value-type="string" calcext:value-type="string">
            <text:p>UF</text:p>
          </table:table-cell>
          <table:table-cell table:style-name="ce82" office:value-type="string" calcext:value-type="string">
            <text:p>QTD MÍN.</text:p>
          </table:table-cell>
          <table:table-cell table:style-name="ce82" office:value-type="string" calcext:value-type="string">
            <text:p>QTD TOTAL</text:p>
          </table:table-cell>
          <table:table-cell table:style-name="ce93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1">
          <table:table-cell table:style-name="ce79"/>
          <table:table-cell table:style-name="ce83" office:value-type="float" office:value="1" calcext:value-type="float">
            <text:p>1</text:p>
          </table:table-cell>
          <table:table-cell table:style-name="ce96" office:value-type="string" calcext:value-type="string">
            <text:p>BR3335591</text:p>
          </table:table-cell>
          <table:table-cell table:style-name="ce104" office:value-type="float" office:value="318353" calcext:value-type="float">
            <text:p>318353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SISTEMA DE PLACAS LCP PARA FRATURAS DO OLECRANO DE ÂNGULO VARIAVEL, <text:s/>PLACAS FRATURAS ARTICULARES, JUSTA ARTICULAR E EXTRA ARTICULAR COM <text:s/>FUROS COMBINADOS, LADOS DIREITOS E ESQUERDOS, PARAFUSOS LCP <text:s/>3.5 <text:s/>E 2..7 <text:s/>BLOQUEADOS E CORTICAIS AUTOFREZANTES, PLACAS TAMANHOS 2, 4, 6, 8, 10 E 12 <text:s/>FUROS COMBINADOS PRE MOLDADAS COM INSTRUMENTAÇÃO DE COLOCAÇÃO, <text:s/>PINÇAS DE REDUÇÃO, AÇO NÃO MAGNÉTICO 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4" calcext:value-type="float">
            <text:p>4</text:p>
          </table:table-cell>
          <table:table-cell table:style-name="ce104" office:value-type="float" office:value="24" calcext:value-type="float">
            <text:p>24</text:p>
          </table:table-cell>
          <table:table-cell table:style-name="ce125" office:value-type="currency" office:currency="BRL" office:value="15200" calcext:value-type="currency">
            <text:p>R$ 15.2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2">
          <table:table-cell table:style-name="ce79"/>
          <table:table-cell table:style-name="ce83" office:value-type="float" office:value="2" calcext:value-type="float">
            <text:p>2</text:p>
          </table:table-cell>
          <table:table-cell table:style-name="ce96" office:value-type="string" calcext:value-type="string">
            <text:p>BR3335653</text:p>
          </table:table-cell>
          <table:table-cell table:style-name="ce104" office:value-type="float" office:value="318352" calcext:value-type="float">
            <text:p>318352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SISTEMA DE PLACAS LCP PEDIATRICA COM FUROS COMBINADOS, <text:s/>PLACAS 3.5 E 5.0 COM FUROS NA CABEÇA, NO CORPO COM A 3 A 4 FUROS, <text:s/>COM ANGULAÇÕES DE 100 GRAUS, 110 GRAUS, 120 GRAUS E 150 GRAUS, <text:s/>COM INSTRUMENTAS QUE PERMITEM ANGULAÇÕES NO ATO OPERATORIO, <text:s/>OSTEOTOMOS E INSTRUMENTAIS COM GUIAS ESPECIFICOS, BROCAS, FIOS <text:s/>GUIAS ROSQUEADOS, PARAFUSO LCP 3.5 E 5.0 STARDRIVE BLOQUEAD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6" calcext:value-type="float">
            <text:p>6</text:p>
          </table:table-cell>
          <table:table-cell table:style-name="ce104" office:value-type="float" office:value="24" calcext:value-type="float">
            <text:p>24</text:p>
          </table:table-cell>
          <table:table-cell table:style-name="ce125" office:value-type="currency" office:currency="BRL" office:value="14600" calcext:value-type="currency">
            <text:p>R$ 14.6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3">
          <table:table-cell table:style-name="ce79"/>
          <table:table-cell table:style-name="ce83" office:value-type="float" office:value="3" calcext:value-type="float">
            <text:p>3</text:p>
          </table:table-cell>
          <table:table-cell table:style-name="ce96" office:value-type="string" calcext:value-type="string">
            <text:p>BR3335661</text:p>
          </table:table-cell>
          <table:table-cell table:style-name="ce104" office:value-type="float" office:value="318814" calcext:value-type="float">
            <text:p>318814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SISTEMA DE PLACAS LCP 3,5 / 2,7 , PARA FRATURAS DISTAIS DO HUMERO, <text:s/>PRE MOLDADAS, POSTERO LATERAL, PLACA COM FIXAÇÃO DORSO LATERAL <text:s/>COM OU SEM SUPORTE E FIXAÇÃO MEDIAL, LADOS DIREITOS E ESQUERDOS, <text:s/>FUROS COMBINADOS CORTICAL E BLOQUEADO, PARAFUSOS STARDRIVES <text:s/>3,5 / 2,7 AUTOFREZANTES, PLACAS PRE MODELADAS COMPLACAS PRE <text:s/>MODELADAS COM TAMANHOS DE 3 A 16 FUROS COMBINADOS, COM <text:s/>INSTRUMENTAL PARA FIXAÇÃO MINIMA INVASIVA, AÇO NÃO MAGNETIC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8" calcext:value-type="float">
            <text:p>8</text:p>
          </table:table-cell>
          <table:table-cell table:style-name="ce104" office:value-type="float" office:value="24" calcext:value-type="float">
            <text:p>24</text:p>
          </table:table-cell>
          <table:table-cell table:style-name="ce125" office:value-type="currency" office:currency="BRL" office:value="16800" calcext:value-type="currency">
            <text:p>R$ 16.8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2">
          <table:table-cell table:style-name="ce79"/>
          <table:table-cell table:style-name="ce83" office:value-type="float" office:value="4" calcext:value-type="float">
            <text:p>4</text:p>
          </table:table-cell>
          <table:table-cell table:style-name="ce96" office:value-type="string" calcext:value-type="string">
            <text:p>BR3335670</text:p>
          </table:table-cell>
          <table:table-cell table:style-name="ce104" office:value-type="float" office:value="459059" calcext:value-type="float">
            <text:p>459059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SISTEMAS DE PLACAS 3.5 BAIXO PERFIL, PLACA SINFESE PUBIANA, <text:s/>PLACA EM ÂNGULO VARIÁVEL EM ATE 28 GRAUS EM AÇO NÃO MAGNÉTICO, <text:s/>COM PLACAS RETAS E CURVAS ANATÔMICAS E SISTEMA PARA MODELAGEM, <text:s/>ACOMPANHADO DE INSTRUMENTAL PELVICO A.O.PINCASOSSEAS, <text:s/>CLAMPES PÉLVICO PARA REDUÇÃO, PINOS DE SHANZ, BROCAS LONGAS E <text:s/>PARAFUSOS EXTRALONGOS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12" calcext:value-type="float">
            <text:p>12</text:p>
          </table:table-cell>
          <table:table-cell table:style-name="ce125" office:value-type="currency" office:currency="BRL" office:value="13600" calcext:value-type="currency">
            <text:p>R$ 13.6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3">
          <table:table-cell table:style-name="ce79"/>
          <table:table-cell table:style-name="ce83" office:value-type="float" office:value="5" calcext:value-type="float">
            <text:p>5</text:p>
          </table:table-cell>
          <table:table-cell table:style-name="ce96" office:value-type="string" calcext:value-type="string">
            <text:p>BR3233795</text:p>
          </table:table-cell>
          <table:table-cell table:style-name="ce104" office:value-type="string" calcext:value-type="string">
            <text:p>435679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Sistema de placa bloqueada 3,5 PARA <text:s/>PLATO TIBIAL DE ANGULOS VARIAVEIS, DUPLA FILEIRA , <text:s/>furos <text:s text:c="2"/>BLOQUEADOS combinados, aco não magnetico, parafusos bloqueados 3.5 ANGULOS VARIAVEIS <text:s/>e corticais <text:s text:c="2"/>3,5 autofresantes, acompanhados de instrumetais, pincas de reducao, BROCAS CALIBRADAS, GUIAS FIXOS <text:s/>E DE ANGULOS VARIAVEIS, PLACAS EM L E EM T , ATE A16 FUROS fios de kirshiner para reducao intraopertoria <text:s text:c="2"/>ou de melhor qualidade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100" calcext:value-type="float">
            <text:p>100</text:p>
          </table:table-cell>
          <table:table-cell table:style-name="ce125" office:value-type="currency" office:currency="BRL" office:value="15900" calcext:value-type="currency">
            <text:p>R$ 15.9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2">
          <table:table-cell table:style-name="ce79"/>
          <table:table-cell table:style-name="ce83" office:value-type="float" office:value="6" calcext:value-type="float">
            <text:p>6</text:p>
          </table:table-cell>
          <table:table-cell table:style-name="ce96" office:value-type="float" office:value="190050405" calcext:value-type="float">
            <text:p>190050405</text:p>
          </table:table-cell>
          <table:table-cell table:style-name="ce104" office:value-type="float" office:value="196910" calcext:value-type="float">
            <text:p>196910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SISTEMA DE FRESAGEM INTRAMEDULAR E EXTRAÇÃO DE TECIDO ÓSSEO. PONTEIRA DE FRESA COM SISTEMA <text:s text:c="2"/>DE TUBOS, RESFRIAMENTO CONSTANTE DO FLUXO DE IRRIGAÇÃO, ARESTAS CORTANTES E PORFUNDAS PARA <text:s text:c="2"/>EVITAR ENTUPIMENTO. ASPIRAÇÃO DA MEDULA ÓSSEA E TECIDO MORSELIZADO, FILTRO COM MALHA PARA <text:s text:c="2"/>CAPTAR A MEDULA ÓSSEA COM CAPACIDADE PARA 100CC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10" calcext:value-type="float">
            <text:p>10</text:p>
          </table:table-cell>
          <table:table-cell table:style-name="ce125" office:value-type="currency" office:currency="BRL" office:value="14100" calcext:value-type="currency">
            <text:p>R$ 14.1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4">
          <table:table-cell table:style-name="ce79"/>
          <table:table-cell table:style-name="ce83" office:value-type="float" office:value="7" calcext:value-type="float">
            <text:p>7</text:p>
          </table:table-cell>
          <table:table-cell table:style-name="ce96" office:value-type="float" office:value="190050417" calcext:value-type="float">
            <text:p>190050417</text:p>
          </table:table-cell>
          <table:table-cell table:style-name="ce104" office:value-type="float" office:value="150213" calcext:value-type="float">
            <text:p>150213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SISTEMA LCP DHHS, PLACA DE COMPRESSÃO BLOQUEADA COM LÂMINA ESPIRAL INTEGRADA. PLACAS DE <text:s text:c="2"/>2/3/4/5 E 6 FUROS DE 130 E 150 GRAUS, LÂMINA <text:s/>SPIRAL 75 A 150MM INCREMENTOS DE 5MM, PARAFUSO <text:s text:c="2"/>CORTICAL AUTOROSQUEANTE 4.5 E PARAFUSO DE BLOQUEIO LCP 5.0, PLACAS COM FUROS COMBINADOS <text:s text:c="2"/>VARIADO SE SISTEMA DE FIXAÇÃO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50" calcext:value-type="float">
            <text:p>50</text:p>
          </table:table-cell>
          <table:table-cell table:style-name="ce125" office:value-type="currency" office:currency="BRL" office:value="8600" calcext:value-type="currency">
            <text:p>R$ 8.6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5">
          <table:table-cell table:style-name="ce79"/>
          <table:table-cell table:style-name="ce83" office:value-type="float" office:value="8" calcext:value-type="float">
            <text:p>8</text:p>
          </table:table-cell>
          <table:table-cell table:style-name="ce96" office:value-type="float" office:value="190050507" calcext:value-type="float">
            <text:p>190050507</text:p>
          </table:table-cell>
          <table:table-cell table:style-name="ce104" office:value-type="float" office:value="440667" calcext:value-type="float">
            <text:p>440667</text:p>
          </table:table-cell>
          <table:table-cell table:style-name="ce83" office:value-type="string" calcext:value-type="string">
            <text:p>GRUPO 1</text:p>
          </table:table-cell>
          <table:table-cell table:style-name="ce108" office:value-type="string" calcext:value-type="string">
            <text:p>ITEM 8 – PARAFUSO CANULADO 1.5, 2.4 e <text:s/>3.0 de espessura, COMPRESSÃO CONTROLADA, CABEÇA ROSQUEADA DE 3.5MM <text:s text:c="2"/>COM DUPLO COMEÇO,ARESTRA AUTOROSQUEANTES, NÚCLEO DE 2.0M, ROSCA DE VASTAGO DE 3.0MM, <text:s text:c="2"/>PONTA AUTO PERFURANTES CAIXA CONTENTO INSTRUMENTAIS PARA COLOCAÇÃO DO PARAFUSO HCS 3.0, <text:s text:c="2"/>GUIA DE BROCAS, SISTEMA DE COMPRESSÃO INOVADOR PARA FECHAR E COMPRIMIR DE FORMA CONTROLADA <text:s text:c="2"/>A DIÁSTAS DAS FRATURAS, CHAVE STARDRIVE CALIBRADA, FIO GUIA DE 1.1MM ROSQUEADO, BROCAS CANULADAS <text:s text:c="2"/>E PARAFUSOS DE ROSCA 32MM E 16MM - Parafuso canulado 3.0, compressão controlada, cabeça rosqueada de 3.5mm <text:s text:c="2"/>com duplo começo, arestas autorosquenates, núcleo de 2.0mm, rosca de vastago de 3.0mm, ponta auto perfurantes. - <text:s text:c="2"/>Caixa contendo instrumentais para colocação do parafuso HCS 3.0, guia de brocas, sistema de compressão inovador <text:s text:c="2"/>parafechar e comprimir de forma controlada a diástase das fraturas, chave stardrive calibrada, fio guia de 1.1mm rosqueado, <text:s text:c="2"/>brocascanuladas e parafusos de rosca 32mm e 16mm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600" calcext:value-type="float">
            <text:p>600</text:p>
          </table:table-cell>
          <table:table-cell table:style-name="ce125" office:value-type="currency" office:currency="BRL" office:value="3100" calcext:value-type="currency">
            <text:p>R$ 3.1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6">
          <table:table-cell table:style-name="ce79"/>
          <table:table-cell table:style-name="ce83" office:value-type="float" office:value="9" calcext:value-type="float">
            <text:p>9</text:p>
          </table:table-cell>
          <table:table-cell table:style-name="ce96" office:value-type="float" office:value="190050517" calcext:value-type="float">
            <text:p>190050517</text:p>
          </table:table-cell>
          <table:table-cell table:style-name="ce104" office:value-type="float" office:value="436175" calcext:value-type="float">
            <text:p>436175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SISTEMA EXTRARTICULAR PALMAR LCP 2.4 dupla coluna DE ANGULO VARIAVEL e ou placa tipo RIM ARTICULAR <text:s/>. <text:s text:c="2"/>FUROS COMBINADOS DE COMPRESSÃO E BLOQUEIO QUE PERMITE FORMAR ÂNGULOS COM UM DESVIO AXIAL <text:s text:c="2"/>DE ATÉ 15 GRAUS EM TODAS AS DIREÇÕES, POSSUINDO LADO ESQUERDO E DIREITO - <text:s text:c="2"/>CAIXA CONTENDO INSTRUMENTAIS PARA COLOCAÇÃO DA PLACA DE ÂNGULO VARIAVEL COM GUIAS <text:s text:c="2"/>DE BROCAS ROSQUEADAS PARA PARAFUSOS DE ANGULO FIXO E GUIAS PARA PARAFUSOS DE COMPRESSÃO, <text:s text:c="2"/>BROCAS DE 1.8, 2.0, 2.4, 2.7, MEDIDORES, CHAVE STARDRIVE ACOMPANHADOS DE TORQUIMETR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140" calcext:value-type="float">
            <text:p>140</text:p>
          </table:table-cell>
          <table:table-cell table:style-name="ce125" office:value-type="currency" office:currency="BRL" office:value="14000" calcext:value-type="currency">
            <text:p>R$ 14.0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7">
          <table:table-cell table:style-name="ce79"/>
          <table:table-cell table:style-name="ce83" office:value-type="float" office:value="10" calcext:value-type="float">
            <text:p>10</text:p>
          </table:table-cell>
          <table:table-cell table:style-name="ce96" office:value-type="string" calcext:value-type="string">
            <text:p>BR3309586</text:p>
          </table:table-cell>
          <table:table-cell table:style-name="ce104" office:value-type="float" office:value="443385" calcext:value-type="float">
            <text:p>443385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SISTEMA EXTRA ARTICULAR PALMAR E DORSAL LCP 2.4 DE ÂNGULO FIXO, FUROS COMBINADOS DE COMPRESSÃO <text:s/>E BLOQUEIO, PLACA PARA TERÇO DISTAL DO RADIO E LONGA, POSSUINDO LADO ESQUERDO E DIREIT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160" calcext:value-type="float">
            <text:p>160</text:p>
          </table:table-cell>
          <table:table-cell table:style-name="ce125" office:value-type="currency" office:currency="BRL" office:value="12000" calcext:value-type="currency">
            <text:p>R$ 12.0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4">
          <table:table-cell table:style-name="ce79"/>
          <table:table-cell table:style-name="ce83" office:value-type="float" office:value="11" calcext:value-type="float">
            <text:p>11</text:p>
          </table:table-cell>
          <table:table-cell table:style-name="ce96" office:value-type="string" calcext:value-type="string">
            <text:p>BR3309591</text:p>
          </table:table-cell>
          <table:table-cell table:style-name="ce104" office:value-type="float" office:value="460626" calcext:value-type="float">
            <text:p>460626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SISTEMA DE PLACAS 1.1, 1.5 E 2.0 PARA FRATURAS DE MÃO, EM AÇO NÃO MAGNÉTICO, CONTENDO PLACAS DE <text:s text:c="2"/>ADAPTAÇÃO, CONDILEA, EM T, EM Y E H, DE 02 A 12 FUROS COMBINADOS DE BLOQUEIO E CORTICAL <text:s/>AUTTOFREZANTE, PARA UTILIZAÇÃO DE PARAFUSOS BICORTICAIS OU BLOQUEADOS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60" calcext:value-type="float">
            <text:p>60</text:p>
          </table:table-cell>
          <table:table-cell table:style-name="ce125" office:value-type="currency" office:currency="BRL" office:value="7500" calcext:value-type="currency">
            <text:p>R$ 7.5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6">
          <table:table-cell table:style-name="ce79"/>
          <table:table-cell table:style-name="ce83" office:value-type="float" office:value="12" calcext:value-type="float">
            <text:p>12</text:p>
          </table:table-cell>
          <table:table-cell table:style-name="ce96" office:value-type="float" office:value="190038335" calcext:value-type="float">
            <text:p>190038335</text:p>
          </table:table-cell>
          <table:table-cell table:style-name="ce104" office:value-type="string" calcext:value-type="string">
            <text:p>443800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SISTEMA PLACA DISTAL FEMUR BLOQUEADA TIPO LISS, 6 A 13 FUROS, 4.5/5.0/6.5 COMPLETA EM AÇO <text:s text:c="2"/>NAO MAGNETICO, SUROS COMBINADOS, COM INSTRUMENTAL DE COLOCAÇÃO <text:s/>CONJUNTO INSTRUMENTAL <text:s text:c="2"/>MINIMAMENTE INVASIVO, GUIA EXTERNO, CHAVE STARDRIVE COM ENGATE RÁPIDO, MEDIDOR CORTICAL, <text:s text:c="2"/>MACHO PARA E ESPONJOSO, <text:s/>OUTRO COMPONENTES ESCARIADOR, BROCAS CALIBRADAS, GUIA P/ BROCAS, <text:s text:c="2"/>PINÇA P/ PARAFUSO, CX GRANDES FRAGMENTOS, ACESSÓRIOS RETORCEDOR DE PLACAS (PAR), JOGO DE <text:s text:c="2"/>PLACAS BLOQUEADAS FUROS COMBINADOS , MATERIAL AÇO INOXIDÁVEL NAO MAGNETICO.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80" calcext:value-type="float">
            <text:p>80</text:p>
          </table:table-cell>
          <table:table-cell table:style-name="ce125" office:value-type="currency" office:currency="BRL" office:value="16500" calcext:value-type="currency">
            <text:p>R$ 16.5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2">
          <table:table-cell table:style-name="ce79"/>
          <table:table-cell table:style-name="ce83" office:value-type="float" office:value="13" calcext:value-type="float">
            <text:p>13</text:p>
          </table:table-cell>
          <table:table-cell table:style-name="ce96" office:value-type="float" office:value="190034399" calcext:value-type="float">
            <text:p>190034399</text:p>
          </table:table-cell>
          <table:table-cell table:style-name="ce104" office:value-type="float" office:value="308109" calcext:value-type="float">
            <text:p>308109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SISTEMA DE PLACAS DE RECONSTRUÇÃO RETAS E CURVAS EM ACO NAO MAGNETICO PARA USO EM BACIA, <text:s text:c="3"/>FRATURAS DE ACETABULO 3,5/4,5 PARAFUSOS E INSTRUMENTAL D E COLOCAÇÃO <text:s text:c="3"/>placa ortopédica,material aço inoxidável, características adicionais <text:s/>modelo reta/curva parafuso de 3,5mm <text:s/>e 4.5 mm <text:s text:c="3"/>EXTRALONGOS ATE 130 MM aplicação reconstrução de bacia, com pincas osseas e clamps para reducao intraoperatoria</text:p>
          </table:table-cell>
          <table:table-cell table:style-name="ce104" office:value-type="string" calcext:value-type="string">
            <text:p>CAIXA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40" calcext:value-type="float">
            <text:p>40</text:p>
          </table:table-cell>
          <table:table-cell table:style-name="ce125" office:value-type="currency" office:currency="BRL" office:value="9300" calcext:value-type="currency">
            <text:p>R$ 9.3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4">
          <table:table-cell table:style-name="ce79"/>
          <table:table-cell table:style-name="ce83" office:value-type="float" office:value="14" calcext:value-type="float">
            <text:p>14</text:p>
          </table:table-cell>
          <table:table-cell table:style-name="ce96" office:value-type="string" calcext:value-type="string">
            <text:p>BR3157919</text:p>
          </table:table-cell>
          <table:table-cell table:style-name="ce104" office:value-type="string" calcext:value-type="string">
            <text:p>420895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SISTEMA DE OSTEOSSÍNTESE TIPO AO PARA FRATURAS PROXIMAIS DO FÊMUR - EM AÇO, MODELO DCS ÂNGULO <text:s text:c="2"/>95¨, TIPO USO NÃO DESCARTÁVEL, ESTERILIDADE NÃO ESTÉRIL, APLICAÇÃO PROCEDIMENTO CIRÚRGICO <text:s text:c="2"/>ORTOPÉDICO, COMPRIMENTO 178, QUANTIDADE FUROS 10, DIÂMETRO 3,50. <text:s text:c="3"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20" calcext:value-type="float">
            <text:p>20</text:p>
          </table:table-cell>
          <table:table-cell table:style-name="ce125" office:value-type="currency" office:currency="BRL" office:value="4100" calcext:value-type="currency">
            <text:p>R$ 4.1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4">
          <table:table-cell table:style-name="ce79"/>
          <table:table-cell table:style-name="ce83" office:value-type="float" office:value="15" calcext:value-type="float">
            <text:p>15</text:p>
          </table:table-cell>
          <table:table-cell table:style-name="ce96" office:value-type="string" calcext:value-type="string">
            <text:p>BR3157933</text:p>
          </table:table-cell>
          <table:table-cell table:style-name="ce104" office:value-type="float" office:value="436651" calcext:value-type="float">
            <text:p>436651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ITEM 15 – SISTEMA DE PARAFUSOS CANULADOS DE 3,5 a 4.0 <text:s/>COM INSTRUMENTAL DE COLOCAÇÃO, INCLUINDO ARRUELAS, <text:s text:c="2"/>FIOS GUIAS E BROCAS CANULADAS. TRATA-SE <text:s/>MATERIAL PARA FIXAS, OSSOS PEQUENOS, FRAGMENTOS SOLTOS, <text:s/>LIGAMENTOS E TENDÕES ROMPIDOS, COMO EM FRATURAS DE TORNOZELO, COTOVELO E JOELHO. <text:s text:c="3"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500" calcext:value-type="float">
            <text:p>500</text:p>
          </table:table-cell>
          <table:table-cell table:style-name="ce125" office:value-type="currency" office:currency="BRL" office:value="1800" calcext:value-type="currency">
            <text:p>R$ 1.8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3">
          <table:table-cell table:style-name="ce79"/>
          <table:table-cell table:style-name="ce83" office:value-type="float" office:value="16" calcext:value-type="float">
            <text:p>16</text:p>
          </table:table-cell>
          <table:table-cell table:style-name="ce96" office:value-type="string" calcext:value-type="string">
            <text:p>BR3170973</text:p>
          </table:table-cell>
          <table:table-cell table:style-name="ce104" office:value-type="float" office:value="435678" calcext:value-type="float">
            <text:p>435678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SISTEMA DE IMPLANTES DHS, INSTRUMENTAIS DE COLOCAÇÃO, PARA CIRURGIA DE FRATURAS <text:s/>PROXIMAIS DO <text:s text:c="2"/>FÊMUR PERTROCANTEREAS E INTERTROCANTEREAS COM HASTE MÉDIAL - PLACA ESPECIAL, MATERIAL ACO <text:s text:c="2"/>NAO MAGNETICO, MODELO DHS ÂNGULO 135¨, TIPO USO NÃO DESCATÁVEL, ESTERILIDADE NÃO ESTÉRIL, <text:s text:c="2"/>APLICAÇÃO PROCEDIMENTO CIRÚRGICO ORTOPÉDICO, QUANTIDADE FUROS 4 FUROS A 20 FUROS, DIÂMETRO 4.5, <text:s/>PARAFUSOS AUTOFRESANTES, PARAFUSO DESLIZANTE E CONTRA PINO, FIOS GUIAS. <text:s text:c="5"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60" calcext:value-type="float">
            <text:p>60</text:p>
          </table:table-cell>
          <table:table-cell table:style-name="ce125" office:value-type="currency" office:currency="BRL" office:value="4100" calcext:value-type="currency">
            <text:p>R$ 4.1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6">
          <table:table-cell table:style-name="ce79"/>
          <table:table-cell table:style-name="ce83" office:value-type="float" office:value="17" calcext:value-type="float">
            <text:p>17</text:p>
          </table:table-cell>
          <table:table-cell table:style-name="ce96" office:value-type="float" office:value="190033999" calcext:value-type="float">
            <text:p>190033999</text:p>
          </table:table-cell>
          <table:table-cell table:style-name="ce104" office:value-type="float" office:value="285453" calcext:value-type="float">
            <text:p>285453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CAIXA DE PEQUENOS FRAGMENTOS COMPLETA COM INSTRUMENTAL DE <text:s text:c="2"/>COLOCAÇÃO, <text:s/>INCLUINDO PLACAS ESPECIAS PARA FRATURAS <text:s text:c="2"/>CALCÂNEO/PUNHO/COTOVELO - conjunto instrumental médico, componentes 1 chave <text:s text:c="2"/>hexagonal 3,5;pinça p/chave hexagonal 3,5, tipo uso 2 pinças espanholas retas,2 curvas, <text:s/>container, outros componentes macho p/cortical 3,5 engate;macho esponjoso 4 eng., tipo <text:s text:c="2"/>embalagem cx pequenos fragmentos, acessórios escariador 3,5 engate rápido,medidor <text:s text:c="2"/>cortical 3,5, características adicionais 2 retorcedores,1 pinça p/parafuso,2 lomanns pequenos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300" calcext:value-type="float">
            <text:p>300</text:p>
          </table:table-cell>
          <table:table-cell table:style-name="ce125" office:value-type="currency" office:currency="BRL" office:value="4300" calcext:value-type="currency">
            <text:p>R$ 4.3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3">
          <table:table-cell table:style-name="ce79"/>
          <table:table-cell table:style-name="ce83" office:value-type="float" office:value="18" calcext:value-type="float">
            <text:p>18</text:p>
          </table:table-cell>
          <table:table-cell table:style-name="ce96" office:value-type="float" office:value="190034000" calcext:value-type="float">
            <text:p>190034000</text:p>
          </table:table-cell>
          <table:table-cell table:style-name="ce104" office:value-type="float" office:value="434083" calcext:value-type="float">
            <text:p>434083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ITEM 18 – CAIXA DE MINI-MICRO FRAGMENTOS COMPLETA EM ACO NAO MAGNETICO DE ANGULO VARIAVEIS, <text:s text:c="2"/>COM INSTRUMENTAL DE COLOCAÇÃO - placa ortopédica, material aço inoxidável nao magnetico,parafusos bloqueados <text:s text:c="2"/>de angulo variavel e corticais autofresantes 1.3/1.5/2.0 ,modelo reta, T, Y, CONDYLAR, BASE FALANGEANA, STRUT, <text:s text:c="2"/>METACARAPAL , tipo uso mini fragmentos- placa ortopédica, material aço inoxidável, 1.3 / <text:s/>1,5 ou 2mm, uso osteossíntese <text:s text:c="2"/>micro fragmentos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100" calcext:value-type="float">
            <text:p>100</text:p>
          </table:table-cell>
          <table:table-cell table:style-name="ce125" office:value-type="currency" office:currency="BRL" office:value="12500" calcext:value-type="currency">
            <text:p>R$ 12.5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7">
          <table:table-cell table:style-name="ce79"/>
          <table:table-cell table:style-name="ce83" office:value-type="float" office:value="19" calcext:value-type="float">
            <text:p>19</text:p>
          </table:table-cell>
          <table:table-cell table:style-name="ce96" office:value-type="float" office:value="190034001" calcext:value-type="float">
            <text:p>190034001</text:p>
          </table:table-cell>
          <table:table-cell table:style-name="ce104" office:value-type="float" office:value="434083" calcext:value-type="float">
            <text:p>434083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ITEM 19 – CAIXA DE PARAFUSOS CANULADOS TIPO HEBERT COMPLETA, COM <text:s text:c="2"/>INSTRUMENTAL DE COL OCAÇÃO. Parafusos ortopedicos, material de aco <text:s text:c="2"/>inoxidavel, aplicacao para`escafoide c/ diversos tamanhos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400" calcext:value-type="float">
            <text:p>400</text:p>
          </table:table-cell>
          <table:table-cell table:style-name="ce125" office:value-type="currency" office:currency="BRL" office:value="3600" calcext:value-type="currency">
            <text:p>R$ 3.6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4">
          <table:table-cell table:style-name="ce79"/>
          <table:table-cell table:style-name="ce83" office:value-type="float" office:value="20" calcext:value-type="float">
            <text:p>20</text:p>
          </table:table-cell>
          <table:table-cell table:style-name="ce96" office:value-type="float" office:value="190034003" calcext:value-type="float">
            <text:p>190034003</text:p>
          </table:table-cell>
          <table:table-cell table:style-name="ce104" office:value-type="float" office:value="285475" calcext:value-type="float">
            <text:p>285475</text:p>
          </table:table-cell>
          <table:table-cell table:style-name="ce83" office:value-type="string" calcext:value-type="string">
            <text:p>GRUPO 1</text:p>
          </table:table-cell>
          <table:table-cell table:style-name="ce109" office:value-type="string" calcext:value-type="string">
            <text:p>ITEM 20 – CAIXA DE IMPLANTES E INSTRUMENTAIS PARA CIRURGIA DE FIXAÇÃO DE FRATURAS ACETÁBULO, JOELHOS, <text:s text:c="2"/>BACIA E CABEÇA FEMURAL.- parafusos ortopedicos 7.3, material em titanio , tipo canulado, comprimento rosca 16 e 32mm <text:s text:c="3"/>diâmetro 7.3, comprimento ate 130, <text:s/>mm , ARRUELAS EM TITANIO, FIOS GUIAS ROSQUEADOS, PERCUTANE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100" calcext:value-type="float">
            <text:p>100</text:p>
          </table:table-cell>
          <table:table-cell table:style-name="ce125" office:value-type="currency" office:currency="BRL" office:value="2400" calcext:value-type="currency">
            <text:p>R$ 2.4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4">
          <table:table-cell table:style-name="ce79"/>
          <table:table-cell table:style-name="ce83" office:value-type="float" office:value="21" calcext:value-type="float">
            <text:p>21</text:p>
          </table:table-cell>
          <table:table-cell table:style-name="ce96" office:value-type="float" office:value="190034337" calcext:value-type="float">
            <text:p>190034337</text:p>
          </table:table-cell>
          <table:table-cell table:style-name="ce104" office:value-type="float" office:value="434083" calcext:value-type="float">
            <text:p>434083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CAIXA COMPOSTA DE PLACAS LC DCP ESPECIAL COM PARAFUSOS DE DIVERSOS <text:s text:c="3"/>TAMANHOS E INSTRUMENTAL DE COLOCAÇÃO, PARA CIRURGIA DE FRATURAS <text:s text:c="2"/>COMPLEXAS <text:s/>DE FÊMUR E ÚMERO,COM MATERIAL <text:s/>DE TITANEO, DE ALTA <text:s/>RESISTENCIA, <text:s text:c="2"/>COM POUCO CONTATO COM <text:s/>O OSS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60" calcext:value-type="float">
            <text:p>60</text:p>
          </table:table-cell>
          <table:table-cell table:style-name="ce125" office:value-type="currency" office:currency="BRL" office:value="4100" calcext:value-type="currency">
            <text:p>R$ 4.1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6">
          <table:table-cell table:style-name="ce79"/>
          <table:table-cell table:style-name="ce83" office:value-type="float" office:value="22" calcext:value-type="float">
            <text:p>22</text:p>
          </table:table-cell>
          <table:table-cell table:style-name="ce96" office:value-type="float" office:value="190034395" calcext:value-type="float">
            <text:p>190034395</text:p>
          </table:table-cell>
          <table:table-cell table:style-name="ce104" office:value-type="float" office:value="308109" calcext:value-type="float">
            <text:p>308109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ITEM 22 – CAIXA COMPOSTA DE PLACAS LCP 3.5 ESPECIAL COM FUROS COMBINADOS ,ACO NAO MAGNETICO, PARAFUSOS <text:s text:c="2"/>BLOQUEADOS E CORTICAIS AUTOFRESANTES DE DIVERSOS TAMANHOS E INSTRUMENTAL DE COLOCAÇÃO, <text:s text:c="2"/>PARA CIRURGIA DE FRATURAS COMPLEXAS DE RÁDIO, ULNA, TORNOZELO. PUNHO , CALCÂNEO . <text:s text:c="2"/>- placa ortopédica reta, obliqua, em T, tipo hook, reconstrucao, 1/3 cana, placas bloqueadas, material aco nao magnetico, <text:s text:c="2"/>lcp , espessura 3,50, tipo uso não descartável, esterilidade não estéril, aplicação fixação de parafuso de traumatologia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30" calcext:value-type="float">
            <text:p>30</text:p>
          </table:table-cell>
          <table:table-cell table:style-name="ce125" office:value-type="currency" office:currency="BRL" office:value="13000" calcext:value-type="currency">
            <text:p>R$ 13.0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2">
          <table:table-cell table:style-name="ce79"/>
          <table:table-cell table:style-name="ce83" office:value-type="float" office:value="23" calcext:value-type="float">
            <text:p>23</text:p>
          </table:table-cell>
          <table:table-cell table:style-name="ce96" office:value-type="float" office:value="190034396" calcext:value-type="float">
            <text:p>190034396</text:p>
          </table:table-cell>
          <table:table-cell table:style-name="ce104" office:value-type="float" office:value="308109" calcext:value-type="float">
            <text:p>308109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CAIXA DE PLACAS LCP (PONTOS DE CONTATO NO OSSO) 4,5 E 5,0 ESTREITA / LARGA <text:s text:c="3"/>EM TITÂNIO EM "T" PARA <text:s/>SUSTENTAÇÃO E "L" <text:s/>ESQ/DIREITA + PARAFUSOS 5,0 EM <text:s text:c="2"/>TITÂNIO. <text:s text:c="2"/>- placa reta, material aço inoxidável, modelo lcp, tipo uso orifícios combinados <text:s text:c="2"/>p/compressão dinâmica, aplicação tamanho 3,5mm, características adicionais parafusos <text:s text:c="2"/>auto-bloqueantes, quantidade furos 8 furos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40" calcext:value-type="float">
            <text:p>40</text:p>
          </table:table-cell>
          <table:table-cell table:style-name="ce125" office:value-type="currency" office:currency="BRL" office:value="10800" calcext:value-type="currency">
            <text:p>R$ 10.8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2">
          <table:table-cell table:style-name="ce79"/>
          <table:table-cell table:style-name="ce83" office:value-type="float" office:value="24" calcext:value-type="float">
            <text:p>24</text:p>
          </table:table-cell>
          <table:table-cell table:style-name="ce96" office:value-type="float" office:value="190034397" calcext:value-type="float">
            <text:p>190034397</text:p>
          </table:table-cell>
          <table:table-cell table:style-name="ce104" office:value-type="float" office:value="434083" calcext:value-type="float">
            <text:p>434083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ITEM 24 – CAIXA DE PLACAS PEQ/GRANDE PARA ÚMERO PROXIMAL + PARAFUSOS COM ROSCA NA CABEÇA - <text:s text:c="2"/>PLACA ORTOPÉDICA, MATERIAL TITÂNIO, COMPRIMENTO 114, CARACTERÍSTICAS ADICIONAIS PLACA DE <text:s text:c="2"/>BLOQUEIO, COM 5 FUROS, ESPESSURA 3,50, TIPO USO NÃO DESCARTÁVEL, ESTERILIDADE NÃO ESTÉRIL, <text:s text:c="2"/>APLICAÇÃO FIXAÇÃO REGIÃO PROXIMAL DO ÚMER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40" calcext:value-type="float">
            <text:p>40</text:p>
          </table:table-cell>
          <table:table-cell table:style-name="ce125" office:value-type="currency" office:currency="BRL" office:value="16900" calcext:value-type="currency">
            <text:p>R$ 16.9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3">
          <table:table-cell table:style-name="ce79"/>
          <table:table-cell table:style-name="ce83" office:value-type="float" office:value="25" calcext:value-type="float">
            <text:p>25</text:p>
          </table:table-cell>
          <table:table-cell table:style-name="ce96" office:value-type="float" office:value="190034398" calcext:value-type="float">
            <text:p>190034398</text:p>
          </table:table-cell>
          <table:table-cell table:style-name="ce104" office:value-type="float" office:value="308109" calcext:value-type="float">
            <text:p>308109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ITEM 25 – CAIXA DE PLACAS LCP (PONTOS DE CONTATO NO OSSO) 3,5MM EM TITÂNIO <text:s text:c="2"/>E ESPECIAIS TIPO T, <text:s/>T OBLÍQUO E <text:s/>TREVO + PARAFUSOS DE BLOQUEIO <text:s text:c="2"/>LCP ( COM ROSCA NA CABEÇA) 2,7/3,5 EM TITÂNIO. <text:s/>- placa reta, material aço <text:s text:c="2"/>inoxidável, modelo lcp, tipo uso orifícios combinados p/compressão dinâmica, <text:s text:c="2"/>aplicação tamanho 3,5mm, características adicionais parafusos auto-bloqueantes, <text:s text:c="2"/>quantidade furos 8 furostambem os <text:s/>seguintes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4" calcext:value-type="float">
            <text:p>4</text:p>
          </table:table-cell>
          <table:table-cell table:style-name="ce104" office:value-type="float" office:value="80" calcext:value-type="float">
            <text:p>80</text:p>
          </table:table-cell>
          <table:table-cell table:style-name="ce125" office:value-type="currency" office:currency="BRL" office:value="13600" calcext:value-type="currency">
            <text:p>R$ 13.6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8">
          <table:table-cell table:style-name="ce79"/>
          <table:table-cell table:style-name="ce83" office:value-type="float" office:value="26" calcext:value-type="float">
            <text:p>26</text:p>
          </table:table-cell>
          <table:table-cell table:style-name="ce96" office:value-type="float" office:value="190034400" calcext:value-type="float">
            <text:p>190034400</text:p>
          </table:table-cell>
          <table:table-cell table:style-name="ce104" office:value-type="float" office:value="308109" calcext:value-type="float">
            <text:p>308109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CAIXA DE PLACAS ESPECIAIS, PARA FRATURAS DO PLATÔ TIBIAL 3.5 MM EM L E EM T ATE 16 <text:s/>BLOQUEADA FUROS <text:s text:c="2"/>BOMBINADOS , PILÃO TIBIAL BLOQEADA COM FUROS COMBINADOS 3.5 MM COM INSERCAO MEDIAL E <text:s text:c="2"/>ANTERO LATERAL, COM INSTRUMENTAL DE COLOCAÇÃO - placa ortopédica, material aço inoxidável <text:s text:c="2"/>NAO MAGNETICO, características adicionais baixo PERFIL contato,bloqueio rosqueado, orifícios combinados, <text:s text:c="2"/>modelo tipo lcp,perfil baixo,lado direito e lado esquerdo, espessura 3,50, tipo uso <text:s text:c="2"/>compressão dinâm. p/parafusos auto-bloq 2,7/3,5mm, aplicação bloqueio cruciforme p/ pilão tibial <text:s text:c="2"/>co insercao medial e antero lateral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8" calcext:value-type="float">
            <text:p>8</text:p>
          </table:table-cell>
          <table:table-cell table:style-name="ce104" office:value-type="float" office:value="80" calcext:value-type="float">
            <text:p>80</text:p>
          </table:table-cell>
          <table:table-cell table:style-name="ce125" office:value-type="currency" office:currency="BRL" office:value="14800" calcext:value-type="currency">
            <text:p>R$ 14.8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8">
          <table:table-cell table:style-name="ce79"/>
          <table:table-cell table:style-name="ce83" office:value-type="float" office:value="27" calcext:value-type="float">
            <text:p>27</text:p>
          </table:table-cell>
          <table:table-cell table:style-name="ce96" office:value-type="float" office:value="15899582" calcext:value-type="float">
            <text:p>15899582</text:p>
          </table:table-cell>
          <table:table-cell table:style-name="ce104" office:value-type="string" calcext:value-type="string">
            <text:p>435679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PLACA LCP 4.5/5.0 CONTATO LIMITADO PARA FÊMUR PROXIMAL SISTEMA LCP PARA OSTEOSINTESE <text:s text:c="2"/>PERIARTICULAR TIPO HOOK QUE REÚNE AS TÉCNICAS DE PARAFUSO BLOQUEADOS COM TÉCNICAS DE PARAFUSO DE COMPRESSÃO, PLACA <text:s text:c="2"/>COM FUROS COMBINADOS PODENDO SER USADO COMO COMPRESSÃO E DE BLOQUEIO. PARTE PROXIMAL DA <text:s text:c="2"/>PLACA PRÉ-MOLDADA MELHOR ADAPTAÇÃO, SEUS FUROS PROXIMAIS ESTÃO DESENHADOS PRA INSERÇÃO DE <text:s text:c="2"/>PARAFUSOS CANULADOS 7.3, PLACAS DESENHADAS PRA LADO ESQUERDO E DIREITO, FUROS PROXIMAIS <text:s text:c="2"/>APRESENTANDO ANGULAÇÕES DE 95/120 E 135 GRAUS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30" calcext:value-type="float">
            <text:p>30</text:p>
          </table:table-cell>
          <table:table-cell table:style-name="ce125" office:value-type="currency" office:currency="BRL" office:value="18600" calcext:value-type="currency">
            <text:p>R$ 18.6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7">
          <table:table-cell table:style-name="ce79"/>
          <table:table-cell table:style-name="ce83" office:value-type="float" office:value="28" calcext:value-type="float">
            <text:p>28</text:p>
          </table:table-cell>
          <table:table-cell table:style-name="ce96" office:value-type="string" calcext:value-type="string">
            <text:p>BR3309788</text:p>
          </table:table-cell>
          <table:table-cell table:style-name="ce104" office:value-type="float" office:value="436621" calcext:value-type="float">
            <text:p>436621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Parafusos bloqueados tipo LCP autofresantes, acompanhados de brocas e chaves stardrive com torquimentro referente <text:s/>ao tamanho do parafuso, tamanhos 1.3; 1.5; 2.0; 2.4; 2.7; 3.5; 5.0; 7.3 utilizados fora do sistema de placas, unidade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0" calcext:value-type="float">
            <text:p>20</text:p>
          </table:table-cell>
          <table:table-cell table:style-name="ce104" office:value-type="float" office:value="200" calcext:value-type="float">
            <text:p>200</text:p>
          </table:table-cell>
          <table:table-cell table:style-name="ce125" office:value-type="currency" office:currency="BRL" office:value="880" calcext:value-type="currency">
            <text:p>R$ 88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7">
          <table:table-cell table:style-name="ce79"/>
          <table:table-cell table:style-name="ce83" office:value-type="float" office:value="29" calcext:value-type="float">
            <text:p>29</text:p>
          </table:table-cell>
          <table:table-cell table:style-name="ce96" office:value-type="string" calcext:value-type="string">
            <text:p>BR3309789</text:p>
          </table:table-cell>
          <table:table-cell table:style-name="ce104" office:value-type="float" office:value="443217" calcext:value-type="float">
            <text:p>443217</text:p>
          </table:table-cell>
          <table:table-cell table:style-name="ce83" office:value-type="string" calcext:value-type="string">
            <text:p>GRUPO 1</text:p>
          </table:table-cell>
          <table:table-cell table:style-name="ce107" office:value-type="string" calcext:value-type="string">
            <text:p>ITEM 29 – PARAFUSO CORTICAL AUTOFRESANTE <text:s/>Parafusos corticais autofresantes e <text:s/>esponjosos, tamanhos 1.1/1.3/1.5/2.0/2.4/2.7/3.5/4.0/4.5/5.0/6.5 <text:s text:c="2"/>utilizados fora do sistema de placas, unidade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0" calcext:value-type="float">
            <text:p>20</text:p>
          </table:table-cell>
          <table:table-cell table:style-name="ce104" office:value-type="float" office:value="200" calcext:value-type="float">
            <text:p>200</text:p>
          </table:table-cell>
          <table:table-cell table:style-name="ce125" office:value-type="currency" office:currency="BRL" office:value="350" calcext:value-type="currency">
            <text:p>R$ 35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9">
          <table:table-cell table:style-name="ce79"/>
          <table:table-cell table:style-name="ce83" office:value-type="float" office:value="30" calcext:value-type="float">
            <text:p>30</text:p>
          </table:table-cell>
          <table:table-cell table:style-name="ce96" office:value-type="float" office:value="15714209" calcext:value-type="float">
            <text:p>15714209</text:p>
          </table:table-cell>
          <table:table-cell table:style-name="ce104" office:value-type="float" office:value="150186" calcext:value-type="float">
            <text:p>150186</text:p>
          </table:table-cell>
          <table:table-cell table:style-name="ce83" office:value-type="string" calcext:value-type="string">
            <text:p>GRUPO 2</text:p>
          </table:table-cell>
          <table:table-cell table:style-name="ce107" office:value-type="string" calcext:value-type="string">
            <text:p>ITEM 30 – EQUIPO ESPECIAL, APLICAÇÃO P/ARTROSCOPIA , VIAS DUAS VIIAS, CARACTERÍSTICAS ADICIONAIS P/BOMBA <text:s text:c="2"/>DE INFUSÃO DE ALTO FLUX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500" calcext:value-type="float">
            <text:p>500</text:p>
          </table:table-cell>
          <table:table-cell table:style-name="ce125" office:value-type="currency" office:currency="BRL" office:value="330" calcext:value-type="currency">
            <text:p>R$ 33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0">
          <table:table-cell table:style-name="ce79"/>
          <table:table-cell table:style-name="ce83" office:value-type="float" office:value="31" calcext:value-type="float">
            <text:p>31</text:p>
          </table:table-cell>
          <table:table-cell table:style-name="ce96" office:value-type="string" calcext:value-type="string">
            <text:p>BR3321530</text:p>
          </table:table-cell>
          <table:table-cell table:style-name="ce104" office:value-type="float" office:value="285643" calcext:value-type="float">
            <text:p>285643</text:p>
          </table:table-cell>
          <table:table-cell table:style-name="ce83" office:value-type="string" calcext:value-type="string">
            <text:p>GRUPO 2</text:p>
          </table:table-cell>
          <table:table-cell table:style-name="ce107" office:value-type="string" calcext:value-type="string">
            <text:p>ITEM 31 – Fio de sutura- Fios de alta resistência lineares e do tipo fita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300" calcext:value-type="float">
            <text:p>300</text:p>
          </table:table-cell>
          <table:table-cell table:style-name="ce125" office:value-type="currency" office:currency="BRL" office:value="335" calcext:value-type="currency">
            <text:p>R$ 335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1">
          <table:table-cell table:style-name="ce79"/>
          <table:table-cell table:style-name="ce83" office:value-type="float" office:value="32" calcext:value-type="float">
            <text:p>32</text:p>
          </table:table-cell>
          <table:table-cell table:style-name="ce96" office:value-type="string" calcext:value-type="string">
            <text:p>BR3325167</text:p>
          </table:table-cell>
          <table:table-cell table:style-name="ce104" office:value-type="float" office:value="440351" calcext:value-type="float">
            <text:p>440351</text:p>
          </table:table-cell>
          <table:table-cell table:style-name="ce83" office:value-type="string" calcext:value-type="string">
            <text:p>GRUPO 2</text:p>
          </table:table-cell>
          <table:table-cell table:style-name="ce107" office:value-type="string" calcext:value-type="string">
            <text:p>ITEM 32 – PARAFUSO MOLDADO DE ÁCIDO POLILÁCTICO BIO-ABSORVÍVEL COMPATIVEL COM O INSTRUMENTAL E O USO DE <text:s text:c="2"/>FIO GUIA EM NITINOL, COM NO MINIMO 4 TAMANHOS E DOIS COMPRIMENTOS, PARA CIRURGIAS DO PÉ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4" calcext:value-type="float">
            <text:p>4</text:p>
          </table:table-cell>
          <table:table-cell table:style-name="ce104" office:value-type="float" office:value="30" calcext:value-type="float">
            <text:p>30</text:p>
          </table:table-cell>
          <table:table-cell table:style-name="ce125" office:value-type="currency" office:currency="BRL" office:value="650" calcext:value-type="currency">
            <text:p>R$ 65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9">
          <table:table-cell table:style-name="ce79"/>
          <table:table-cell table:style-name="ce83" office:value-type="float" office:value="33" calcext:value-type="float">
            <text:p>33</text:p>
          </table:table-cell>
          <table:table-cell table:style-name="ce96" office:value-type="string" calcext:value-type="string">
            <text:p>BR3325054</text:p>
          </table:table-cell>
          <table:table-cell table:style-name="ce104" office:value-type="float" office:value="443217" calcext:value-type="float">
            <text:p>443217</text:p>
          </table:table-cell>
          <table:table-cell table:style-name="ce83" office:value-type="string" calcext:value-type="string">
            <text:p>GRUPO 2</text:p>
          </table:table-cell>
          <table:table-cell table:style-name="ce107" office:value-type="string" calcext:value-type="string">
            <text:p>ITEM 33 – AGULHA SUTURA PARA MINISCO - FIO METÁLICO, MALEÁVEL, CONFECCIONADO EM NITINOL, NÃO CORTANTE, <text:s text:c="2"/>COM ALÇA PARA TRANSPORTE DE FIOS DE SUTURA</text:p>
          </table:table-cell>
          <table:table-cell table:style-name="ce104" office:value-type="string" calcext:value-type="string">
            <text:p>CONJUNTO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100" calcext:value-type="float">
            <text:p>100</text:p>
          </table:table-cell>
          <table:table-cell table:style-name="ce125" office:value-type="currency" office:currency="BRL" office:value="400" calcext:value-type="currency">
            <text:p>R$ 40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9">
          <table:table-cell table:style-name="ce79"/>
          <table:table-cell table:style-name="ce83" office:value-type="float" office:value="34" calcext:value-type="float">
            <text:p>34</text:p>
          </table:table-cell>
          <table:table-cell table:style-name="ce96" office:value-type="string" calcext:value-type="string">
            <text:p>BR3325168</text:p>
          </table:table-cell>
          <table:table-cell table:style-name="ce104" office:value-type="float" office:value="443243" calcext:value-type="float">
            <text:p>443243</text:p>
          </table:table-cell>
          <table:table-cell table:style-name="ce83" office:value-type="string" calcext:value-type="string">
            <text:p>GRUPO 2</text:p>
          </table:table-cell>
          <table:table-cell table:style-name="ce107" office:value-type="string" calcext:value-type="string">
            <text:p>ITEM 34 – SISTEMA DE PASSADOR DE FIO/SUTURA DO TIPO FIRST PASS OU SCORPION E FIOS DE ALTA RESISTÊNCIA, PARA CIRURGIA DO JOELHO.</text:p>
          </table:table-cell>
          <table:table-cell table:style-name="ce104" office:value-type="string" calcext:value-type="string">
            <text:p>CONJUNTO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100" calcext:value-type="float">
            <text:p>100</text:p>
          </table:table-cell>
          <table:table-cell table:style-name="ce125" office:value-type="currency" office:currency="BRL" office:value="685" calcext:value-type="currency">
            <text:p>R$ 685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2">
          <table:table-cell table:style-name="ce79"/>
          <table:table-cell table:style-name="ce83" office:value-type="float" office:value="35" calcext:value-type="float">
            <text:p>35</text:p>
          </table:table-cell>
          <table:table-cell table:style-name="ce96" office:value-type="string" calcext:value-type="string">
            <text:p>BR3162014</text:p>
          </table:table-cell>
          <table:table-cell table:style-name="ce104" office:value-type="string" calcext:value-type="string">
            <text:p>364092</text:p>
          </table:table-cell>
          <table:table-cell table:style-name="ce83" office:value-type="string" calcext:value-type="string">
            <text:p>GRUPO 2</text:p>
          </table:table-cell>
          <table:table-cell table:style-name="ce107" office:value-type="string" calcext:value-type="string">
            <text:p>ITEM 35 – AGRAFES LIGAMENTARES EM TITÂNIO PARA CIRURGIAS DE JOELHO H22 X L10MM .TRATA-SE DE MATERIAL <text:s text:c="2"/>ESPECIAL DE USO UNICO, DE TITANEO, DESCARTAVEL QUE SAO USADOS PARA CRAVAR OS LIGAMENTOS NAS <text:s text:c="2"/>RECONSTRUCOES LIGAMENTARES DO JOELHO. <text:s text:c="2"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20" calcext:value-type="float">
            <text:p>20</text:p>
          </table:table-cell>
          <table:table-cell table:style-name="ce125" office:value-type="currency" office:currency="BRL" office:value="360" calcext:value-type="currency">
            <text:p>R$ 36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1">
          <table:table-cell table:style-name="ce79"/>
          <table:table-cell table:style-name="ce83" office:value-type="float" office:value="36" calcext:value-type="float">
            <text:p>36</text:p>
          </table:table-cell>
          <table:table-cell table:style-name="ce96" office:value-type="string" calcext:value-type="string">
            <text:p>BR3185199</text:p>
          </table:table-cell>
          <table:table-cell table:style-name="ce104" office:value-type="string" calcext:value-type="string">
            <text:p>445274</text:p>
          </table:table-cell>
          <table:table-cell table:style-name="ce83" office:value-type="string" calcext:value-type="string">
            <text:p>GRUPO 2</text:p>
          </table:table-cell>
          <table:table-cell table:style-name="ce107" office:value-type="string" calcext:value-type="string">
            <text:p>ITEM 36 – LÂMINA DE SHAVER PARA ESTRUTURAS ÓSSEAS E TECIDOS MOLES, DIÂMETRO DE 2,5 A 5,5, <text:s text:c="2"/>CARACTERÍSTICAS ADICIONAIS OSCILANTE, SENTIDOS HORÁRIO E ANTI-HORÁRIO, <text:s text:c="2"/>ESTERELIDADE ESTÉRIL E DESCARTÁVEL, COM OPÇÕES DE RETA, CURVA E LONGA.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300" calcext:value-type="float">
            <text:p>300</text:p>
          </table:table-cell>
          <table:table-cell table:style-name="ce125" office:value-type="currency" office:currency="BRL" office:value="824" calcext:value-type="currency">
            <text:p>R$ 824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1">
          <table:table-cell table:style-name="ce79"/>
          <table:table-cell table:style-name="ce83" office:value-type="float" office:value="37" calcext:value-type="float">
            <text:p>37</text:p>
          </table:table-cell>
          <table:table-cell table:style-name="ce96" office:value-type="float" office:value="996613027" calcext:value-type="float">
            <text:p>996613027</text:p>
          </table:table-cell>
          <table:table-cell table:style-name="ce104" office:value-type="float" office:value="449858" calcext:value-type="float">
            <text:p>449858</text:p>
          </table:table-cell>
          <table:table-cell table:style-name="ce83" office:value-type="string" calcext:value-type="string">
            <text:p>GRUPO 2</text:p>
          </table:table-cell>
          <table:table-cell table:style-name="ce107" office:value-type="string" calcext:value-type="string">
            <text:p>ITEM 37 – Dispositivo para fixação fêmoral através de placa em titânio, cujo implante se ajuste a qualquer tamanho de túnel através do encurtamento <text:s text:c="2"/>regulável do mesmo e que permita tensionamento residual após fixaçã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300" calcext:value-type="float">
            <text:p>300</text:p>
          </table:table-cell>
          <table:table-cell table:style-name="ce125" office:value-type="currency" office:currency="BRL" office:value="1650" calcext:value-type="currency">
            <text:p>R$ 1.65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1">
          <table:table-cell table:style-name="ce79"/>
          <table:table-cell table:style-name="ce83" office:value-type="float" office:value="38" calcext:value-type="float">
            <text:p>38</text:p>
          </table:table-cell>
          <table:table-cell table:style-name="ce96" office:value-type="string" calcext:value-type="string">
            <text:p>BR3170976</text:p>
          </table:table-cell>
          <table:table-cell table:style-name="ce104" office:value-type="string" calcext:value-type="string">
            <text:p>440528</text:p>
          </table:table-cell>
          <table:table-cell table:style-name="ce83" office:value-type="string" calcext:value-type="string">
            <text:p>GRUPO 2</text:p>
          </table:table-cell>
          <table:table-cell table:style-name="ce107" office:value-type="string" calcext:value-type="string">
            <text:p>ITEM 38 – PARAFUSO ORTOPÉDICO <text:s/>DE INTERFERÊNCIA BIOCOMPOSTO, <text:s text:c="2"/>APLICAÇÃO PROCEDIMENTO CIRÚRGICO <text:s text:c="2"/>ORTOPÉDICO PARA INSERÇÃO DE ENXERTOS. <text:s/>COMPRIMENTO DE 25 A 35 MM E DE DIÂMETRO DE 5 A 11MM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300" calcext:value-type="float">
            <text:p>300</text:p>
          </table:table-cell>
          <table:table-cell table:style-name="ce125" office:value-type="currency" office:currency="BRL" office:value="900" calcext:value-type="currency">
            <text:p>R$ 90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9">
          <table:table-cell table:style-name="ce79"/>
          <table:table-cell table:style-name="ce83" office:value-type="float" office:value="39" calcext:value-type="float">
            <text:p>39</text:p>
          </table:table-cell>
          <table:table-cell table:style-name="ce96" office:value-type="string" calcext:value-type="string">
            <text:p>BR3321492</text:p>
          </table:table-cell>
          <table:table-cell table:style-name="ce104" office:value-type="float" office:value="440582" calcext:value-type="float">
            <text:p>440582</text:p>
          </table:table-cell>
          <table:table-cell table:style-name="ce98" office:value-type="string" calcext:value-type="string">
            <text:p>GRUPO 3</text:p>
          </table:table-cell>
          <table:table-cell table:style-name="ce107" office:value-type="string" calcext:value-type="string">
            <text:p>ITEM 39 – SISTEMA DE FIO PARA SUTURA DE ALTA RESISTÊNCIA, COM AGULHA NÚMERO 2 E 5, USO ÚNICO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200" calcext:value-type="float">
            <text:p>200</text:p>
          </table:table-cell>
          <table:table-cell table:style-name="ce125" office:value-type="currency" office:currency="BRL" office:value="330" calcext:value-type="currency">
            <text:p>R$ 33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9">
          <table:table-cell table:style-name="ce79"/>
          <table:table-cell table:style-name="ce83" office:value-type="float" office:value="40" calcext:value-type="float">
            <text:p>40</text:p>
          </table:table-cell>
          <table:table-cell table:style-name="ce96" office:value-type="string" calcext:value-type="string">
            <text:p>BR3321493</text:p>
          </table:table-cell>
          <table:table-cell table:style-name="ce104" office:value-type="float" office:value="440582" calcext:value-type="float">
            <text:p>440582</text:p>
          </table:table-cell>
          <table:table-cell table:style-name="ce98" office:value-type="string" calcext:value-type="string">
            <text:p>GRUPO 3</text:p>
          </table:table-cell>
          <table:table-cell table:style-name="ce107" office:value-type="string" calcext:value-type="string">
            <text:p>ITEM 40 – SISTEMA DE PASSADOR DE FIO/SUTURA DO TIPO FIRST PASS OU SCORPION E FIOS DE ALTA RESISTÊNCIA, PARA CIRURGIA DO OMBR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200" calcext:value-type="float">
            <text:p>200</text:p>
          </table:table-cell>
          <table:table-cell table:style-name="ce125" office:value-type="currency" office:currency="BRL" office:value="449" calcext:value-type="currency">
            <text:p>R$ 449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1">
          <table:table-cell table:style-name="ce79"/>
          <table:table-cell table:style-name="ce83" office:value-type="float" office:value="41" calcext:value-type="float">
            <text:p>41</text:p>
          </table:table-cell>
          <table:table-cell table:style-name="ce96" office:value-type="string" calcext:value-type="string">
            <text:p>BR3321494</text:p>
          </table:table-cell>
          <table:table-cell table:style-name="ce104" office:value-type="float" office:value="337888" calcext:value-type="float">
            <text:p>337888</text:p>
          </table:table-cell>
          <table:table-cell table:style-name="ce98" office:value-type="string" calcext:value-type="string">
            <text:p>GRUPO 3</text:p>
          </table:table-cell>
          <table:table-cell table:style-name="ce107" office:value-type="string" calcext:value-type="string">
            <text:p>ITEM 41 – SISTEMA DE LÂMINAS DE MICRODEBRIDAÇÃO DE OMBRO, PARA TECIDOS MOLES E OSSEOS , EM AÇO, CONTROLE MANUAL, <text:s text:c="2"/>PEÇA DE MÃO, PONTAS LISAS, DENTADAS E OU DUPLO DENTADAS EM DIVERSOS TAMANHOS, USO ÚNIC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300" calcext:value-type="float">
            <text:p>300</text:p>
          </table:table-cell>
          <table:table-cell table:style-name="ce125" office:value-type="currency" office:currency="BRL" office:value="375" calcext:value-type="currency">
            <text:p>R$ 375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2">
          <table:table-cell table:style-name="ce79"/>
          <table:table-cell table:style-name="ce83" office:value-type="float" office:value="42" calcext:value-type="float">
            <text:p>42</text:p>
          </table:table-cell>
          <table:table-cell table:style-name="ce96" office:value-type="string" calcext:value-type="string">
            <text:p>BR3335667</text:p>
          </table:table-cell>
          <table:table-cell table:style-name="ce104" office:value-type="float" office:value="318814" calcext:value-type="float">
            <text:p>318814</text:p>
          </table:table-cell>
          <table:table-cell table:style-name="ce98" office:value-type="string" calcext:value-type="string">
            <text:p>GRUPO 3</text:p>
          </table:table-cell>
          <table:table-cell table:style-name="ce107" office:value-type="string" calcext:value-type="string">
            <text:p>ITEM 42 – SISTEMA DE FIXAÇÃO POR ANCORAGEM EM TCP/PLGA, INSTRUMENTO E TECNOLOGIA DE ROSCA <text:s/>DUPLA CANULADA PARA FIXAÇÃO CORTICAL E ESPONJOSA, PRODUTO BIOCOMPOSTO ACOMPANHADOS <text:s/>COM FIOS DE ALTARESISTENCIA PARCIALMENTE ABSORVIVEL #2, TAMANHOS 4.5 , 4.75 , 5.5 E 6.5MM, <text:s/>USO ÚNIC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160" calcext:value-type="float">
            <text:p>160</text:p>
          </table:table-cell>
          <table:table-cell table:style-name="ce125" office:value-type="currency" office:currency="BRL" office:value="2199" calcext:value-type="currency">
            <text:p>R$ 2.199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0">
          <table:table-cell table:style-name="ce79"/>
          <table:table-cell table:style-name="ce83" office:value-type="float" office:value="43" calcext:value-type="float">
            <text:p>43</text:p>
          </table:table-cell>
          <table:table-cell table:style-name="ce96" office:value-type="string" calcext:value-type="string">
            <text:p>BR3325052</text:p>
          </table:table-cell>
          <table:table-cell table:style-name="ce104" office:value-type="float" office:value="440582" calcext:value-type="float">
            <text:p>440582</text:p>
          </table:table-cell>
          <table:table-cell table:style-name="ce98" office:value-type="string" calcext:value-type="string">
            <text:p>GRUPO 3</text:p>
          </table:table-cell>
          <table:table-cell table:style-name="ce107" office:value-type="string" calcext:value-type="string">
            <text:p>ITEM 43 – FIOS DE ALTA RESISTÊNCIA LINEARES E DO TIPO FITA</text:p>
          </table:table-cell>
          <table:table-cell table:style-name="ce104" office:value-type="string" calcext:value-type="string">
            <text:p>CONJUNTO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150" calcext:value-type="float">
            <text:p>150</text:p>
          </table:table-cell>
          <table:table-cell table:style-name="ce125" office:value-type="currency" office:currency="BRL" office:value="330" calcext:value-type="currency">
            <text:p>R$ 33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9">
          <table:table-cell table:style-name="ce79"/>
          <table:table-cell table:style-name="ce83" office:value-type="float" office:value="44" calcext:value-type="float">
            <text:p>44</text:p>
          </table:table-cell>
          <table:table-cell table:style-name="ce96" office:value-type="string" calcext:value-type="string">
            <text:p>BR3157937</text:p>
          </table:table-cell>
          <table:table-cell table:style-name="ce104" office:value-type="string" calcext:value-type="string">
            <text:p>440575</text:p>
          </table:table-cell>
          <table:table-cell table:style-name="ce98" office:value-type="string" calcext:value-type="string">
            <text:p>GRUPO 3</text:p>
          </table:table-cell>
          <table:table-cell table:style-name="ce107" office:value-type="string" calcext:value-type="string">
            <text:p>TEM 44 – Sistema de passador de fio/sutura do tipo firstpass ou scorpion ou de melhor qualidade e fios de alta resistência ou de melhor <text:s text:c="2"/>qualidade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4" calcext:value-type="float">
            <text:p>4</text:p>
          </table:table-cell>
          <table:table-cell table:style-name="ce104" office:value-type="float" office:value="60" calcext:value-type="float">
            <text:p>60</text:p>
          </table:table-cell>
          <table:table-cell table:style-name="ce125" office:value-type="currency" office:currency="BRL" office:value="450" calcext:value-type="currency">
            <text:p>R$ 45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1">
          <table:table-cell table:style-name="ce79"/>
          <table:table-cell table:style-name="ce83" office:value-type="float" office:value="45" calcext:value-type="float">
            <text:p>45</text:p>
          </table:table-cell>
          <table:table-cell table:style-name="ce96" office:value-type="float" office:value="15714204" calcext:value-type="float">
            <text:p>15714204</text:p>
          </table:table-cell>
          <table:table-cell table:style-name="ce104" office:value-type="float" office:value="440581" calcext:value-type="float">
            <text:p>440581</text:p>
          </table:table-cell>
          <table:table-cell table:style-name="ce98" office:value-type="string" calcext:value-type="string">
            <text:p>GRUPO 3</text:p>
          </table:table-cell>
          <table:table-cell table:style-name="ce107" office:value-type="string" calcext:value-type="string">
            <text:p>TEM 45 – SISTEMA DE FIXAÇÃO POR ANCORAGEM EM TCP/ PLGA, OU PLLA, CANULADA, PRODUTO BIOCOMPOSTO COM <text:s text:c="2"/>FIOS DE ALTA RESISTÊNCIA #2, ROSQUEADA NO TAMANHO DE APROXIMADAMENTE 2,1MM A 6,5MM, USO ÚNIC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400" calcext:value-type="float">
            <text:p>400</text:p>
          </table:table-cell>
          <table:table-cell table:style-name="ce125" office:value-type="currency" office:currency="BRL" office:value="1550" calcext:value-type="currency">
            <text:p>R$ 1.55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7">
          <table:table-cell table:style-name="ce79"/>
          <table:table-cell table:style-name="ce83" office:value-type="float" office:value="46" calcext:value-type="float">
            <text:p>46</text:p>
          </table:table-cell>
          <table:table-cell table:style-name="ce96" office:value-type="float" office:value="15714203" calcext:value-type="float">
            <text:p>15714203</text:p>
          </table:table-cell>
          <table:table-cell table:style-name="ce104" office:value-type="float" office:value="440581" calcext:value-type="float">
            <text:p>440581</text:p>
          </table:table-cell>
          <table:table-cell table:style-name="ce98" office:value-type="string" calcext:value-type="string">
            <text:p>GRUPO 3</text:p>
          </table:table-cell>
          <table:table-cell table:style-name="ce107" office:value-type="string" calcext:value-type="string">
            <text:p>ÂNCORA <text:s/>BIOABSORVÍVEL AB <text:s/>5.0 MM <text:s/>(ROSQUEÁVEL) ESTÉRIL PLLA, <text:s/>COM 2 FIOS DE SUTURAS, <text:s/>PARA FRESA DILATADORA COM MARCAÇÃO DE <text:s text:c="2"/>PROFUNDIDADE, GUIA DE INSTALAÇÃO <text:s text:c="2"/>E INSTRUMENTAL DE COLOCAÇÃ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400" calcext:value-type="float">
            <text:p>400</text:p>
          </table:table-cell>
          <table:table-cell table:style-name="ce125" office:value-type="currency" office:currency="BRL" office:value="1940" calcext:value-type="currency">
            <text:p>R$ 1.94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9">
          <table:table-cell table:style-name="ce79"/>
          <table:table-cell table:style-name="ce83" office:value-type="float" office:value="47" calcext:value-type="float">
            <text:p>47</text:p>
          </table:table-cell>
          <table:table-cell table:style-name="ce96" office:value-type="float" office:value="15167782" calcext:value-type="float">
            <text:p>15167782</text:p>
          </table:table-cell>
          <table:table-cell table:style-name="ce104" office:value-type="float" office:value="440581" calcext:value-type="float">
            <text:p>440581</text:p>
          </table:table-cell>
          <table:table-cell table:style-name="ce98" office:value-type="string" calcext:value-type="string">
            <text:p>GRUPO 3</text:p>
          </table:table-cell>
          <table:table-cell table:style-name="ce107" office:value-type="string" calcext:value-type="string">
            <text:p>ITEM 47 – SISTEMA DE FIXAÇÃO POR ANCORAGEM EM TITÂNIO, COM AO MENOS DOIS FIOS DE ALTA RESISTÊNCIA , <text:s text:c="2"/>TAMANHOS VARIADOS DE 1,8 A 5,5 MM USO ÚNIC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200" calcext:value-type="float">
            <text:p>200</text:p>
          </table:table-cell>
          <table:table-cell table:style-name="ce125" office:value-type="currency" office:currency="BRL" office:value="1150" calcext:value-type="currency">
            <text:p>R$ 1.15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1">
          <table:table-cell table:style-name="ce79"/>
          <table:table-cell table:style-name="ce83" office:value-type="float" office:value="48" calcext:value-type="float">
            <text:p>48</text:p>
          </table:table-cell>
          <table:table-cell table:style-name="ce96" office:value-type="float" office:value="15714207" calcext:value-type="float">
            <text:p>15714207</text:p>
          </table:table-cell>
          <table:table-cell table:style-name="ce104" office:value-type="float" office:value="446423" calcext:value-type="float">
            <text:p>446423</text:p>
          </table:table-cell>
          <table:table-cell table:style-name="ce98" office:value-type="string" calcext:value-type="string">
            <text:p>GRUPO 3</text:p>
          </table:table-cell>
          <table:table-cell table:style-name="ce107" office:value-type="string" calcext:value-type="string">
            <text:p>ITEM 48 – SISTEMA DE CÂNULA PARA ARTROSCOPIA DE OMBRO E JOELHO COM OBTURADOR CANULADO ROSQUEADO <text:s text:c="3"/>EM TAMANHO E COMPRIMENTOS DIVERSOS, MATERIAL DESCARTÁVEL E USO ÚNICO. <text:s text:c="9"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300" calcext:value-type="float">
            <text:p>300</text:p>
          </table:table-cell>
          <table:table-cell table:style-name="ce125" office:value-type="currency" office:currency="BRL" office:value="350" calcext:value-type="currency">
            <text:p>R$ 35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0">
          <table:table-cell table:style-name="ce79"/>
          <table:table-cell table:style-name="ce83" office:value-type="float" office:value="49" calcext:value-type="float">
            <text:p>49</text:p>
          </table:table-cell>
          <table:table-cell table:style-name="ce96" office:value-type="float" office:value="15714212" calcext:value-type="float">
            <text:p>15714212</text:p>
          </table:table-cell>
          <table:table-cell table:style-name="ce104" office:value-type="float" office:value="354539" calcext:value-type="float">
            <text:p>354539</text:p>
          </table:table-cell>
          <table:table-cell table:style-name="ce98" office:value-type="string" calcext:value-type="string">
            <text:p>GRUPO 3</text:p>
          </table:table-cell>
          <table:table-cell table:style-name="ce107" office:value-type="string" calcext:value-type="string">
            <text:p>ITEM 49 – PONTEIRA DE RADIOFREQUÊNCIA DESCARTÁVEL 90 GRAUS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300" calcext:value-type="float">
            <text:p>300</text:p>
          </table:table-cell>
          <table:table-cell table:style-name="ce125" office:value-type="currency" office:currency="BRL" office:value="1900" calcext:value-type="currency">
            <text:p>R$ 1.90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3">
          <table:table-cell table:style-name="ce79"/>
          <table:table-cell table:style-name="ce83" office:value-type="float" office:value="50" calcext:value-type="float">
            <text:p>50</text:p>
          </table:table-cell>
          <table:table-cell table:style-name="ce96" office:value-type="float" office:value="15714205" calcext:value-type="float">
            <text:p>15714205</text:p>
          </table:table-cell>
          <table:table-cell table:style-name="ce104" office:value-type="float" office:value="376650" calcext:value-type="float">
            <text:p>376650</text:p>
          </table:table-cell>
          <table:table-cell table:style-name="ce98" office:value-type="string" calcext:value-type="string">
            <text:p>GRUPO 4</text:p>
          </table:table-cell>
          <table:table-cell table:style-name="ce107" office:value-type="string" calcext:value-type="string">
            <text:p>AGULHA INICIALIZADORA PARA ARTROSCOPIA DE QUADRIL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20" calcext:value-type="float">
            <text:p>20</text:p>
          </table:table-cell>
          <table:table-cell table:style-name="ce126" office:value-type="currency" office:currency="BRL" office:value="2000" calcext:value-type="currency">
            <text:p>R$ 2.00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3">
          <table:table-cell table:style-name="ce79"/>
          <table:table-cell table:style-name="ce83" office:value-type="float" office:value="51" calcext:value-type="float">
            <text:p>51</text:p>
          </table:table-cell>
          <table:table-cell table:style-name="ce96" office:value-type="string" calcext:value-type="string">
            <text:p>BR3321489</text:p>
          </table:table-cell>
          <table:table-cell table:style-name="ce104" office:value-type="float" office:value="413923" calcext:value-type="float">
            <text:p>413923</text:p>
          </table:table-cell>
          <table:table-cell table:style-name="ce98" office:value-type="string" calcext:value-type="string">
            <text:p>GRUPO 4</text:p>
          </table:table-cell>
          <table:table-cell table:style-name="ce107" office:value-type="string" calcext:value-type="string">
            <text:p>Broca descartável para quadril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40" calcext:value-type="float">
            <text:p>40</text:p>
          </table:table-cell>
          <table:table-cell table:style-name="ce126" office:value-type="currency" office:currency="BRL" office:value="1565" calcext:value-type="currency">
            <text:p>R$ 1.565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3">
          <table:table-cell table:style-name="ce79"/>
          <table:table-cell table:style-name="ce83" office:value-type="float" office:value="52" calcext:value-type="float">
            <text:p>52</text:p>
          </table:table-cell>
          <table:table-cell table:style-name="ce96" office:value-type="string" calcext:value-type="string">
            <text:p>BR3321490</text:p>
          </table:table-cell>
          <table:table-cell table:style-name="ce104" office:value-type="float" office:value="480030" calcext:value-type="float">
            <text:p>480030</text:p>
          </table:table-cell>
          <table:table-cell table:style-name="ce98" office:value-type="string" calcext:value-type="string">
            <text:p>GRUPO 4</text:p>
          </table:table-cell>
          <table:table-cell table:style-name="ce107" office:value-type="string" calcext:value-type="string">
            <text:p>CÂNULA DE INTRODUÇÃO PARA QUADRIL 5,7 MM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4" calcext:value-type="float">
            <text:p>4</text:p>
          </table:table-cell>
          <table:table-cell table:style-name="ce104" office:value-type="float" office:value="41" calcext:value-type="float">
            <text:p>41</text:p>
          </table:table-cell>
          <table:table-cell table:style-name="ce126" office:value-type="currency" office:currency="BRL" office:value="1005" calcext:value-type="currency">
            <text:p>R$ 1.005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4">
          <table:table-cell table:style-name="ce79"/>
          <table:table-cell table:style-name="ce83" office:value-type="float" office:value="53" calcext:value-type="float">
            <text:p>53</text:p>
          </table:table-cell>
          <table:table-cell table:style-name="ce96" office:value-type="string" calcext:value-type="string">
            <text:p>BR3321449</text:p>
          </table:table-cell>
          <table:table-cell table:style-name="ce104" office:value-type="float" office:value="443211" calcext:value-type="float">
            <text:p>443211</text:p>
          </table:table-cell>
          <table:table-cell table:style-name="ce98" office:value-type="string" calcext:value-type="string">
            <text:p>GRUPO 4</text:p>
          </table:table-cell>
          <table:table-cell table:style-name="ce107" office:value-type="string" calcext:value-type="string">
            <text:p>PARAFUSO ÂNCORA PARA QUADRIL DE 2,0 MM A 2,4 MM EM POLIETILENO COM HIDROXAPATITA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51" calcext:value-type="float">
            <text:p>51</text:p>
          </table:table-cell>
          <table:table-cell table:style-name="ce126" office:value-type="currency" office:currency="BRL" office:value="1700" calcext:value-type="currency">
            <text:p>R$ 1.70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0">
          <table:table-cell table:style-name="ce79"/>
          <table:table-cell table:style-name="ce83" office:value-type="float" office:value="54" calcext:value-type="float">
            <text:p>54</text:p>
          </table:table-cell>
          <table:table-cell table:style-name="ce96" office:value-type="string" calcext:value-type="string">
            <text:p>BR3324692</text:p>
          </table:table-cell>
          <table:table-cell table:style-name="ce104" office:value-type="float" office:value="443211" calcext:value-type="float">
            <text:p>443211</text:p>
          </table:table-cell>
          <table:table-cell table:style-name="ce98" office:value-type="string" calcext:value-type="string">
            <text:p>GRUPO 4</text:p>
          </table:table-cell>
          <table:table-cell table:style-name="ce107" office:value-type="string" calcext:value-type="string">
            <text:p>ITEM 54 – PARAFUSO ÂNCORA PARA QUADRIL DE 1,8MM A 2,0 MM EM POLIESTER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41" calcext:value-type="float">
            <text:p>41</text:p>
          </table:table-cell>
          <table:table-cell table:style-name="ce126" office:value-type="currency" office:currency="BRL" office:value="1850" calcext:value-type="currency">
            <text:p>R$ 1.85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4">
          <table:table-cell table:style-name="ce79"/>
          <table:table-cell table:style-name="ce83" office:value-type="float" office:value="55" calcext:value-type="float">
            <text:p>55</text:p>
          </table:table-cell>
          <table:table-cell table:style-name="ce96" office:value-type="string" calcext:value-type="string">
            <text:p>BR3324694</text:p>
          </table:table-cell>
          <table:table-cell table:style-name="ce104" office:value-type="float" office:value="365867" calcext:value-type="float">
            <text:p>365867</text:p>
          </table:table-cell>
          <table:table-cell table:style-name="ce98" office:value-type="string" calcext:value-type="string">
            <text:p>GRUPO 4</text:p>
          </table:table-cell>
          <table:table-cell table:style-name="ce107" office:value-type="string" calcext:value-type="string">
            <text:p>PASSADOR DE SUTURA - SISTEMA PASSADOR DE SUTURA, COM ANGULAÇÕES EM DIVERSOS GRAUS, <text:s text:c="2"/>USO ÚNICO <text:s/>COM ANGULAÇOES EM DIVERSOS GRAUS, PRODUTO USO ÚNIC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41" calcext:value-type="float">
            <text:p>41</text:p>
          </table:table-cell>
          <table:table-cell table:style-name="ce126" office:value-type="currency" office:currency="BRL" office:value="1600" calcext:value-type="currency">
            <text:p>R$ 1.60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3">
          <table:table-cell table:style-name="ce79"/>
          <table:table-cell table:style-name="ce83" office:value-type="float" office:value="56" calcext:value-type="float">
            <text:p>56</text:p>
          </table:table-cell>
          <table:table-cell table:style-name="ce97" office:value-type="string" calcext:value-type="string">
            <text:p>BR3324841</text:p>
          </table:table-cell>
          <table:table-cell table:style-name="ce104" office:value-type="float" office:value="365867" calcext:value-type="float">
            <text:p>365867</text:p>
          </table:table-cell>
          <table:table-cell table:style-name="ce98" office:value-type="string" calcext:value-type="string">
            <text:p>GRUPO 4</text:p>
          </table:table-cell>
          <table:table-cell table:style-name="ce110" office:value-type="string" calcext:value-type="string">
            <text:p>LÂMINA DE SHAVER ÓSSEA PARA QUADRIL, LONGA, RETA ABRADER 5,5MM DE 180MM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6" calcext:value-type="float">
            <text:p>6</text:p>
          </table:table-cell>
          <table:table-cell table:style-name="ce104" office:value-type="float" office:value="41" calcext:value-type="float">
            <text:p>41</text:p>
          </table:table-cell>
          <table:table-cell table:style-name="ce126" office:value-type="currency" office:currency="BRL" office:value="1250" calcext:value-type="currency">
            <text:p>R$ 1.25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3">
          <table:table-cell table:style-name="ce79"/>
          <table:table-cell table:style-name="ce83" office:value-type="float" office:value="57" calcext:value-type="float">
            <text:p>57</text:p>
          </table:table-cell>
          <table:table-cell table:style-name="ce96" office:value-type="string" calcext:value-type="string">
            <text:p>BR3324858</text:p>
          </table:table-cell>
          <table:table-cell table:style-name="ce104" office:value-type="float" office:value="365867" calcext:value-type="float">
            <text:p>365867</text:p>
          </table:table-cell>
          <table:table-cell table:style-name="ce98" office:value-type="string" calcext:value-type="string">
            <text:p>GRUPO 4</text:p>
          </table:table-cell>
          <table:table-cell table:style-name="ce107" office:value-type="string" calcext:value-type="string">
            <text:p>LÂMINA DE SHAVER ÓSSEA PARA QUADRIL, LONGA, RETA ABRADER 4,0MM DE 180MM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4" calcext:value-type="float">
            <text:p>4</text:p>
          </table:table-cell>
          <table:table-cell table:style-name="ce104" office:value-type="float" office:value="41" calcext:value-type="float">
            <text:p>41</text:p>
          </table:table-cell>
          <table:table-cell table:style-name="ce126" office:value-type="currency" office:currency="BRL" office:value="1250" calcext:value-type="currency">
            <text:p>R$ 1.25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3">
          <table:table-cell table:style-name="ce79"/>
          <table:table-cell table:style-name="ce83" office:value-type="float" office:value="58" calcext:value-type="float">
            <text:p>58</text:p>
          </table:table-cell>
          <table:table-cell table:style-name="ce96" office:value-type="string" calcext:value-type="string">
            <text:p>BR3324896</text:p>
          </table:table-cell>
          <table:table-cell table:style-name="ce104" office:value-type="float" office:value="365867" calcext:value-type="float">
            <text:p>365867</text:p>
          </table:table-cell>
          <table:table-cell table:style-name="ce98" office:value-type="string" calcext:value-type="string">
            <text:p>GRUPO 4</text:p>
          </table:table-cell>
          <table:table-cell table:style-name="ce107" office:value-type="string" calcext:value-type="string">
            <text:p>LÂMINA DE SHAVER PARA QUADRIL, LONGA, RETA DE 180MM</text:p>
          </table:table-cell>
          <table:table-cell table:style-name="ce104" office:value-type="string" calcext:value-type="string">
            <text:p>UNIDADE</text:p>
          </table:table-cell>
          <table:table-cell table:style-name="ce122" office:value-type="float" office:value="3" calcext:value-type="float">
            <text:p>3</text:p>
          </table:table-cell>
          <table:table-cell table:style-name="ce104" office:value-type="float" office:value="41" calcext:value-type="float">
            <text:p>41</text:p>
          </table:table-cell>
          <table:table-cell table:style-name="ce126" office:value-type="currency" office:currency="BRL" office:value="1250" calcext:value-type="currency">
            <text:p>R$ 1.25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3">
          <table:table-cell table:style-name="ce79"/>
          <table:table-cell table:style-name="ce83" office:value-type="float" office:value="59" calcext:value-type="float">
            <text:p>59</text:p>
          </table:table-cell>
          <table:table-cell table:style-name="ce96" office:value-type="string" calcext:value-type="string">
            <text:p>BR3325055</text:p>
          </table:table-cell>
          <table:table-cell table:style-name="ce104" office:value-type="float" office:value="365867" calcext:value-type="float">
            <text:p>365867</text:p>
          </table:table-cell>
          <table:table-cell table:style-name="ce98" office:value-type="string" calcext:value-type="string">
            <text:p>GRUPO 4</text:p>
          </table:table-cell>
          <table:table-cell table:style-name="ce107" office:value-type="string" calcext:value-type="string">
            <text:p>LÂMINAS <text:s/>DE SHAVER PARA QUADRIL, LONGA, CURVA CÔNCAVA / CONVEXA DE 180MM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4" calcext:value-type="float">
            <text:p>4</text:p>
          </table:table-cell>
          <table:table-cell table:style-name="ce104" office:value-type="float" office:value="41" calcext:value-type="float">
            <text:p>41</text:p>
          </table:table-cell>
          <table:table-cell table:style-name="ce126" office:value-type="currency" office:currency="BRL" office:value="1250" calcext:value-type="currency">
            <text:p>R$ 1.25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3">
          <table:table-cell table:style-name="ce79"/>
          <table:table-cell table:style-name="ce83" office:value-type="float" office:value="60" calcext:value-type="float">
            <text:p>60</text:p>
          </table:table-cell>
          <table:table-cell table:style-name="ce96" office:value-type="string" calcext:value-type="string">
            <text:p>BR3184756</text:p>
          </table:table-cell>
          <table:table-cell table:style-name="ce104" office:value-type="string" calcext:value-type="string">
            <text:p>422950</text:p>
          </table:table-cell>
          <table:table-cell table:style-name="ce98" office:value-type="string" calcext:value-type="string">
            <text:p>GRUPO 4</text:p>
          </table:table-cell>
          <table:table-cell table:style-name="ce107" office:value-type="string" calcext:value-type="string">
            <text:p>CINTA DE TRAÇÃO DO PÉ PARA ARTROSCOPIA 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4" calcext:value-type="float">
            <text:p>4</text:p>
          </table:table-cell>
          <table:table-cell table:style-name="ce104" office:value-type="float" office:value="20" calcext:value-type="float">
            <text:p>20</text:p>
          </table:table-cell>
          <table:table-cell table:style-name="ce126" office:value-type="currency" office:currency="BRL" office:value="165" calcext:value-type="currency">
            <text:p>R$ 165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7">
          <table:table-cell table:style-name="ce79"/>
          <table:table-cell table:style-name="ce83" office:value-type="float" office:value="61" calcext:value-type="float">
            <text:p>61</text:p>
          </table:table-cell>
          <table:table-cell table:style-name="ce96" office:value-type="string" calcext:value-type="string">
            <text:p>BR3186372</text:p>
          </table:table-cell>
          <table:table-cell table:style-name="ce104" office:value-type="float" office:value="388239" calcext:value-type="float">
            <text:p>388239</text:p>
          </table:table-cell>
          <table:table-cell table:style-name="ce98" office:value-type="string" calcext:value-type="string">
            <text:p>GRUPO 4</text:p>
          </table:table-cell>
          <table:table-cell table:style-name="ce107" office:value-type="string" calcext:value-type="string">
            <text:p>ALMOFADA DE ABDUÇÃO PARA POSICIONAMENTO DOS MEMBROS INFERIORES EM PÓS OPERATORIO DE <text:s text:c="2"/>CIRURGIA DE ARTROSCOPIA DE QUADRIL COM FECHOS ADERENTES. TAMANHO ÚNICO. (ROLO POSICIONADOR DESCARTÁVEL).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4" calcext:value-type="float">
            <text:p>4</text:p>
          </table:table-cell>
          <table:table-cell table:style-name="ce104" office:value-type="float" office:value="20" calcext:value-type="float">
            <text:p>20</text:p>
          </table:table-cell>
          <table:table-cell table:style-name="ce126" office:value-type="currency" office:currency="BRL" office:value="600" calcext:value-type="currency">
            <text:p>R$ 60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3">
          <table:table-cell table:style-name="ce79"/>
          <table:table-cell table:style-name="ce83" office:value-type="float" office:value="62" calcext:value-type="float">
            <text:p>62</text:p>
          </table:table-cell>
          <table:table-cell table:style-name="ce96" office:value-type="float" office:value="995358095" calcext:value-type="float">
            <text:p>995358095</text:p>
          </table:table-cell>
          <table:table-cell table:style-name="ce104" office:value-type="float" office:value="361900" calcext:value-type="float">
            <text:p>361900</text:p>
          </table:table-cell>
          <table:table-cell table:style-name="ce98" office:value-type="string" calcext:value-type="string">
            <text:p>GRUPO 4</text:p>
          </table:table-cell>
          <table:table-cell table:style-name="ce107" office:value-type="string" calcext:value-type="string">
            <text:p>FIO GUIA NITINOL 1,2MM X 450MM PARA ARTROSCOPIA DO QUADRIL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4" calcext:value-type="float">
            <text:p>4</text:p>
          </table:table-cell>
          <table:table-cell table:style-name="ce104" office:value-type="float" office:value="20" calcext:value-type="float">
            <text:p>20</text:p>
          </table:table-cell>
          <table:table-cell table:style-name="ce126" office:value-type="currency" office:currency="BRL" office:value="500" calcext:value-type="currency">
            <text:p>R$ 50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3">
          <table:table-cell table:style-name="ce79"/>
          <table:table-cell table:style-name="ce83" office:value-type="float" office:value="63" calcext:value-type="float">
            <text:p>63</text:p>
          </table:table-cell>
          <table:table-cell table:style-name="ce96" office:value-type="float" office:value="15714206" calcext:value-type="float">
            <text:p>15714206</text:p>
          </table:table-cell>
          <table:table-cell table:style-name="ce104" office:value-type="float" office:value="357867" calcext:value-type="float">
            <text:p>357867</text:p>
          </table:table-cell>
          <table:table-cell table:style-name="ce98" office:value-type="string" calcext:value-type="string">
            <text:p>GRUPO 4</text:p>
          </table:table-cell>
          <table:table-cell table:style-name="ce107" office:value-type="string" calcext:value-type="string">
            <text:p>BISTURI SERRILHADO PARA CIRURGAS DE QUADRIL TIPO BANANA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4" calcext:value-type="float">
            <text:p>4</text:p>
          </table:table-cell>
          <table:table-cell table:style-name="ce104" office:value-type="float" office:value="20" calcext:value-type="float">
            <text:p>20</text:p>
          </table:table-cell>
          <table:table-cell table:style-name="ce126" office:value-type="currency" office:currency="BRL" office:value="350" calcext:value-type="currency">
            <text:p>R$ 35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9">
          <table:table-cell table:style-name="ce79"/>
          <table:table-cell table:style-name="ce83" office:value-type="float" office:value="64" calcext:value-type="float">
            <text:p>64</text:p>
          </table:table-cell>
          <table:table-cell table:style-name="ce96" office:value-type="float" office:value="15714213" calcext:value-type="float">
            <text:p>15714213</text:p>
          </table:table-cell>
          <table:table-cell table:style-name="ce104" office:value-type="float" office:value="354537" calcext:value-type="float">
            <text:p>354537</text:p>
          </table:table-cell>
          <table:table-cell table:style-name="ce98" office:value-type="string" calcext:value-type="string">
            <text:p>GRUPO 4</text:p>
          </table:table-cell>
          <table:table-cell table:style-name="ce107" office:value-type="string" calcext:value-type="string">
            <text:p>ITEM 64 – PONTEIRA DE RADIOFREQUENCIA BIPOLAR PARA ABLAÇÃO CONTROLADA EM PLASMA DE BAIXA TEMPERATURA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100" calcext:value-type="float">
            <text:p>100</text:p>
          </table:table-cell>
          <table:table-cell table:style-name="ce126" office:value-type="currency" office:currency="BRL" office:value="3000" calcext:value-type="currency">
            <text:p>R$ 3.00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2">
          <table:table-cell table:style-name="ce79"/>
          <table:table-cell table:style-name="ce83" office:value-type="float" office:value="65" calcext:value-type="float">
            <text:p>65</text:p>
          </table:table-cell>
          <table:table-cell table:style-name="ce96" office:value-type="string" calcext:value-type="string">
            <text:p>BR3309590</text:p>
          </table:table-cell>
          <table:table-cell table:style-name="ce104" office:value-type="float" office:value="435679" calcext:value-type="float">
            <text:p>435679</text:p>
          </table:table-cell>
          <table:table-cell table:style-name="ce98" office:value-type="string" calcext:value-type="string">
            <text:p>GRUPO 5</text:p>
          </table:table-cell>
          <table:table-cell table:style-name="ce107" office:value-type="string" calcext:value-type="string">
            <text:p>ITEM 65 – PLACA TIBIAL E FEMORAL, MEMBROS INFERIORES PARA CIRURGIAS COMPLEXAS E ARTRODESE, ESPESSURA 3MM, 4 À 12 FUROS, COMPRIMENTO 59MM À <text:s text:c="2"/>101MM, CALÇOS 5-7, 5-10-12, 5-15MM - LÂMINA METÁLICA PARA FIXAÇÃO EM SUPERFÍCIE DIAFISÁRIA OU <text:s text:c="2"/>DIÁFISO-METAFISÁRIA ÓSSEA POR PARAFUSOS ATRAVÉS DE SEUS ORIFÍCIOS NEUTROS, DINÂMICOS OU <text:s text:c="2"/>ROSQUEADOS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8" calcext:value-type="float">
            <text:p>8</text:p>
          </table:table-cell>
          <table:table-cell table:style-name="ce104" office:value-type="float" office:value="30" calcext:value-type="float">
            <text:p>30</text:p>
          </table:table-cell>
          <table:table-cell table:style-name="ce125" office:value-type="currency" office:currency="BRL" office:value="12000" calcext:value-type="currency">
            <text:p>R$ 12.000,00</text:p>
          </table:table-cell>
          <table:table-cell table:style-name="ce127" office:value-type="string" calcext:value-type="string">
            <text:p>DMO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1">
          <table:table-cell table:style-name="ce79"/>
          <table:table-cell table:style-name="ce83" office:value-type="float" office:value="66" calcext:value-type="float">
            <text:p>66</text:p>
          </table:table-cell>
          <table:table-cell table:style-name="ce96" office:value-type="float" office:value="190035372" calcext:value-type="float">
            <text:p>190035372</text:p>
          </table:table-cell>
          <table:table-cell table:style-name="ce104" office:value-type="float" office:value="285172" calcext:value-type="float">
            <text:p>285172</text:p>
          </table:table-cell>
          <table:table-cell table:style-name="ce98" office:value-type="string" calcext:value-type="string">
            <text:p>GRUPO 5</text:p>
          </table:table-cell>
          <table:table-cell table:style-name="ce108" office:value-type="string" calcext:value-type="string">
            <text:p>ITEM 66 – ENXERTO PARA REVISÃO GRANULADO TRIFOSFATO DE CÁLCIO <text:s/>- enxerto ósseo, material biocerâmica <text:s text:c="2"/>trifosfato de cálcio, tipo reconhecimento p/osteoblastos;0,3micra porosidade, esterilidade estéril, apresentação <text:s text:c="2"/>embalagem individual <text:s text:c="3"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156" calcext:value-type="float">
            <text:p>156</text:p>
          </table:table-cell>
          <table:table-cell table:style-name="ce125" office:value-type="currency" office:currency="BRL" office:value="6900" calcext:value-type="currency">
            <text:p>R$ 6.900,00</text:p>
          </table:table-cell>
          <table:table-cell table:style-name="ce127" office:value-type="string" calcext:value-type="string">
            <text:p>DMO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4">
          <table:table-cell table:style-name="ce79"/>
          <table:table-cell table:style-name="ce83" office:value-type="float" office:value="67" calcext:value-type="float">
            <text:p>67</text:p>
          </table:table-cell>
          <table:table-cell table:style-name="ce96" office:value-type="string" calcext:value-type="string">
            <text:p>BR3157927</text:p>
          </table:table-cell>
          <table:table-cell table:style-name="ce104" office:value-type="string" calcext:value-type="string">
            <text:p>370203</text:p>
          </table:table-cell>
          <table:table-cell table:style-name="ce98" office:value-type="string" calcext:value-type="string">
            <text:p>GRUPO 5</text:p>
          </table:table-cell>
          <table:table-cell table:style-name="ce107" office:value-type="string" calcext:value-type="string">
            <text:p>PRÓTESE TOTAL PARA JOELHO CIMENTADA COM OU SEM PRESERVAÇÃO DO LIGAMENTO CRUZADO, <text:s text:c="2"/>COM O CIMENTO ORTOPÉDICO PARA COLOCAÇÃO E OPÇÃO DE NAVEGAÇÃO . <text:s text:c="2"/>Trata-se de uma protese para substituicao do joelho, com componente femural, e componente tibial, <text:s text:c="2"/>polietileno e componente patelar cimentados. <text:s text:c="3"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60" calcext:value-type="float">
            <text:p>60</text:p>
          </table:table-cell>
          <table:table-cell table:style-name="ce125" office:value-type="currency" office:currency="BRL" office:value="14000" calcext:value-type="currency">
            <text:p>R$ 14.000,00</text:p>
          </table:table-cell>
          <table:table-cell table:style-name="ce127" office:value-type="string" calcext:value-type="string">
            <text:p>DMO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4">
          <table:table-cell table:style-name="ce79"/>
          <table:table-cell table:style-name="ce83" office:value-type="float" office:value="68" calcext:value-type="float">
            <text:p>68</text:p>
          </table:table-cell>
          <table:table-cell table:style-name="ce96" office:value-type="string" calcext:value-type="string">
            <text:p>BR3157928</text:p>
          </table:table-cell>
          <table:table-cell table:style-name="ce104" office:value-type="string" calcext:value-type="string">
            <text:p>370203</text:p>
          </table:table-cell>
          <table:table-cell table:style-name="ce98" office:value-type="string" calcext:value-type="string">
            <text:p>GRUPO 5</text:p>
          </table:table-cell>
          <table:table-cell table:style-name="ce107" office:value-type="string" calcext:value-type="string">
            <text:p>PRÓTESE TOTAL PARA JOELHO CIMENTADA. COM PRESERVAÇÃO DO LIGAMENTO CRUZADO <text:s/>COM O CIMENTO <text:s text:c="2"/>ORTOPÉDICO COM ANTIBIÓTICO PARA COLOCAÇÃO TRATA-SE <text:s/>DE UMA <text:s/>PROTESE <text:s/>PARA SUBSTITUICAO DO <text:s/>JOELHO, COM COMPONENTE FEMURAL, E COMPONENTE TIBIAL, CIMENTADOS COM CIMENTO COM ANTIBIOTICO <text:s text:c="3"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100" calcext:value-type="float">
            <text:p>100</text:p>
          </table:table-cell>
          <table:table-cell table:style-name="ce125" office:value-type="currency" office:currency="BRL" office:value="14000" calcext:value-type="currency">
            <text:p>R$ 14.000,00</text:p>
          </table:table-cell>
          <table:table-cell table:style-name="ce127" office:value-type="string" calcext:value-type="string">
            <text:p>DMO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2">
          <table:table-cell table:style-name="ce79"/>
          <table:table-cell table:style-name="ce83" office:value-type="float" office:value="69" calcext:value-type="float">
            <text:p>69</text:p>
          </table:table-cell>
          <table:table-cell table:style-name="ce96" office:value-type="string" calcext:value-type="string">
            <text:p>BR3170913</text:p>
          </table:table-cell>
          <table:table-cell table:style-name="ce104" office:value-type="string" calcext:value-type="string">
            <text:p>370203</text:p>
          </table:table-cell>
          <table:table-cell table:style-name="ce98" office:value-type="string" calcext:value-type="string">
            <text:p>GRUPO 5</text:p>
          </table:table-cell>
          <table:table-cell table:style-name="ce107" office:value-type="string" calcext:value-type="string">
            <text:p>PRÓTESE TOTAL PARA JOELHO CIMENTADA COM OU SEM PRESERVAÇÃO DO LIGAMENTO CRUZADO, <text:s text:c="2"/>POLIETILENO ULTRA CONGRUENTE, COM O CIMENTO ORTOPÉDICO PARA COLOCAÇÃO E OPÇÃO DE NAVEGAÇÃO <text:s/>Trata-se de uma protese para substituicao do joelho, com componente femural, e componente tibial, polietileno e <text:s text:c="2"/>componente patelar cimentados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9" calcext:value-type="float">
            <text:p>9</text:p>
          </table:table-cell>
          <table:table-cell table:style-name="ce104" office:value-type="float" office:value="50" calcext:value-type="float">
            <text:p>50</text:p>
          </table:table-cell>
          <table:table-cell table:style-name="ce125" office:value-type="currency" office:currency="BRL" office:value="14000" calcext:value-type="currency">
            <text:p>R$ 14.000,00</text:p>
          </table:table-cell>
          <table:table-cell table:style-name="ce127" office:value-type="string" calcext:value-type="string">
            <text:p>DMO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5">
          <table:table-cell table:style-name="ce79"/>
          <table:table-cell table:style-name="ce83" office:value-type="float" office:value="70" calcext:value-type="float">
            <text:p>70</text:p>
          </table:table-cell>
          <table:table-cell table:style-name="ce96" office:value-type="string" calcext:value-type="string">
            <text:p>BR3170914</text:p>
          </table:table-cell>
          <table:table-cell table:style-name="ce104" office:value-type="string" calcext:value-type="string">
            <text:p>370203</text:p>
          </table:table-cell>
          <table:table-cell table:style-name="ce98" office:value-type="string" calcext:value-type="string">
            <text:p>GRUPO 5</text:p>
          </table:table-cell>
          <table:table-cell table:style-name="ce107" office:value-type="string" calcext:value-type="string">
            <text:p>PRÓTESE TOTAL JOELHO PARA REVISÃO com Componente femoral revisão cimentado, em liga de aço, sete tamanhos, <text:s text:c="2"/>lados direito/esquerdo (1 a <text:s/>7), com offset anteroposterior de 4mm, Componente base tibial de revisão <text:s/>com offset, cimentado, <text:s text:c="2"/>seis tamanhos (0 - 5), Componente polietileno para revisão , tamanhos 10mm a 32mm, Porca para haste extensão femoral <text:s text:c="2"/>todos os tamanhos (neutro), Haste de extensão femoral revisão 6°, cimentada, Haste tibial com offset, cimentada, <text:s text:c="2"/>tamanhos 11 a 20mm, Cunha femoral posterior, tamanhos 5, 10 e 15 mm, Cunha femoral distal, tamanhos 5, 10 e 15mm, <text:s text:c="2"/>Cunha tibial de revisão tamanhos 5mm,10mm e 15mm, com Cimento ortopédico com antibiótico eritomicina e colistina, <text:s text:c="2"/>componente líquido 20ml (metacrilato de metilo, n.n-dimetil-para-toluidina e hidroquinona) e 20g de pó (metacrilato de metilo. <text:s text:c="2"/>Copolímero de estireno, metacrilato de polimetilo, sulfato de bário, eritromicina e sulfometato sódico de colistina) <text:s text:c="2"/>e Kit de irrigação para lavagem e opção de navegaçã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20" calcext:value-type="float">
            <text:p>20</text:p>
          </table:table-cell>
          <table:table-cell table:style-name="ce125" office:value-type="currency" office:currency="BRL" office:value="69000" calcext:value-type="currency">
            <text:p>R$ 69.000,00</text:p>
          </table:table-cell>
          <table:table-cell table:style-name="ce127" office:value-type="string" calcext:value-type="string">
            <text:p>DMO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1">
          <table:table-cell table:style-name="ce79"/>
          <table:table-cell table:style-name="ce83" office:value-type="float" office:value="71" calcext:value-type="float">
            <text:p>71</text:p>
          </table:table-cell>
          <table:table-cell table:style-name="ce96" office:value-type="string" calcext:value-type="string">
            <text:p>BR3182230</text:p>
          </table:table-cell>
          <table:table-cell table:style-name="ce104" office:value-type="string" calcext:value-type="string">
            <text:p>449744</text:p>
          </table:table-cell>
          <table:table-cell table:style-name="ce98" office:value-type="string" calcext:value-type="string">
            <text:p>GRUPO 5</text:p>
          </table:table-cell>
          <table:table-cell table:style-name="ce107" office:value-type="string" calcext:value-type="string">
            <text:p>SISTEMA DE NAVEGAÇÃO ORTOPÉDICA, COMPOSTO PO SENSOR TERMINAL PARA NAVEGADOR <text:s text:c="3"/>PARA CIRURGIAS DE RECONSTRUÇÃO LIGAMENTAR, ARTROPLASTIA DE JOELHO E QUADRIL E OSTEOTOMIA DE <text:s text:c="2"/>TÍBIA.TRATA-SE <text:s/>DE MATERIAL DESCARTAVEL, QUE E USADO <text:s/>NOS LOCAIS <text:s/>DAS <text:s/>CIRURGIAS <text:s/>QUE SAO FEITAS <text:s text:c="3"/>POR NAVEGACAO.RECEBEM INFORMACOES <text:s/>E TRSNMITEM <text:s/>DADOS <text:s/>D ANGULOS <text:s/>E MOVIEMNTOS <text:s/>ATRAVES <text:s/>DE <text:s/>RAIOS INFRAVERMELHOS." <text:s text:c="3"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56" calcext:value-type="float">
            <text:p>56</text:p>
          </table:table-cell>
          <table:table-cell table:style-name="ce125" office:value-type="currency" office:currency="BRL" office:value="600" calcext:value-type="currency">
            <text:p>R$ 600,00</text:p>
          </table:table-cell>
          <table:table-cell table:style-name="ce127" office:value-type="string" calcext:value-type="string">
            <text:p>DMO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2">
          <table:table-cell table:style-name="ce79"/>
          <table:table-cell table:style-name="ce83" office:value-type="float" office:value="72" calcext:value-type="float">
            <text:p>72</text:p>
          </table:table-cell>
          <table:table-cell table:style-name="ce96" office:value-type="string" calcext:value-type="string">
            <text:p>BR3182866</text:p>
          </table:table-cell>
          <table:table-cell table:style-name="ce104" office:value-type="float" office:value="464182" calcext:value-type="float">
            <text:p>464182</text:p>
          </table:table-cell>
          <table:table-cell table:style-name="ce98" office:value-type="string" calcext:value-type="string">
            <text:p>GRUPO 5</text:p>
          </table:table-cell>
          <table:table-cell table:style-name="ce107" office:value-type="string" calcext:value-type="string">
            <text:p>Sistema de Navegação Ortopédica, composto por sensor terminal para navegador <text:s/>para cirurgias de reconstrução ligamentar, <text:s text:c="2"/>artroplastia de joelho e quadril e osteotomia de tíbia. Trata-se <text:s/>de material descartavel, que e usado <text:s/>nos locais <text:s/>das <text:s/>cirurgias <text:s text:c="3"/>que são feitas <text:s/>por navegação. Recebem informações <text:s/>e transmitem <text:s/>dados <text:s/>de ângulos <text:s/>e moviemntos <text:s/>através <text:s/>de raios <text:s text:c="2"/>infravermelhos.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56" calcext:value-type="float">
            <text:p>56</text:p>
          </table:table-cell>
          <table:table-cell table:style-name="ce125" office:value-type="currency" office:currency="BRL" office:value="600" calcext:value-type="currency">
            <text:p>R$ 600,00</text:p>
          </table:table-cell>
          <table:table-cell table:style-name="ce127" office:value-type="string" calcext:value-type="string">
            <text:p>DMO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4">
          <table:table-cell table:style-name="ce79"/>
          <table:table-cell table:style-name="ce83" office:value-type="float" office:value="73" calcext:value-type="float">
            <text:p>73</text:p>
          </table:table-cell>
          <table:table-cell table:style-name="ce96" office:value-type="string" calcext:value-type="string">
            <text:p>BR3335669</text:p>
          </table:table-cell>
          <table:table-cell table:style-name="ce104" office:value-type="float" office:value="460989" calcext:value-type="float">
            <text:p>460989</text:p>
          </table:table-cell>
          <table:table-cell table:style-name="ce98" office:value-type="string" calcext:value-type="string">
            <text:p>GRUPO 6</text:p>
          </table:table-cell>
          <table:table-cell table:style-name="ce107" office:value-type="string" calcext:value-type="string">
            <text:p>KIT DE IRRIGAÇÃO PARA LAVAGEM PULSÁTIL COM DUAS OPÇÕES DE VELOCIDADE, <text:s/>OU DE MELHOR QUALIDADE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240" calcext:value-type="float">
            <text:p>24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7">
          <table:table-cell table:style-name="ce79"/>
          <table:table-cell table:style-name="ce83" office:value-type="float" office:value="74" calcext:value-type="float">
            <text:p>74</text:p>
          </table:table-cell>
          <table:table-cell table:style-name="ce96" office:value-type="float" office:value="190035747" calcext:value-type="float">
            <text:p>190035747</text:p>
          </table:table-cell>
          <table:table-cell table:style-name="ce104" office:value-type="float" office:value="439240" calcext:value-type="float">
            <text:p>439240</text:p>
          </table:table-cell>
          <table:table-cell table:style-name="ce98" office:value-type="string" calcext:value-type="string">
            <text:p>GRUPO 6</text:p>
          </table:table-cell>
          <table:table-cell table:style-name="ce107" office:value-type="string" calcext:value-type="string">
            <text:p>CABO TRANÇADO COM SISTEMA DE TRAVAMENTO E TENSIONAMENTO CABO TRANÇADO COM SISTEMA DE TRAVAMENTO E TENSIONAMENTO- Cabo em vittalium, aplicação p/cerclagem de fraturas peri-protéticas, tamanho 1,6mm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4" calcext:value-type="float">
            <text:p>4</text:p>
          </table:table-cell>
          <table:table-cell table:style-name="ce104" office:value-type="float" office:value="60" calcext:value-type="float">
            <text:p>6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7">
          <table:table-cell table:style-name="ce79"/>
          <table:table-cell table:style-name="ce83" office:value-type="float" office:value="75" calcext:value-type="float">
            <text:p>75</text:p>
          </table:table-cell>
          <table:table-cell table:style-name="ce96" office:value-type="string" calcext:value-type="string">
            <text:p>BR3155190</text:p>
          </table:table-cell>
          <table:table-cell table:style-name="ce104" office:value-type="string" calcext:value-type="string">
            <text:p>296939</text:p>
          </table:table-cell>
          <table:table-cell table:style-name="ce98" office:value-type="string" calcext:value-type="string">
            <text:p>GRUPO 6</text:p>
          </table:table-cell>
          <table:table-cell table:style-name="ce107" office:value-type="string" calcext:value-type="string">
            <text:p>CIMENTO CIRÚRGICO, composição pó (49g polimecrilato metila+2,5 sulfato bário), apresentação líquido ( metacrilato metila) <text:s text:c="2"/>ampola grau cirúrgico, palicação autopolimerizável, para reconstrução óssea, componente com tobramicina.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100" calcext:value-type="float">
            <text:p>10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24">
          <table:table-cell table:style-name="ce79"/>
          <table:table-cell table:style-name="ce83" office:value-type="float" office:value="76" calcext:value-type="float">
            <text:p>76</text:p>
          </table:table-cell>
          <table:table-cell table:style-name="ce96" office:value-type="string" calcext:value-type="string">
            <text:p>BR3162019</text:p>
          </table:table-cell>
          <table:table-cell table:style-name="ce104" office:value-type="string" calcext:value-type="string">
            <text:p>428675</text:p>
          </table:table-cell>
          <table:table-cell table:style-name="ce98" office:value-type="string" calcext:value-type="string">
            <text:p>GRUPO 6</text:p>
          </table:table-cell>
          <table:table-cell table:style-name="ce107" office:value-type="string" calcext:value-type="string">
            <text:p>PRÓTESE NÃO CONVENCIONAL PARA REVISÃO DE PRÓTESE TOTAL DO QUADRIL COM O CI MENTO ORTOPÉDICO <text:s text:c="2"/>COM ANTIBIÓTICO PARA COLOCAÇÃO <text:s text:c="2"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16" calcext:value-type="float">
            <text:p>16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5">
          <table:table-cell table:style-name="ce79"/>
          <table:table-cell table:style-name="ce83" office:value-type="float" office:value="77" calcext:value-type="float">
            <text:p>77</text:p>
          </table:table-cell>
          <table:table-cell table:style-name="ce96" office:value-type="string" calcext:value-type="string">
            <text:p>BR3162020</text:p>
          </table:table-cell>
          <table:table-cell table:style-name="ce104" office:value-type="string" calcext:value-type="string">
            <text:p>428675</text:p>
          </table:table-cell>
          <table:table-cell table:style-name="ce98" office:value-type="string" calcext:value-type="string">
            <text:p>GRUPO 6</text:p>
          </table:table-cell>
          <table:table-cell table:style-name="ce107" office:value-type="string" calcext:value-type="string">
            <text:p>Haste femoral não cimentada com revestimento poroso, com efeito osteocondutor de titânio puro. Offset médio de 41 a 50. <text:s text:c="2"/>Tamanhos variados, mínimo de 8, Componente acetabular não cimentado, revestimento microporoso de puro titânio, <text:s/>osteocondutor aplicado a vácuo, 50% de porosidade média, espessura da parede com possibilidade liner em polietileno <text:s text:c="2"/>com ligações cruzadas (crosslinked) de 36mm com acetábulos de 40mm a 70mm, Liner em polietileno de <text:s text:c="2"/>cadeias cruzadas (croslinked) para componente acetabular não cimentado revestimento microporoso com vitamina E, <text:s text:c="2"/>resistente ao desgaste e oxidação ou cerâmica. <text:s text:c="2"/>Simétrico 22,2mm (40/42/44), 28mm (44/46/48); 32mm (48/50/52/54/56/58/60/62/64/66/68/70), <text:s text:c="2"/>36mm (52/54/56/58/60/62/64/66/68/70), cabeça femoral em cerâmica delta, de óxido de aluminio-zircônia, <text:s text:c="2"/>de alta resistência 12/14, diâmetros 28mm à 36mm e Parafuso para componente acetabular em titânio 6,5mm de diâmetro <text:s text:c="2"/>de rosca e comprimento de 16mm a 68mm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40" calcext:value-type="float">
            <text:p>4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24">
          <table:table-cell table:style-name="ce79"/>
          <table:table-cell table:style-name="ce83" office:value-type="float" office:value="78" calcext:value-type="float">
            <text:p>78</text:p>
          </table:table-cell>
          <table:table-cell table:style-name="ce96" office:value-type="string" calcext:value-type="string">
            <text:p>BR3162026</text:p>
          </table:table-cell>
          <table:table-cell table:style-name="ce104" office:value-type="string" calcext:value-type="string">
            <text:p>435679</text:p>
          </table:table-cell>
          <table:table-cell table:style-name="ce98" office:value-type="string" calcext:value-type="string">
            <text:p>GRUPO 6</text:p>
          </table:table-cell>
          <table:table-cell table:style-name="ce107" office:value-type="string" calcext:value-type="string">
            <text:p>Sistema de reconstrução acetabular em titânio, 48 à 64, para cirurgias de grande perda óssea, incluindo parafusos.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28" calcext:value-type="float">
            <text:p>28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8">
          <table:table-cell table:style-name="ce79"/>
          <table:table-cell table:style-name="ce83" office:value-type="float" office:value="79" calcext:value-type="float">
            <text:p>79</text:p>
          </table:table-cell>
          <table:table-cell table:style-name="ce96" office:value-type="string" calcext:value-type="string">
            <text:p>BR3162027</text:p>
          </table:table-cell>
          <table:table-cell table:style-name="ce104" office:value-type="string" calcext:value-type="string">
            <text:p>286637</text:p>
          </table:table-cell>
          <table:table-cell table:style-name="ce98" office:value-type="string" calcext:value-type="string">
            <text:p>GRUPO 6</text:p>
          </table:table-cell>
          <table:table-cell table:style-name="ce111" office:value-type="string" calcext:value-type="string">
            <text:p>Sistema de reconstrução acetabular em titânio puro, utilizado como componente parcial de uma prótese coxofemoral <text:s text:c="2"/>para o tratamento do acetábulo, para casos de doenças graves na articulação do quadril que não possam ser tratadas <text:s text:c="2"/>por outras terapias conservadoras ou outros tratamentos cirúrgicos, tais como: artrose degenerativa, artrite reumatóide, <text:s text:c="2"/>fraturas das articulações, necrose da cabeça do fêmur, artroplastia da articulação coxofemoral mal sucedida na área do <text:s text:c="2"/>acetábulo, Fraturas periproteticas e subproteticas, tratamento de grandes defeitos ósseos. Diâmetros 52, 58 e 64mm, <text:s text:c="2"/>direção direita e esquerda.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28" calcext:value-type="float">
            <text:p>28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6">
          <table:table-cell table:style-name="ce79"/>
          <table:table-cell table:style-name="ce83" office:value-type="float" office:value="80" calcext:value-type="float">
            <text:p>80</text:p>
          </table:table-cell>
          <table:table-cell table:style-name="ce96" office:value-type="string" calcext:value-type="string">
            <text:p>BR3162018</text:p>
          </table:table-cell>
          <table:table-cell table:style-name="ce104" office:value-type="string" calcext:value-type="string">
            <text:p>428675</text:p>
          </table:table-cell>
          <table:table-cell table:style-name="ce98" office:value-type="string" calcext:value-type="string">
            <text:p>GRUPO 6</text:p>
          </table:table-cell>
          <table:table-cell table:style-name="ce111" office:value-type="string" calcext:value-type="string">
            <text:p>Acetábulo bipolar, cone 12/14, diametro externo de 39mm a 55mm, diâmetro interno de 22,2mm à 28mm, <text:s text:c="2"/>Haste femoral cimentada, sem colar, dupla ou triplamente cônica, tamanhos 6 a 14mm, <text:s text:c="2"/>Cabeça femoral em liga cromo-cobalto-molibdênio, cone 12/14, diâmetros de 22,2mm a 36mm, <text:s text:c="2"/>Centralizador distal de haste cimentada em polimetilmetacrilato, diâmetros 8mm a 16mm, <text:s text:c="2"/>Restritor (plug ) intramedular absorvível para haste cimentada, tamanhos 8mm a 18mm, <text:s text:c="2"/>com cimento ortopédico para colocação. <text:s text:c="3"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48" calcext:value-type="float">
            <text:p>48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25">
          <table:table-cell table:style-name="ce79"/>
          <table:table-cell table:style-name="ce83" office:value-type="float" office:value="81" calcext:value-type="float">
            <text:p>81</text:p>
          </table:table-cell>
          <table:table-cell table:style-name="ce96" office:value-type="string" calcext:value-type="string">
            <text:p>BR3157925</text:p>
          </table:table-cell>
          <table:table-cell table:style-name="ce104" office:value-type="string" calcext:value-type="string">
            <text:p>424996</text:p>
          </table:table-cell>
          <table:table-cell table:style-name="ce98" office:value-type="string" calcext:value-type="string">
            <text:p>GRUPO 6</text:p>
          </table:table-cell>
          <table:table-cell table:style-name="ce107" office:value-type="string" calcext:value-type="string">
            <text:p>Haste femoral não cimentada com revestimento poroso, com efeito osteocondutor de titânio puro. <text:s text:c="2"/>Offset médio de 41 a 50. Tamanhos variados, mínimo de 8, Componente acetabular não cimentado, <text:s text:c="2"/>revestimento microporoso de puro titânio, osteocondutor aplicado a vácuo, 50% de porosidade média, <text:s text:c="2"/>espessura da parede com possibilidade liner em polietileno com ligações cruzadas (crosslinked) de 36mm com acetábulos de <text:s text:c="2"/>40mm a 70mm, Liner em polietileno de cadeias cruzadas (croslinked) para componente acetabular não cimentado <text:s text:c="2"/>revestimento microporoso com vitamina E, resistente ao desgaste e oxidação. <text:s text:c="2"/>Simétrico 22,2mm (40/42/44), 28mm (44/46/48); 32mm (48/50/52/54/56/58/60/62/64/66/68/70), <text:s text:c="2"/>36mm (52/54/56/58/60/62/64/66/68/70), Cabeça femoral em liga cromo-cobalto-molibdênio, cone 12/14, <text:s text:c="2"/>diâmetros de 22,2mm a 36mm e Parafuso para componente acetabular em titânio 6,5mm de diâmetro de rosca e <text:s text:c="2"/>comprimento de 16mm a 68mm. <text:s text:c="3"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40" calcext:value-type="float">
            <text:p>4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2">
          <table:table-cell table:style-name="ce79"/>
          <table:table-cell table:style-name="ce83" office:value-type="float" office:value="82" calcext:value-type="float">
            <text:p>82</text:p>
          </table:table-cell>
          <table:table-cell table:style-name="ce96" office:value-type="string" calcext:value-type="string">
            <text:p>BR3157926</text:p>
          </table:table-cell>
          <table:table-cell table:style-name="ce104" office:value-type="string" calcext:value-type="string">
            <text:p>428675</text:p>
          </table:table-cell>
          <table:table-cell table:style-name="ce98" office:value-type="string" calcext:value-type="string">
            <text:p>GRUPO 6</text:p>
          </table:table-cell>
          <table:table-cell table:style-name="ce107" office:value-type="string" calcext:value-type="string">
            <text:p>Acetábulo cimentado, Haste femoral cimentada, sem colar, dupla ou triplamente cônica, tamanhos 6 a 14mm, <text:s text:c="2"/>Centralizador distal de haste cimentada em polimetilmetacrilato, diâmetros 8mm a 16mm, Restritor (plug ) <text:s text:c="2"/>intramedular absorvível para haste cimentada, tamanhos 8mm a 18mm, Cabeça femoral em liga cromo-cobalto-molibdênio, <text:s text:c="2"/>cone 12/14, diâmetros de 22,2mm a 36mm, com cimento ortopédico para colocaçã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200" calcext:value-type="float">
            <text:p>20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24">
          <table:table-cell table:style-name="ce79"/>
          <table:table-cell table:style-name="ce83" office:value-type="float" office:value="83" calcext:value-type="float">
            <text:p>83</text:p>
          </table:table-cell>
          <table:table-cell table:style-name="ce96" office:value-type="string" calcext:value-type="string">
            <text:p>BR3170912</text:p>
          </table:table-cell>
          <table:table-cell table:style-name="ce104" office:value-type="string" calcext:value-type="string">
            <text:p>413357</text:p>
          </table:table-cell>
          <table:table-cell table:style-name="ce98" office:value-type="string" calcext:value-type="string">
            <text:p>GRUPO 6</text:p>
          </table:table-cell>
          <table:table-cell table:style-name="ce107" office:value-type="string" calcext:value-type="string">
            <text:p>SISTEMA DE CIMENTAÇÃO ÓSSEA, INCLUINDO TUBOS PLÁSTICOS E PONTAS CANULADAS, APLICAÇÃO: <text:s text:c="3"/>PREPARAÇÃO CIMENTO ÓSSEO PARA ARTROPLASTIA <text:s text:c="3"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45" calcext:value-type="float">
            <text:p>45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6">
          <table:table-cell table:style-name="ce79"/>
          <table:table-cell table:style-name="ce83" office:value-type="float" office:value="84" calcext:value-type="float">
            <text:p>84</text:p>
          </table:table-cell>
          <table:table-cell table:style-name="ce96" office:value-type="string" calcext:value-type="string">
            <text:p>BR3170916</text:p>
          </table:table-cell>
          <table:table-cell table:style-name="ce104" office:value-type="string" calcext:value-type="string">
            <text:p>425022</text:p>
          </table:table-cell>
          <table:table-cell table:style-name="ce98" office:value-type="string" calcext:value-type="string">
            <text:p>GRUPO 6</text:p>
          </table:table-cell>
          <table:table-cell table:style-name="ce107" office:value-type="string" calcext:value-type="string">
            <text:p>Acetábulo bipolar, cone 12/14, diametro externo de 39mm a 55mm, diâmetro interno de 22,2mm à 28mm, Haste femoral <text:s text:c="2"/>cimentada polida, sem colar, dupla ou triplamente cônica, tamanhos 8 a 16mm, Centralizador distal de haste cimentada <text:s text:c="2"/>polida em polimetilmetacrilato, diâmetros 8mm a 16mm, Restritor (plug ) intramedular absorvível para haste cimentada polida, <text:s text:c="2"/>tamanhos 8mm a 18mm, Cabeça femoral em liga cromo-cobalto-molibdênio, cone 12/14, diâmetros de 22,2mm a 36mm, <text:s text:c="2"/>com cimento ortopédico para colocaçã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20" calcext:value-type="float">
            <text:p>2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26">
          <table:table-cell table:style-name="ce79"/>
          <table:table-cell table:style-name="ce83" office:value-type="float" office:value="85" calcext:value-type="float">
            <text:p>85</text:p>
          </table:table-cell>
          <table:table-cell table:style-name="ce96" office:value-type="string" calcext:value-type="string">
            <text:p>BR3170978</text:p>
          </table:table-cell>
          <table:table-cell table:style-name="ce104" office:value-type="string" calcext:value-type="string">
            <text:p>20788</text:p>
          </table:table-cell>
          <table:table-cell table:style-name="ce98" office:value-type="string" calcext:value-type="string">
            <text:p>GRUPO 6</text:p>
          </table:table-cell>
          <table:table-cell table:style-name="ce107" office:value-type="string" calcext:value-type="string">
            <text:p>Haste modular em <text:s/>titânio para revisão de quadril, revestimento proximal poroso, osteocondutor de titânio puro. <text:s text:c="2"/>Estabilidade rotacional. Opções de bloqueio distal com guia. Montagem intra ou extraóssea dos componentes do implante. <text:s text:c="2"/>Haste reta diâmetros 12 a 24 nos tamanhos 200 a 320mm. Haste curva diâmetros 12 a 24 nos tamanhos 240mm a 400mm, <text:s text:c="2"/>Componente proximal nos tamanhos de 17, 19 <text:s/>e 21mm, profunidade de 0, +10, e +20mm, Componente acetabular não <text:s text:c="2"/>cimentado, até 7 furos para fixação com parafuros e revestimento microporoso de puro titânio, osteocondutor aplicado a vácuo, <text:s text:c="2"/>50% de porosidade média, espessura da parede com possibilidade liner em polietileno com <text:s text:c="2"/>ligações cruzadas (crosslinked) de 36mm com acetábulos de 40mm a 70mm, Liner em polietileno <text:s text:c="2"/>de cadeias cruzadas (croslinked) para componente acetabular não cimentado revestimento microporoso com vitamina E, <text:s text:c="2"/>resistente ao desgaste e oxidação. Simétrico 22,2mm (40/42/44), 28mm (44/46/48); 32mm (48/50/52/54/56/58/60/62/64/66/68/70), <text:s text:c="2"/>36mm (52/54/56/58/60/62/64/66/68/70), cabeça femoral em cerâmica delta, de óxido de aluminio-zircônia, <text:s text:c="2"/>de alta resistência 12/14, diâmetros 28mm à 36mm e Parafuso para componente acetabular em titânio 6,5mm de diâmetro <text:s text:c="2"/>de rosca e comprimento de 16mm a 68mm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18" calcext:value-type="float">
            <text:p>18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5">
          <table:table-cell table:style-name="ce79"/>
          <table:table-cell table:style-name="ce83" office:value-type="float" office:value="86" calcext:value-type="float">
            <text:p>86</text:p>
          </table:table-cell>
          <table:table-cell table:style-name="ce96" office:value-type="string" calcext:value-type="string">
            <text:p>BR3170980</text:p>
          </table:table-cell>
          <table:table-cell table:style-name="ce104" office:value-type="string" calcext:value-type="string">
            <text:p>20788</text:p>
          </table:table-cell>
          <table:table-cell table:style-name="ce98" office:value-type="string" calcext:value-type="string">
            <text:p>GRUPO 6</text:p>
          </table:table-cell>
          <table:table-cell table:style-name="ce107" office:value-type="string" calcext:value-type="string">
            <text:p>Haste femoral cimentada polida, sem colar, dupla ou triplamente cônica, tamanhos 8 a 16mm, Centralizador distal de haste <text:s text:c="2"/>cimentada polida em polimetilmetacrilato, diâmetros 8mm a 16mm, Restritor (plug ) intramedular absorvível para haste cimentada <text:s text:c="2"/>polida, tamanhos 8mm a 18mm, Componente acetabular não cimentado, revestimento microporoso de puro titânio, <text:s text:c="2"/>osteocondutor aplicado a vácuo, 50% de porosidade média, espessura da parede com possibilidade liner em polietileno <text:s text:c="2"/>com ligações cruzadas (crosslinked) de 36mm com acetábulos de 40mm a 70mm, Liner em polietileno de cadeias cruzadas <text:s text:c="2"/>(croslinked) para componente acetabular não cimentado revestimento microporoso com vitamina E, <text:s text:c="2"/>resistente ao desgaste e oxidação. Simétrico 22,2mm (40/42/44), 28mm (44/46/48); <text:s text:c="2"/>32mm (48/50/52/54/56/58/60/62/64/66/68/70), 36mm (52/54/56/58/60/62/64/66/68/70), <text:s text:c="3"/>Cabeça femoral em liga cromo-cobalto-molibdênio, cone 12/14, diâmetros de 22,2mm a 36mm <text:s text:c="2"/>e Parafuso para componente acetabular em titânio 6,5mm de diâmetro de rosca e comprimento de 16mm a 68mm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40" calcext:value-type="float">
            <text:p>4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24">
          <table:table-cell table:style-name="ce79"/>
          <table:table-cell table:style-name="ce83" office:value-type="float" office:value="87" calcext:value-type="float">
            <text:p>87</text:p>
          </table:table-cell>
          <table:table-cell table:style-name="ce96" office:value-type="float" office:value="190034302" calcext:value-type="float">
            <text:p>190034302</text:p>
          </table:table-cell>
          <table:table-cell table:style-name="ce104" office:value-type="float" office:value="437349" calcext:value-type="float">
            <text:p>437349</text:p>
          </table:table-cell>
          <table:table-cell table:style-name="ce98" office:value-type="string" calcext:value-type="string">
            <text:p>GRUPO 6</text:p>
          </table:table-cell>
          <table:table-cell table:style-name="ce107" office:value-type="string" calcext:value-type="string">
            <text:p>ANILHA PARA CABOS <text:s/>- Braçadeira, material vittalium, tamanho mini, aplicação p/uso <text:s text:c="2"/>de cabos posição vertical em fixação, características adicionais de fraturas peri-protéticas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4" calcext:value-type="float">
            <text:p>4</text:p>
          </table:table-cell>
          <table:table-cell table:style-name="ce104" office:value-type="float" office:value="60" calcext:value-type="float">
            <text:p>6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1">
          <table:table-cell table:style-name="ce79"/>
          <table:table-cell table:style-name="ce83" office:value-type="float" office:value="88" calcext:value-type="float">
            <text:p>88</text:p>
          </table:table-cell>
          <table:table-cell table:style-name="ce96" office:value-type="float" office:value="190050923" calcext:value-type="float">
            <text:p>190050923</text:p>
          </table:table-cell>
          <table:table-cell table:style-name="ce104" office:value-type="string" calcext:value-type="string">
            <text:p>396061</text:p>
          </table:table-cell>
          <table:table-cell table:style-name="ce98" office:value-type="string" calcext:value-type="string">
            <text:p>GRUPO 6</text:p>
          </table:table-cell>
          <table:table-cell table:style-name="ce107" office:value-type="string" calcext:value-type="string">
            <text:p><text:s/>CIMENTO ORTOPEDICO RADIOPACO, POLIMERIZAVEL, A BASE DE COMPOSTOS ACRILICOS CONSTITUIDO <text:s text:c="2"/>POR UM COMPONENTE LÍQUIDO DE MONOMERO METIL MATACRILATO (METIL MATACRILATO-MMA) E UM <text:s text:c="2"/>COMPONENTE EM PÓ DE POLIMERO DE METIL METACRILATO (POLI METIL MATACRILATO-PMMA) E SULFATO <text:s text:c="2"/>DE BARIO (BaSO4), COMPONESTES ATIVOS ATIVOS DE POLIMERIZACAO. UNICA EMBALAGEM, ESTERIL, <text:s text:c="2"/>NÃO RE-ESTERILIZAVEL E DE USO UNICO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100" calcext:value-type="float">
            <text:p>10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24">
          <table:table-cell table:style-name="ce79"/>
          <table:table-cell table:style-name="ce83" office:value-type="float" office:value="89" calcext:value-type="float">
            <text:p>89</text:p>
          </table:table-cell>
          <table:table-cell table:style-name="ce96" office:value-type="float" office:value="996637857" calcext:value-type="float">
            <text:p>996637857</text:p>
          </table:table-cell>
          <table:table-cell table:style-name="ce104" office:value-type="float" office:value="435679" calcext:value-type="float">
            <text:p>435679</text:p>
          </table:table-cell>
          <table:table-cell table:style-name="ce98" office:value-type="string" calcext:value-type="string">
            <text:p>GRUPO 6</text:p>
          </table:table-cell>
          <table:table-cell table:style-name="ce107" office:value-type="string" calcext:value-type="string">
            <text:p>PLACA PARA CABO COM 9 FUROS Trata-se <text:s/>dea material, para uso <text:s/>em cirurgias <text:s/>de artroscopias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16" calcext:value-type="float">
            <text:p>16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24">
          <table:table-cell table:style-name="ce79"/>
          <table:table-cell table:style-name="ce83" office:value-type="float" office:value="90" calcext:value-type="float">
            <text:p>90</text:p>
          </table:table-cell>
          <table:table-cell table:style-name="ce96" office:value-type="float" office:value="14592676" calcext:value-type="float">
            <text:p>14592676</text:p>
          </table:table-cell>
          <table:table-cell table:style-name="ce104" office:value-type="float" office:value="433978" calcext:value-type="float">
            <text:p>433978</text:p>
          </table:table-cell>
          <table:table-cell table:style-name="ce98" office:value-type="string" calcext:value-type="string">
            <text:p>GRUPO 6</text:p>
          </table:table-cell>
          <table:table-cell table:style-name="ce107" office:value-type="string" calcext:value-type="string">
            <text:p>PLACA PARA CABO COM 11 FUROS Trata-se <text:s/>dea material, para uso <text:s/>em cirurgias <text:s/>de artroscopias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16" calcext:value-type="float">
            <text:p>16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3">
          <table:table-cell table:style-name="ce79"/>
          <table:table-cell table:style-name="ce83" office:value-type="float" office:value="91" calcext:value-type="float">
            <text:p>91</text:p>
          </table:table-cell>
          <table:table-cell table:style-name="ce96" office:value-type="float" office:value="145692919" calcext:value-type="float">
            <text:p>145692919</text:p>
          </table:table-cell>
          <table:table-cell table:style-name="ce104" office:value-type="float" office:value="428675" calcext:value-type="float">
            <text:p>428675</text:p>
          </table:table-cell>
          <table:table-cell table:style-name="ce98" office:value-type="string" calcext:value-type="string">
            <text:p>GRUPO 7</text:p>
          </table:table-cell>
          <table:table-cell table:style-name="ce107" office:value-type="string" calcext:value-type="string">
            <text:p>KIT CONTENDO HASTE UMERAL UNIVERSAL EM TITÂNIO INTERCAMBIÁVEL POROSO PARA FIXAÇÃO BIOLOGICA <text:s text:c="3"/>OU CIMENTADA NOS DIÃMETROS DE 7, 8, 9, 10, 11, 12, 13 E 14MM, <text:s/>E COM 3 OPÇÕES DE COMPRIMENTO, <text:s text:c="2"/>COMPATÍVEL PARA <text:s/>HEMIATROPLASTIA, ARTROPLATIA TOTAL CIMENTADA E ARTROPLASTIA REVERSA DO <text:s text:c="2"/>OMBRO, CABEÇA <text:s/>UMERAL CENTRICA E EXCÊNTRICA COM COLO, PARA ARTROPLASTIA ANATOMICA DE OMBRO <text:s text:c="2"/>COM DIÂMETRO DE 44 A 50 MM <text:s/>E ALTURA DE 16 A 21 MM COMPATÍVEL COM HASTE UMERAL UNIVERSAL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16" calcext:value-type="float">
            <text:p>16</text:p>
          </table:table-cell>
          <table:table-cell table:style-name="ce125" office:value-type="currency" office:currency="BRL" office:value="11160" calcext:value-type="currency">
            <text:p>R$ 11.160,00</text:p>
          </table:table-cell>
          <table:table-cell table:style-name="ce127" office:value-type="string" calcext:value-type="string">
            <text:p>ATLAS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7">
          <table:table-cell table:style-name="ce79"/>
          <table:table-cell table:style-name="ce83" office:value-type="float" office:value="92" calcext:value-type="float">
            <text:p>92</text:p>
          </table:table-cell>
          <table:table-cell table:style-name="ce96" office:value-type="float" office:value="145692932" calcext:value-type="float">
            <text:p>145692932</text:p>
          </table:table-cell>
          <table:table-cell table:style-name="ce104" office:value-type="float" office:value="428675" calcext:value-type="float">
            <text:p>428675</text:p>
          </table:table-cell>
          <table:table-cell table:style-name="ce98" office:value-type="string" calcext:value-type="string">
            <text:p>GRUPO 7</text:p>
          </table:table-cell>
          <table:table-cell table:style-name="ce107" office:value-type="string" calcext:value-type="string">
            <text:p>KIT CONTENDO HASTE UMERAL UNIVERSAL EM TITÂNIO INTERCAMBIÁVEL POROSO PARA FIXAÇÃO BIOLOGICA <text:s text:c="2"/>OU CIMENTADA NOS DIÃMETROS DE 7, 8, 9, 10, 11, 12, 13 E 14MM, <text:s/>E COM 3 OPÇÕES DE COMPRIMENTO, <text:s text:c="2"/>COMPATÍVEL PARA <text:s/>HEMIATROPLASTIA, ARTROPLATIA TOTAL CIMENTADA E ARTROPLASTIA REVERSA DO <text:s text:c="2"/>OMBRO, CABEÇA <text:s/>UMERAL EXCÊNTRICA COM COLO, PARA ARTROPLASTIA ANATOMICA DE OMBRO COM <text:s text:c="2"/>DIÂMETRO DE 44 A 50 MM <text:s/>E ALTURA DE 16 A 21 MM, CABEÇA UMERAL CÊNTRICA COM COLO, <text:s text:c="2"/>PARA ARTROPLASTIA ANATOMICA DIÂMETRO <text:s/>DE 40 A 54MM E ALTURA DE 15 A 21 MM COMPATÍVEL COM HASTE <text:s text:c="2"/>UMERAL UNIVERSAL, GLENE CIMENTADA <text:s/>EM POLIETILENO DE ALTA DENSIDADE COM PELO MENOS 3 PILARES <text:s text:c="2"/>DE ANCORAGEM E NO MINIMO 3 OPÇÕES DE TAMANHO, COMPATÍVEL COM CABEÇA UMERAL CÊNTRICA E <text:s text:c="2"/>EXCÊNTRICA COM COLO E CIMENTO OSSEO COM VISCOSIDADE PADRÃ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30" calcext:value-type="float">
            <text:p>30</text:p>
          </table:table-cell>
          <table:table-cell table:style-name="ce125" office:value-type="currency" office:currency="BRL" office:value="16000" calcext:value-type="currency">
            <text:p>R$ 16.000,00</text:p>
          </table:table-cell>
          <table:table-cell table:style-name="ce127" office:value-type="string" calcext:value-type="string">
            <text:p>ATLAS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8">
          <table:table-cell table:style-name="ce79"/>
          <table:table-cell table:style-name="ce83" office:value-type="float" office:value="93" calcext:value-type="float">
            <text:p>93</text:p>
          </table:table-cell>
          <table:table-cell table:style-name="ce96" office:value-type="float" office:value="145692936" calcext:value-type="float">
            <text:p>145692936</text:p>
          </table:table-cell>
          <table:table-cell table:style-name="ce104" office:value-type="float" office:value="428675" calcext:value-type="float">
            <text:p>428675</text:p>
          </table:table-cell>
          <table:table-cell table:style-name="ce98" office:value-type="string" calcext:value-type="string">
            <text:p>GRUPO 7</text:p>
          </table:table-cell>
          <table:table-cell table:style-name="ce107" office:value-type="string" calcext:value-type="string">
            <text:p>KIT CONTENDO HASTE UMERAL UNIVERSAL EM TITÂNIO, INTERCAMBIÁVEL CIMENTADA E NÃO CIMENTADA <text:s text:c="3"/>DIÂMENTRO DE 7, 8, 9, 10, 11, 12, 13 E 14MM, <text:s/>E COM 3 OPÇÕES DE COMPRIMENTO, COMPATÍVEL PARA <text:s text:c="2"/>HEMIARTROPLASTIA, ARTROPLASTIA <text:s/>TOTAL CIMENTADA E NÃO CIMENTADA E ARTROPLASTIA REVERSA <text:s text:c="2"/>DO OMBRO, INSERT UMERAL EM <text:s/>POLIETILENO DE ALTA DENSIDADE COM CAVIDADE PARA EVITAR IMPACTO, <text:s text:c="2"/>COM PELO MENOS 3 OPÇÕES DE TAMANHO, BANDEJA UMERAL COM PELO MENOS 3 OPÇÕES DE ALTURA, <text:s text:c="2"/>COMPATÍVEL COM GLENOSFERA CENTRICA E EXCENTRICA, COM PELO MENOS DUAS OPÇÕES DE TAMANHO, <text:s text:c="2"/>BASE DE GLENE (METAL BACK) EM TITÂNIO POROSO COM FIXAÇÃO COM AO MENOS 4 PARAFUSOS COM E <text:s text:c="2"/>SEM BLOQUEIO, PARA ARTROPLASTIA REVERSA E ANATÔMICA DE OMBR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50" calcext:value-type="float">
            <text:p>50</text:p>
          </table:table-cell>
          <table:table-cell table:style-name="ce125" office:value-type="currency" office:currency="BRL" office:value="30880" calcext:value-type="currency">
            <text:p>R$ 30.880,00</text:p>
          </table:table-cell>
          <table:table-cell table:style-name="ce127" office:value-type="string" calcext:value-type="string">
            <text:p>ATLAS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9">
          <table:table-cell table:style-name="ce79"/>
          <table:table-cell table:style-name="ce83" office:value-type="float" office:value="94" calcext:value-type="float">
            <text:p>94</text:p>
          </table:table-cell>
          <table:table-cell table:style-name="ce96" office:value-type="string" calcext:value-type="string">
            <text:p>BR3335656</text:p>
          </table:table-cell>
          <table:table-cell table:style-name="ce104" office:value-type="float" office:value="320151" calcext:value-type="float">
            <text:p>320151</text:p>
          </table:table-cell>
          <table:table-cell table:style-name="ce98" office:value-type="string" calcext:value-type="string">
            <text:p>GRUPO 8</text:p>
          </table:table-cell>
          <table:table-cell table:style-name="ce107" office:value-type="string" calcext:value-type="string">
            <text:p>ITEM 94 – SISTEMA DE HASTE UMERAL EM TITÂNIO MULTIBLOQUEIO CANULADA, PARAFUSOS BLOQUEADOS <text:s/>3,5 DE CALÇAR QUE BLOQUEIAM NO PARAFUSO 4.5 , CORTICAL 4,0 E 4,5 COM FUROS POSSIBILADE <text:s/>DE AMARRIA DA PEQUENA E GRANDE TUBEROSIDADE, CANULADA, PARA FRATURAS PROXIMAIS, <text:s/>DIAFISÁRIAS E OUI ASSOCIADAS, COM SISTEMA DE DINAMIZAÇÃO DE ATÉ 7 CM INTRA-OPERATÓRIO. <text:s/>TAMANHOS DE 7, 8,5 E 9,5MM DE DIÂMETRO E COMPRIMENTO DE 160MM A 315MM, FIXAÇÃO E <text:s/>ESTABILIZAÇÃO, PARAFUSO DE FECHAMENTO DE 0, 2 , 5, 10 E 15MM, PARAFUSOS BLOQUEIO 3,5 / 4,0 / <text:s/>4,5MM COM INSTRUMENTAL, BROCAS , FIOS GUIAS PARA COLOCAÇÃO DE SISTEMA DE FRESAGEM OU <text:s/>DE MELHOR QUALIDADE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24" calcext:value-type="float">
            <text:p>24</text:p>
          </table:table-cell>
          <table:table-cell table:style-name="ce125" office:value-type="currency" office:currency="BRL" office:value="16700" calcext:value-type="currency">
            <text:p>R$ 16.7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3">
          <table:table-cell table:style-name="ce79"/>
          <table:table-cell table:style-name="ce83" office:value-type="float" office:value="95" calcext:value-type="float">
            <text:p>95</text:p>
          </table:table-cell>
          <table:table-cell table:style-name="ce96" office:value-type="string" calcext:value-type="string">
            <text:p>BR3335668</text:p>
          </table:table-cell>
          <table:table-cell table:style-name="ce104" office:value-type="float" office:value="290811" calcext:value-type="float">
            <text:p>290811</text:p>
          </table:table-cell>
          <table:table-cell table:style-name="ce98" office:value-type="string" calcext:value-type="string">
            <text:p>GRUPO 8</text:p>
          </table:table-cell>
          <table:table-cell table:style-name="ce107" office:value-type="string" calcext:value-type="string">
            <text:p>SISTEMA DE HASTE HUMERAL EM TITANIO CANULADA, PARA FRATURAS PROXIMAIS, <text:s/>DIAFISARIAS E OU ASSOCIADAS, COM SISTEMA DE DINAMIZAÇÃO. TAMANHO DE <text:s text:c="2"/>7, 9 E 11MM DE DIAMETRO, COMPRIMENTO DE 190 MM E 320 MM, POSSIBILIDADE DE <text:s/>FIXAÇÃO E ESTABILIZAÇÃO ATRAVES DE LAMINA ESPIRAL TAMANHO DE 34MM A <text:s/>54MM, PARAFUSO DE FECHAMENTO DE 0MM A 15MM, PARAFUSOS DE BLOQUEIO 4,0MM <text:s/>COM INSTRUMENTAL PARA COLOCAÇÃO.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24" calcext:value-type="float">
            <text:p>24</text:p>
          </table:table-cell>
          <table:table-cell table:style-name="ce125" office:value-type="currency" office:currency="BRL" office:value="11000" calcext:value-type="currency">
            <text:p>R$ 11.0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30">
          <table:table-cell table:style-name="ce79"/>
          <table:table-cell table:style-name="ce83" office:value-type="float" office:value="96" calcext:value-type="float">
            <text:p>96</text:p>
          </table:table-cell>
          <table:table-cell table:style-name="ce96" office:value-type="float" office:value="190050418" calcext:value-type="float">
            <text:p>190050418</text:p>
          </table:table-cell>
          <table:table-cell table:style-name="ce104" office:value-type="float" office:value="314755" calcext:value-type="float">
            <text:p>314755</text:p>
          </table:table-cell>
          <table:table-cell table:style-name="ce98" office:value-type="string" calcext:value-type="string">
            <text:p>GRUPO 8</text:p>
          </table:table-cell>
          <table:table-cell table:style-name="ce107" office:value-type="string" calcext:value-type="string">
            <text:p>HASTE FEMURAL TIPO TFN LONGA EM TITÂNIO COM DIÂMETRO PROXIMAL 235MM, ANGULAÇÃO ANATÔMICA DE <text:s text:c="2"/>6 GRAUS, DIÂMETRO DISTAL DE 10/11 E 12MM, LÂMINA ESPIRA 80 A 120MM COM POSSIBILIDADE DE <text:s text:c="2"/>ENXERTIA OSSEA , PARAFUSO TAMPÃO 0 A 10MM, PARAFUSO DE BLOQUEIO 5.0MM COM <text:s text:c="2"/>TAMANHO DE 26MM A 100MM, MECANISMOS PRE-MONTADO COM BLOQUEIO ANTIROTATORIO DA <text:s text:c="2"/>MÂMINA ESPIRAL INTER OPERATORIO, BLOQUEIO ESTÁTICO E DESENHO ANATOMICO PARA ESQUERDO E <text:s text:c="2"/>DIREITO - CAIXA CONTENDO INSTRUMENTAIS PARA COLOCAÇÃO DA HASTE TFN CURTO E LONGO , <text:s text:c="2"/>MEDIDOR DE CANAL E DA HASTE, GUIAS DE BROCAS, PROTETORES DE PAREDES MOLES, MANDRIL EM T, <text:s text:c="2"/>BROCA CANULADA CALIBRADA, CHAVE <text:s/>STARDRIVE, MARTELO DESLIZANTE, GUIA DE INTRODUÇÃO DA HASTE <text:s text:c="2"/>COM BRAÇO DIRECIONAL DE 125, 130 E 135, FRESA CANULADA, IMAPACTOR PARA LAMINA ESPIRAL E SISTEMA <text:s text:c="2"/>DE COMPRESSÃO INTERFRAGMENTARIA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100" calcext:value-type="float">
            <text:p>100</text:p>
          </table:table-cell>
          <table:table-cell table:style-name="ce125" office:value-type="currency" office:currency="BRL" office:value="17500" calcext:value-type="currency">
            <text:p>R$ 17.5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31">
          <table:table-cell table:style-name="ce79"/>
          <table:table-cell table:style-name="ce83" office:value-type="float" office:value="97" calcext:value-type="float">
            <text:p>97</text:p>
          </table:table-cell>
          <table:table-cell table:style-name="ce96" office:value-type="float" office:value="190050480" calcext:value-type="float">
            <text:p>190050480</text:p>
          </table:table-cell>
          <table:table-cell table:style-name="ce104" office:value-type="float" office:value="438050" calcext:value-type="float">
            <text:p>438050</text:p>
          </table:table-cell>
          <table:table-cell table:style-name="ce98" office:value-type="string" calcext:value-type="string">
            <text:p>GRUPO 8</text:p>
          </table:table-cell>
          <table:table-cell table:style-name="ce107" office:value-type="string" calcext:value-type="string">
            <text:p>HASTE INTRAMEDULAR LFN LONGA 9/10/11 E 12MM, COMPRIMIDO DE 300 A 480MM, PARAFUSO DE BLOQUEIO <text:s text:c="2"/>5.0 E 6.0, PARAFUSO 6.5MM RECONSTRUÇÃO DE COLO FEMURAL E PARAFUSO TAMPÃO DE 0 A 20MM. HASTE <text:s text:c="2"/>COM ENTRADA EXCLUSIVA LATERAL DE 10 GRAUS.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40" calcext:value-type="float">
            <text:p>40</text:p>
          </table:table-cell>
          <table:table-cell table:style-name="ce125" office:value-type="currency" office:currency="BRL" office:value="13500" calcext:value-type="currency">
            <text:p>R$ 13.5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8">
          <table:table-cell table:style-name="ce79"/>
          <table:table-cell table:style-name="ce83" office:value-type="float" office:value="98" calcext:value-type="float">
            <text:p>98</text:p>
          </table:table-cell>
          <table:table-cell table:style-name="ce96" office:value-type="float" office:value="190050506" calcext:value-type="float">
            <text:p>190050506</text:p>
          </table:table-cell>
          <table:table-cell table:style-name="ce104" office:value-type="float" office:value="438050" calcext:value-type="float">
            <text:p>438050</text:p>
          </table:table-cell>
          <table:table-cell table:style-name="ce98" office:value-type="string" calcext:value-type="string">
            <text:p>GRUPO 8</text:p>
          </table:table-cell>
          <table:table-cell table:style-name="ce107" office:value-type="string" calcext:value-type="string">
            <text:p>HASTE INTRAMEDULAR PARA ARTRODESE DA PARTE POSTERIOR DO PE, EM TITÂNIO COM TAMANHO <text:s text:c="2"/>DE 10-11-12MM DE EXPESSURA E 150-180 E 240MM DE COMPRIMENTO, PARAFUSOS DE BLOQUEIO 5.0 E 6.0 <text:s text:c="2"/>TAMANHOS DE 26 A 100MM ADIADIONADA LAMINA SPIRAL COM TAMANHOS DE 45 A 100MM E PARAFUSO DE <text:s text:c="2"/>TAMPONAMENTO. CAIXA CONTENDO INSTRUMENTAIS PARA COLOCAÇÃO DA HASTE CONTENDO GUIA DA HASTE, <text:s text:c="2"/>GUIAS DE BROCAS, CHAVE STARDRIVE, RÉGUA MEDIDOR DE HASTE, BROCA DIAMANTADA, GUIA DE INSERÇÃO <text:s text:c="2"/>PARA TODOS OS BLOQUEIOS, BROCA CALIBRADA, GUIA DE INSERÇÃO LAMINA ESPIRAL, MARTELO DESLIZANTE E <text:s text:c="2"/>DRILL EM T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table:style-name="ce125" office:value-type="currency" office:currency="BRL" office:value="18000" calcext:value-type="currency">
            <text:p>R$ 18.0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7">
          <table:table-cell table:style-name="ce79"/>
          <table:table-cell table:style-name="ce83" office:value-type="float" office:value="99" calcext:value-type="float">
            <text:p>99</text:p>
          </table:table-cell>
          <table:table-cell table:style-name="ce96" office:value-type="string" calcext:value-type="string">
            <text:p>BR3309588</text:p>
          </table:table-cell>
          <table:table-cell table:style-name="ce104" office:value-type="float" office:value="314755" calcext:value-type="float">
            <text:p>314755</text:p>
          </table:table-cell>
          <table:table-cell table:style-name="ce98" office:value-type="string" calcext:value-type="string">
            <text:p>GRUPO 8</text:p>
          </table:table-cell>
          <table:table-cell table:style-name="ce107" office:value-type="string" calcext:value-type="string">
            <text:p>SISTEMA DE HASTE FLEXIVEL EM TITANIO, COM FIXAÇÃO INTRA MEDULAR, TAMANHO 1.5, 2.0, 2.5, 3.0, 3.5 E 4.0. <text:s text:c="2"/>ACOMPANHA TODO OS INSTRUMENTOS DE INSERÇÃO, EXTRAÇÃO, IMPACTAÇÃO E CORTE DA HASTE, <text:s text:c="2"/>NÃO MAGNETIC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50" calcext:value-type="float">
            <text:p>50</text:p>
          </table:table-cell>
          <table:table-cell table:style-name="ce125" office:value-type="currency" office:currency="BRL" office:value="1800" calcext:value-type="currency">
            <text:p>R$ 1.8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3">
          <table:table-cell table:style-name="ce79"/>
          <table:table-cell table:style-name="ce83" office:value-type="float" office:value="100" calcext:value-type="float">
            <text:p>100</text:p>
          </table:table-cell>
          <table:table-cell table:style-name="ce96" office:value-type="string" calcext:value-type="string">
            <text:p>BR3309592</text:p>
          </table:table-cell>
          <table:table-cell table:style-name="ce104" office:value-type="float" office:value="290806" calcext:value-type="float">
            <text:p>290806</text:p>
          </table:table-cell>
          <table:table-cell table:style-name="ce98" office:value-type="string" calcext:value-type="string">
            <text:p>GRUPO 8</text:p>
          </table:table-cell>
          <table:table-cell table:style-name="ce107" office:value-type="string" calcext:value-type="string">
            <text:p>SISTEMA DE HASTE FEMURAL EM TITANIO, OPÇÃISTAL E DIAFISARIA DO FEMUR, OPÇÕES DE BLOQUEIO <text:s/>PARAFUSOS <text:s/>26 MM A 120 MM E LAMINA ESPIRAL 45 MM A 100 MM. HASTES EXPESSURAS 9 MM A 15 MM <text:s text:c="2"/>ESPESSURA E 160 MM A 480 MM, PARAFUSO DE FECHAMENTO 0 MM A 20 MM, ACOMPANHADOS DE <text:s text:c="2"/>INTRUMENTAIS COM BROCAS CALIBRADAS, SISTEMA DE DINAMIZAÇÃO INTRA OPERATORIA E GUIAS <text:s text:c="2"/>RADIOTRANSPARENTES, BROCAS CALIBRADAS E FIOS GUIAS PARA INSERÇÃ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20" calcext:value-type="float">
            <text:p>20</text:p>
          </table:table-cell>
          <table:table-cell table:style-name="ce125" office:value-type="currency" office:currency="BRL" office:value="13500" calcext:value-type="currency">
            <text:p>R$ 13.5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7">
          <table:table-cell table:style-name="ce79"/>
          <table:table-cell table:style-name="ce83" office:value-type="float" office:value="101" calcext:value-type="float">
            <text:p>101</text:p>
          </table:table-cell>
          <table:table-cell table:style-name="ce96" office:value-type="string" calcext:value-type="string">
            <text:p>BR3170975</text:p>
          </table:table-cell>
          <table:table-cell table:style-name="ce104" office:value-type="string" calcext:value-type="string">
            <text:p>52108</text:p>
          </table:table-cell>
          <table:table-cell table:style-name="ce98" office:value-type="string" calcext:value-type="string">
            <text:p>GRUPO 8</text:p>
          </table:table-cell>
          <table:table-cell table:style-name="ce107" office:value-type="string" calcext:value-type="string">
            <text:p>HASTE FEMURAL TIPO TFN CURTO E MINI HASTE EM TITÂNIO COM, ANGULAÇÃO ANATÔMICA DE 6 GRAUS, <text:s text:c="2"/>DIÂMETRO DISTAL DE 10/11 E 12MM, COLOCACAO DE LÂMINA ESPIRAL COM POSSIBILIDADE DE ENXERTIA <text:s/>OSSEA DE <text:s/>80 A 120MM, PARAFUSO TAMPÃO 0 A 10MM, PARAFUSO DE BLOQUEIO 5.0MM COM TAMANHO DE <text:s text:c="2"/>26MM A 100MM, MECANISMOS PRE-MONTADO COM BLOQUEIO ANTIROTATORIO DA LÂMINA ESPIRAL, <text:s text:c="2"/>BLOQUEIO ESTÁTICO E DESENHO ANATOMICO PARA ESQUERDO E DIREITO - CAIXA CONTENDO INSTRUMENTAIS <text:s text:c="2"/>PARA COLOCAÇÃO DA HASTE CURTA E MINI , MEDIDOR DE CANAL E DA HASTE, GUIAS DE BROCAS, PROTETORES <text:s text:c="2"/>DE PAREDES MOLES, MANDRIL EM T, BROCA CANULADA , CHAVE HEXAGONAL E STARDRIVE, MARTELO <text:s text:c="2"/>DESLIZANTE, GUIA DE INTRODUÇÃO DA HASTE <text:s/>COM BRAÇO DIRECIONAL DE 125, 130 E 135, FRESA CANULADA, <text:s text:c="2"/>IMAPACTOR PARA LAMINA ESPIRAL E SISTEMA DE COMPRESSÃO INTERFRAGMENTARIA. <text:s text:c="2"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100" calcext:value-type="float">
            <text:p>100</text:p>
          </table:table-cell>
          <table:table-cell table:style-name="ce125" office:value-type="currency" office:currency="BRL" office:value="13800" calcext:value-type="currency">
            <text:p>R$ 13.8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6">
          <table:table-cell table:style-name="ce79"/>
          <table:table-cell table:style-name="ce83" office:value-type="float" office:value="102" calcext:value-type="float">
            <text:p>102</text:p>
          </table:table-cell>
          <table:table-cell table:style-name="ce96" office:value-type="string" calcext:value-type="string">
            <text:p>BR3309775</text:p>
          </table:table-cell>
          <table:table-cell table:style-name="ce104" office:value-type="float" office:value="314755" calcext:value-type="float">
            <text:p>314755</text:p>
          </table:table-cell>
          <table:table-cell table:style-name="ce98" office:value-type="string" calcext:value-type="string">
            <text:p>GRUPO 8</text:p>
          </table:table-cell>
          <table:table-cell table:style-name="ce107" office:value-type="string" calcext:value-type="string">
            <text:p>Sistema de haste umeral em titânio multibloqueio canulada, parafusos bloqueados 3,5 cortical 4,0 e 4,5 com furos <text:s/>possibilade de amarria da pequena e grande tuberosidade, canulada, para fraturas proximais, diafisárias e ou associadas , <text:s text:c="2"/>com sistema de dinamização de até 7cm intraoperatório. Tamanhos de 7,; 8,5 e 9,5 mm de diâmetro e comprimento de <text:s/>160mm a 315mm, <text:s text:c="2"/>fixação e estabilização, parafuso de fechamento de 0; 2; 5; 10 e 15mm, parafusos de bloqueio 3,5 / 4,0 / 4,5 mm com instrumental, brocas, <text:s text:c="2"/>fios guias para colocação de sistema de fresagem ou de melhor qualidade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30" calcext:value-type="float">
            <text:p>30</text:p>
          </table:table-cell>
          <table:table-cell table:style-name="ce125" office:value-type="currency" office:currency="BRL" office:value="16700" calcext:value-type="currency">
            <text:p>R$ 16.7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30">
          <table:table-cell table:style-name="ce79"/>
          <table:table-cell table:style-name="ce83" office:value-type="float" office:value="103" calcext:value-type="float">
            <text:p>103</text:p>
          </table:table-cell>
          <table:table-cell table:style-name="ce96" office:value-type="float" office:value="145690199" calcext:value-type="float">
            <text:p>145690199</text:p>
          </table:table-cell>
          <table:table-cell table:style-name="ce104" office:value-type="float" office:value="438045" calcext:value-type="float">
            <text:p>438045</text:p>
          </table:table-cell>
          <table:table-cell table:style-name="ce98" office:value-type="string" calcext:value-type="string">
            <text:p>GRUPO 8</text:p>
          </table:table-cell>
          <table:table-cell table:style-name="ce108" office:value-type="string" calcext:value-type="string">
            <text:p>ITEM 103 – HASTE TIBIAL CANULADA TIPO ETN EM TITÂNIO 8/9/10/11/12 E 13 MM, COMPRIMENTO DE 255 A 465 MM <text:s text:c="2"/>INCREMENTOS DE 15 MM, PARAFUSSO DE BLOQUEIO DE 4.0 E 5.0 MM EM TAN E 5.0 TITANIO DUPLO ROSCA, <text:s text:c="2"/>COM OPÇÕES DE BLOQUEIO PROXIMAL DE 14/20 E 30 MM E BLOQUEIO DISTAIS DE 5/13/22 E 37 MM, <text:s text:c="2"/>COM BLOQUEIOS PROXIMAIS ESTÁTICOS E OBLIQUOS EXCLUSIVAS E INOVADORAS PODENDO COMBINAR <text:s text:c="2"/>COM BLOQUEIO PARAFUSO ESPONJOSO, PARAFUSO DE FECHAMENTO 0/5/10 E 15MM. - <text:s text:c="2"/>CAIXA CONTENDO INSTRUMENTAIS PARA COLOCAÇÃO DA HASTE ETN EM TITÂNIO, CONTENDO GUIAS DE BROCAS, <text:s text:c="2"/>BROCAS COM PONTA DIAMANTADA, MANDRIL EM T, PROTETORES DE PARTES MOLES, GUIA DE INSERÇÃO, <text:s text:c="2"/>MARTELO DESLIZANTE, BRAÇO DIRECIONAL PARA BLOQUEIO PROXIMAL COM MULTIPLAS OPÇÕES DE BLOQUEIO, <text:s text:c="2"/>MEDIDOR DE PROFUNDIDADE, BROCAS CALIBRADAS, GUIA SISTEMA DE DINAMIZAÇÃO DA HASTE ETN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4" calcext:value-type="float">
            <text:p>4</text:p>
          </table:table-cell>
          <table:table-cell table:style-name="ce104" office:value-type="float" office:value="70" calcext:value-type="float">
            <text:p>70</text:p>
          </table:table-cell>
          <table:table-cell table:style-name="ce125" office:value-type="currency" office:currency="BRL" office:value="14100" calcext:value-type="currency">
            <text:p>R$ 14.100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4">
          <table:table-cell table:style-name="ce79"/>
          <table:table-cell table:style-name="ce83" office:value-type="float" office:value="104" calcext:value-type="float">
            <text:p>104</text:p>
          </table:table-cell>
          <table:table-cell table:style-name="ce96" office:value-type="string" calcext:value-type="string">
            <text:p>BR3157913</text:p>
          </table:table-cell>
          <table:table-cell table:style-name="ce104" office:value-type="string" calcext:value-type="string">
            <text:p>423033</text:p>
          </table:table-cell>
          <table:table-cell table:style-name="ce98" office:value-type="string" calcext:value-type="string">
            <text:p>GRUPO 9</text:p>
          </table:table-cell>
          <table:table-cell table:style-name="ce107" office:value-type="string" calcext:value-type="string">
            <text:p>Haste intramedular fêmur titânio <text:s/>8, 9 e 10mm de diâmetro e comprimento de 240mm a 480mm, Parafuso fixação em titânio <text:s text:c="3"/>diâmetro <text:s/>4,5MM, comprimento 20 à 80MM,Parafuso fixação em titânio <text:s/>diâmetro <text:s/>6,0MM, comprimento 36 à 96MM, <text:s text:c="2"/>Parafuso de cobertura em titânio.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30" calcext:value-type="float">
            <text:p>3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4">
          <table:table-cell table:style-name="ce79"/>
          <table:table-cell table:style-name="ce83" office:value-type="float" office:value="105" calcext:value-type="float">
            <text:p>105</text:p>
          </table:table-cell>
          <table:table-cell table:style-name="ce96" office:value-type="string" calcext:value-type="string">
            <text:p>BR3157915</text:p>
          </table:table-cell>
          <table:table-cell table:style-name="ce104" office:value-type="string" calcext:value-type="string">
            <text:p>423033</text:p>
          </table:table-cell>
          <table:table-cell table:style-name="ce98" office:value-type="string" calcext:value-type="string">
            <text:p>GRUPO 9</text:p>
          </table:table-cell>
          <table:table-cell table:style-name="ce107" office:value-type="string" calcext:value-type="string">
            <text:p>Haste intramedular úmero titânio bloqueada, diâmetros 7 à 10mm, comprimento 180 a 405mm, Parafuso fixação em titânio <text:s text:c="3"/>diâmetro <text:s/>3,5MM, comprimento 18 à 60MM,Parafuso fixação em titânio <text:s/>diâmetro <text:s/>4,5MM, comprimento 22 à 60MM, <text:s text:c="2"/>Parafuso de cobertura em titânio múltiplos bloqueios, 6 X 7 e 6 X 9mm. <text:s text:c="9"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30" calcext:value-type="float">
            <text:p>3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2">
          <table:table-cell table:style-name="ce79"/>
          <table:table-cell table:style-name="ce83" office:value-type="float" office:value="106" calcext:value-type="float">
            <text:p>106</text:p>
          </table:table-cell>
          <table:table-cell table:style-name="ce96" office:value-type="string" calcext:value-type="string">
            <text:p>BR3157916</text:p>
          </table:table-cell>
          <table:table-cell table:style-name="ce104" office:value-type="string" calcext:value-type="string">
            <text:p>438050</text:p>
          </table:table-cell>
          <table:table-cell table:style-name="ce98" office:value-type="string" calcext:value-type="string">
            <text:p>GRUPO 9</text:p>
          </table:table-cell>
          <table:table-cell table:style-name="ce107" office:value-type="string" calcext:value-type="string">
            <text:p>Haste intramedular proximal do fêmur em titânio, direita e esquerda, com ângulo cervicodiafisário variável de 125º,130º e 135º, <text:s text:c="2"/>curta e longa, até 460mm, com dois ou três orifícios distais, Parafuso deslizante, diâmetro 10,5mm, comprimento 70 à 120mm, <text:s text:c="2"/>Parafuso tipo fechamento tubo, Parafuso tipo contrapino, tamanhos 45 à 110mm, Parafuso fixação em titânio diâmetro 4,5mm, <text:s text:c="2"/>comprimento 20 à 80mm. <text:s text:c="4"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120" calcext:value-type="float">
            <text:p>12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2">
          <table:table-cell table:style-name="ce79"/>
          <table:table-cell table:style-name="ce83" office:value-type="float" office:value="107" calcext:value-type="float">
            <text:p>107</text:p>
          </table:table-cell>
          <table:table-cell table:style-name="ce96" office:value-type="string" calcext:value-type="string">
            <text:p>BR3157917</text:p>
          </table:table-cell>
          <table:table-cell table:style-name="ce104" office:value-type="string" calcext:value-type="string">
            <text:p>438050</text:p>
          </table:table-cell>
          <table:table-cell table:style-name="ce98" office:value-type="string" calcext:value-type="string">
            <text:p>GRUPO 9</text:p>
          </table:table-cell>
          <table:table-cell table:style-name="ce107" office:value-type="string" calcext:value-type="string">
            <text:p>Haste Intramedular fêmur titânio retrógrada bloqueada, diâmetro 10, 11 e 12mm, comprimento 160mm a 480mm, Parafuso <text:s text:c="2"/>fixação em titânio <text:s/>diâmetro <text:s/>4,5MM, comprimento 20 à 80MM,Parafuso fixação em titânio <text:s/>diâmetro <text:s/>6,0MM, comprimento <text:s text:c="2"/>36 à 116MM, Bucha com rosca autocortante em titânio com diâmetro de 4,5 à 6,5mm, Parafuso de cobertura em titânio.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20" calcext:value-type="float">
            <text:p>2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4">
          <table:table-cell table:style-name="ce79"/>
          <table:table-cell table:style-name="ce83" office:value-type="float" office:value="108" calcext:value-type="float">
            <text:p>108</text:p>
          </table:table-cell>
          <table:table-cell table:style-name="ce96" office:value-type="string" calcext:value-type="string">
            <text:p>BR3170977</text:p>
          </table:table-cell>
          <table:table-cell table:style-name="ce104" office:value-type="string" calcext:value-type="string">
            <text:p>438050</text:p>
          </table:table-cell>
          <table:table-cell table:style-name="ce98" office:value-type="string" calcext:value-type="string">
            <text:p>GRUPO 9</text:p>
          </table:table-cell>
          <table:table-cell table:style-name="ce107" office:value-type="string" calcext:value-type="string">
            <text:p>Haste intramedular tíbia titânio, múltiplos bloqueios proximais, bloqueada, canulada, diâmetros 8, 9 e 10mm, <text:s text:c="2"/>comprimento 200 a 420mm, Parafuso de compressão interna em titânio com opção de compressão até 9mm, <text:s text:c="2"/>Parafuso bloqueado em titânio 4,5mm e comprimento de 20 À 80MM, Parafuso de fecho em titânio 0mm, 5mm e 10mm.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4" calcext:value-type="float">
            <text:p>4</text:p>
          </table:table-cell>
          <table:table-cell table:style-name="ce104" office:value-type="float" office:value="70" calcext:value-type="float">
            <text:p>7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7">
          <table:table-cell table:style-name="ce79"/>
          <table:table-cell table:style-name="ce83" office:value-type="float" office:value="109" calcext:value-type="float">
            <text:p>109</text:p>
          </table:table-cell>
          <table:table-cell table:style-name="ce96" office:value-type="string" calcext:value-type="string">
            <text:p>BR3157920</text:p>
          </table:table-cell>
          <table:table-cell table:style-name="ce104" office:value-type="float" office:value="420979" calcext:value-type="float">
            <text:p>420979</text:p>
          </table:table-cell>
          <table:table-cell table:style-name="ce98" office:value-type="string" calcext:value-type="string">
            <text:p>GRUPO 10</text:p>
          </table:table-cell>
          <table:table-cell table:style-name="ce107" office:value-type="string" calcext:value-type="string">
            <text:p>FIXADOR EXTERNO, TIPO DINÂMICO, APLICAÇÃO P/ TÍBIA <text:s/>E FÊMUR, CARACTERÍSTICAS ADICIONAIS <text:s text:c="2"/>PINA DE SCHANZ 4,5 A 6,5 MM,BARRA (TUBO-TUBO)400MM, COMPONENTES C/CONEXÃO BARRA-BARRA, <text:s/>BARRA-PINO.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40" calcext:value-type="float">
            <text:p>40</text:p>
          </table:table-cell>
          <table:table-cell table:style-name="ce125" office:value-type="currency" office:currency="BRL" office:value="1150" calcext:value-type="currency">
            <text:p>R$ 1.150,00</text:p>
          </table:table-cell>
          <table:table-cell table:style-name="ce127" office:value-type="string" calcext:value-type="string">
            <text:p>BIOSINTESE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4">
          <table:table-cell table:style-name="ce79"/>
          <table:table-cell table:style-name="ce83" office:value-type="float" office:value="110" calcext:value-type="float">
            <text:p>110</text:p>
          </table:table-cell>
          <table:table-cell table:style-name="ce96" office:value-type="float" office:value="190033998" calcext:value-type="float">
            <text:p>190033998</text:p>
          </table:table-cell>
          <table:table-cell table:style-name="ce104" office:value-type="float" office:value="420943" calcext:value-type="float">
            <text:p>420943</text:p>
          </table:table-cell>
          <table:table-cell table:style-name="ce98" office:value-type="string" calcext:value-type="string">
            <text:p>GRUPO 10</text:p>
          </table:table-cell>
          <table:table-cell table:style-name="ce107" office:value-type="string" calcext:value-type="string">
            <text:p>FIXADOR EXTERNO, MATERIAL ALUMÍNIO, TIPO USO DESCARTÁVEL, ESTERILIDADE ESTÉRIL, <text:s text:c="3"/>APLICAÇÃO P/ FALANGE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18" calcext:value-type="float">
            <text:p>18</text:p>
          </table:table-cell>
          <table:table-cell table:style-name="ce125" office:value-type="currency" office:currency="BRL" office:value="890" calcext:value-type="currency">
            <text:p>R$ 890,00</text:p>
          </table:table-cell>
          <table:table-cell table:style-name="ce127" office:value-type="string" calcext:value-type="string">
            <text:p>BIOSINTESE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4">
          <table:table-cell table:style-name="ce79"/>
          <table:table-cell table:style-name="ce83" office:value-type="float" office:value="111" calcext:value-type="float">
            <text:p>111</text:p>
          </table:table-cell>
          <table:table-cell table:style-name="ce96" office:value-type="float" office:value="190034331" calcext:value-type="float">
            <text:p>190034331</text:p>
          </table:table-cell>
          <table:table-cell table:style-name="ce104" office:value-type="float" office:value="411347" calcext:value-type="float">
            <text:p>411347</text:p>
          </table:table-cell>
          <table:table-cell table:style-name="ce98" office:value-type="string" calcext:value-type="string">
            <text:p>GRUPO 10</text:p>
          </table:table-cell>
          <table:table-cell table:style-name="ce107" office:value-type="string" calcext:value-type="string">
            <text:p>FIXADOR EXTERNO, MATERIAL ALUMÍNIO, TIPO USO DESCARTÁVEL, ESTERILIDADE ESTÉRIL, <text:s text:c="2"/>APLICAÇÃO P/ FÊMUR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40" calcext:value-type="float">
            <text:p>40</text:p>
          </table:table-cell>
          <table:table-cell table:style-name="ce125" office:value-type="currency" office:currency="BRL" office:value="700" calcext:value-type="currency">
            <text:p>R$ 700,00</text:p>
          </table:table-cell>
          <table:table-cell table:style-name="ce127" office:value-type="string" calcext:value-type="string">
            <text:p>BIOSINTESE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4">
          <table:table-cell table:style-name="ce79"/>
          <table:table-cell table:style-name="ce83" office:value-type="float" office:value="112" calcext:value-type="float">
            <text:p>112</text:p>
          </table:table-cell>
          <table:table-cell table:style-name="ce96" office:value-type="float" office:value="190034333" calcext:value-type="float">
            <text:p>190034333</text:p>
          </table:table-cell>
          <table:table-cell table:style-name="ce104" office:value-type="float" office:value="364504" calcext:value-type="float">
            <text:p>364504</text:p>
          </table:table-cell>
          <table:table-cell table:style-name="ce98" office:value-type="string" calcext:value-type="string">
            <text:p>GRUPO 10</text:p>
          </table:table-cell>
          <table:table-cell table:style-name="ce107" office:value-type="string" calcext:value-type="string">
            <text:p>FIXADOR EXTERNO, MATERIAL ALUMÍNIO, TIPO USO DESCARTÁVEL, ESTERILIDADE ESTÉRIL, <text:s text:c="3"/>APLICAÇÃO P/ RÁDIO E PUNHO.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18" calcext:value-type="float">
            <text:p>18</text:p>
          </table:table-cell>
          <table:table-cell table:style-name="ce125" office:value-type="currency" office:currency="BRL" office:value="700" calcext:value-type="currency">
            <text:p>R$ 700,00</text:p>
          </table:table-cell>
          <table:table-cell table:style-name="ce127" office:value-type="string" calcext:value-type="string">
            <text:p>BIOSINTESE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4">
          <table:table-cell table:style-name="ce79"/>
          <table:table-cell table:style-name="ce83" office:value-type="float" office:value="113" calcext:value-type="float">
            <text:p>113</text:p>
          </table:table-cell>
          <table:table-cell table:style-name="ce96" office:value-type="float" office:value="190034334" calcext:value-type="float">
            <text:p>190034334</text:p>
          </table:table-cell>
          <table:table-cell table:style-name="ce104" office:value-type="string" calcext:value-type="string">
            <text:p>443299</text:p>
          </table:table-cell>
          <table:table-cell table:style-name="ce98" office:value-type="string" calcext:value-type="string">
            <text:p>GRUPO 10</text:p>
          </table:table-cell>
          <table:table-cell table:style-name="ce107" office:value-type="string" calcext:value-type="string">
            <text:p>FIXADOR EXTERNO, MATERIAL ALUMÍNIO, TIPO USO DESCARTÁVEL, ESTERILIDADE ESTÉRIL, <text:s text:c="2"/>APLICAÇÃO P/ TÍBIA E ÚMER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60" calcext:value-type="float">
            <text:p>60</text:p>
          </table:table-cell>
          <table:table-cell table:style-name="ce125" office:value-type="currency" office:currency="BRL" office:value="700" calcext:value-type="currency">
            <text:p>R$ 700,00</text:p>
          </table:table-cell>
          <table:table-cell table:style-name="ce127" office:value-type="string" calcext:value-type="string">
            <text:p>BIOSINTESE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7">
          <table:table-cell table:style-name="ce79"/>
          <table:table-cell table:style-name="ce83" office:value-type="float" office:value="114" calcext:value-type="float">
            <text:p>114</text:p>
          </table:table-cell>
          <table:table-cell table:style-name="ce96" office:value-type="string" calcext:value-type="string">
            <text:p>BR3155217</text:p>
          </table:table-cell>
          <table:table-cell table:style-name="ce104" office:value-type="string" calcext:value-type="string">
            <text:p>451879</text:p>
          </table:table-cell>
          <table:table-cell table:style-name="ce98" office:value-type="string" calcext:value-type="string">
            <text:p>GRUPO 11</text:p>
          </table:table-cell>
          <table:table-cell table:style-name="ce107" office:value-type="string" calcext:value-type="string">
            <text:p>ESPAÇADOR DE TENDÃO, MATERIAL SILICONE RADIOPACO, FORMATO TUBULAR CILÍNDRICO, DIÂMETRO* CERCA <text:s text:c="2"/>DE 3, TIPO USO* ESTÉRIL, USO ÚNICO, APRESENTAÇÃO EMBALAGEM INDIVIDUAL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30" calcext:value-type="float">
            <text:p>3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7">
          <table:table-cell table:style-name="ce79"/>
          <table:table-cell table:style-name="ce83" office:value-type="float" office:value="115" calcext:value-type="float">
            <text:p>115</text:p>
          </table:table-cell>
          <table:table-cell table:style-name="ce96" office:value-type="string" calcext:value-type="string">
            <text:p>BR3155219</text:p>
          </table:table-cell>
          <table:table-cell table:style-name="ce104" office:value-type="string" calcext:value-type="string">
            <text:p>451879</text:p>
          </table:table-cell>
          <table:table-cell table:style-name="ce98" office:value-type="string" calcext:value-type="string">
            <text:p>GRUPO 11</text:p>
          </table:table-cell>
          <table:table-cell table:style-name="ce107" office:value-type="string" calcext:value-type="string">
            <text:p>ESPAÇADOR DE TENDÃO, MATERIAL SILICONE RADIOPACO, FORMATO TUBULAR CILÍNDRICO, DIÂMETRO* CERCA <text:s text:c="2"/>DE 5, TIPO USO* ESTÉRIL, USO ÚNICO, APRESENTAÇÃO EMBALAGEM INDIVIDUAL <text:s text:c="3"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20" calcext:value-type="float">
            <text:p>2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32">
          <table:table-cell table:style-name="ce79"/>
          <table:table-cell table:style-name="ce83" office:value-type="float" office:value="116" calcext:value-type="float">
            <text:p>116</text:p>
          </table:table-cell>
          <table:table-cell table:style-name="ce96" office:value-type="float" office:value="171245201" calcext:value-type="float">
            <text:p>171245201</text:p>
          </table:table-cell>
          <table:table-cell table:style-name="ce104" office:value-type="float" office:value="420979" calcext:value-type="float">
            <text:p>420979</text:p>
          </table:table-cell>
          <table:table-cell table:style-name="ce98" office:value-type="string" calcext:value-type="string">
            <text:p>GRUPO 12</text:p>
          </table:table-cell>
          <table:table-cell table:style-name="ce107" office:value-type="string" calcext:value-type="string">
            <text:p>APARELHO FIXADOR EXTERNO INDICADO PARA TÍBIA, COM A HASTE RÍGIDA RADIOTRANSPARENTE EM FIBRA DE <text:s text:c="2"/>CARBONO DE 300MM, ASSOCIADA A UMA UNIDADE TRACIONADORA COM SISTEMA DE COM´PRESSÃO E <text:s text:c="2"/>DISTRAÇÃO PERMITINDO TRANSPORTE E/OU ALONGAMENTO ÓSSEO, MONTAGEM BIPLANAR, CABEÇAIS <text:s text:c="2"/>DESLIZANTES EM DURALUMÍNIO, PLATAFORMAS QUE POSSIBILITAM A FIXAÇÃO LINEAR COM POSICIONAMENTO <text:s text:c="2"/>PARALELO, CONVERGENTE OU DIVERGENTE E/OU CLAMPS CIRCULARES QUE PERMITEM A FIXAÇÃO EM <text:s text:c="2"/>QUALQUER ANGULAÇÃO. PINOS DE SCHANZ CÔNICOS E CALIBRADOS, COM PONTA LANÇA OU PONTA ROMBA, <text:s text:c="2"/>CHAVE EM "L" E CHAVE FIXA PARA MÔDULO DE COMPRESSÃO. ACOMPANHA INSTRUMENTAL PARA COLOCAÇÃ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30" calcext:value-type="float">
            <text:p>30</text:p>
          </table:table-cell>
          <table:table-cell table:style-name="ce125" office:value-type="currency" office:currency="BRL" office:value="13000" calcext:value-type="currency">
            <text:p>R$ 13.000,00</text:p>
          </table:table-cell>
          <table:table-cell table:style-name="ce127" office:value-type="string" calcext:value-type="string">
            <text:p>OSSEUS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32">
          <table:table-cell table:style-name="ce79"/>
          <table:table-cell table:style-name="ce83" office:value-type="float" office:value="117" calcext:value-type="float">
            <text:p>117</text:p>
          </table:table-cell>
          <table:table-cell table:style-name="ce96" office:value-type="float" office:value="171245203" calcext:value-type="float">
            <text:p>171245203</text:p>
          </table:table-cell>
          <table:table-cell table:style-name="ce104" office:value-type="float" office:value="420979" calcext:value-type="float">
            <text:p>420979</text:p>
          </table:table-cell>
          <table:table-cell table:style-name="ce98" office:value-type="string" calcext:value-type="string">
            <text:p>GRUPO 12</text:p>
          </table:table-cell>
          <table:table-cell table:style-name="ce107" office:value-type="string" calcext:value-type="string">
            <text:p>APARELHO FIXADOR EXTERNO GRANDE INDICADO PARA FÊMUR, COM A HASTE RÍGIDA RADIOTRANSPARENTE <text:s text:c="2"/>EM FIBRA DE CARBONO DE 380MM ASSOCIADA A UMA UNIDADE TRACIONADORA COM SISTEMA DE COMPRESSÃO <text:s text:c="2"/>E DISTRAÇÃO PERMITINDO TRANSPORTE E/OU ALONGAMENTO ÓSSEO, MONTAGEM UNIPLANAR OU BIPLANAR, <text:s text:c="2"/>CABEÇAIS DESLIZANTES EM DURALUMÍNIO, PLATAFORMAS QUE POSSIBILITAM A FIXAÇÃO LINEAR COM <text:s text:c="2"/>POSICIONAMENTO PARALELO, CONVERGENTE OU DIVERGENTE E/OU CLAMPS CIRCULARES QUE PERMITEM A <text:s text:c="2"/>FIXAÇÃO EM QUALQUER ANGULAÇÃO. PINOS DE SCHANZ CÔNICOS E CALIBRADOS, COM PONTA LANÇA OU <text:s text:c="2"/>PONTA ROMBA. CHAVE EM "L" E CHAVE FIXA PARA MÔDULO DE COMPRESSÃO. SISTEMA 99. ACOMPANHA <text:s text:c="2"/>INSTRUMENTAL PARA COLOCAÇÃ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20" calcext:value-type="float">
            <text:p>20</text:p>
          </table:table-cell>
          <table:table-cell table:style-name="ce125" office:value-type="currency" office:currency="BRL" office:value="13000" calcext:value-type="currency">
            <text:p>R$ 13.000,00</text:p>
          </table:table-cell>
          <table:table-cell table:style-name="ce127" office:value-type="string" calcext:value-type="string">
            <text:p>OSSEUS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7">
          <table:table-cell table:style-name="ce79"/>
          <table:table-cell table:style-name="ce83" office:value-type="float" office:value="118" calcext:value-type="float">
            <text:p>118</text:p>
          </table:table-cell>
          <table:table-cell table:style-name="ce96" office:value-type="float" office:value="190050491" calcext:value-type="float">
            <text:p>190050491</text:p>
          </table:table-cell>
          <table:table-cell table:style-name="ce104" office:value-type="float" office:value="365417" calcext:value-type="float">
            <text:p>365417</text:p>
          </table:table-cell>
          <table:table-cell table:style-name="ce98" office:value-type="string" calcext:value-type="string">
            <text:p>GRUPO 12</text:p>
          </table:table-cell>
          <table:table-cell table:style-name="ce107" office:value-type="string" calcext:value-type="string">
            <text:p>FIXADOR EXTERNO GRANDE E MEDIANO QUE PERMITE AJUSTE EM TRÊS PLANOS, ROTULAS COM MECANISMO <text:s text:c="2"/>DE AJUSTE COM CLIP, CÓDIGO DE CORES PARA FÁCIL IDENTIFICAÇÃO, POSSUINDO UMA LINHA DE PRODUTOS <text:s text:c="2"/>COMPLETA.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16" calcext:value-type="float">
            <text:p>16</text:p>
          </table:table-cell>
          <table:table-cell table:style-name="ce125" office:value-type="currency" office:currency="BRL" office:value="17500" calcext:value-type="currency">
            <text:p>R$ 17.500,00</text:p>
          </table:table-cell>
          <table:table-cell table:style-name="ce127" office:value-type="string" calcext:value-type="string">
            <text:p>OSSEUS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6">
          <table:table-cell table:style-name="ce79"/>
          <table:table-cell table:style-name="ce83" office:value-type="float" office:value="119" calcext:value-type="float">
            <text:p>119</text:p>
          </table:table-cell>
          <table:table-cell table:style-name="ce96" office:value-type="float" office:value="171245199" calcext:value-type="float">
            <text:p>171245199</text:p>
          </table:table-cell>
          <table:table-cell table:style-name="ce104" office:value-type="float" office:value="420979" calcext:value-type="float">
            <text:p>420979</text:p>
          </table:table-cell>
          <table:table-cell table:style-name="ce98" office:value-type="string" calcext:value-type="string">
            <text:p>GRUPO 12</text:p>
          </table:table-cell>
          <table:table-cell table:style-name="ce107" office:value-type="string" calcext:value-type="string">
            <text:p>APARELHO FIXADOR EXTERNO RÍGIDO PEQUENO, INDICADO PARA FRATURAS DE ANTEBRAÇO, PUNHO E ÚMERO <text:s text:c="2"/>COM A HASTE RÍGIDA EM FIBRA DE CARBONO RADIOTRANSPARENTE DE 195MM, MONTAGEM UNIPLANAR, <text:s text:c="2"/>CABEÇAIS DESLIZANTES EM DURALUMÍNIO, PLATAFORMAS QUE POSSIBILITAM A FIXAÇÃO LINEAR COM <text:s text:c="2"/>POSICIONAMENTO PARALELO, CONVERGENTE OU DIVERGENTE E/OU CLAMPS CIRCULARES QUE PERMITEM A <text:s text:c="2"/>FIXAÇÃO EM DIVERSAS ANGULAÇÕES. PINOS DE SCHANZ CÔNICOS E CALIBRADOS, COM PONTA LANÇA OU <text:s text:c="2"/>PONTA ROMBA. CHAVE EM "L", ACOMPANHA INSTRUMENTAL PARA COLOCAÇÃ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16" calcext:value-type="float">
            <text:p>16</text:p>
          </table:table-cell>
          <table:table-cell table:style-name="ce125" office:value-type="currency" office:currency="BRL" office:value="13000" calcext:value-type="currency">
            <text:p>R$ 13.000,00</text:p>
          </table:table-cell>
          <table:table-cell table:style-name="ce127" office:value-type="string" calcext:value-type="string">
            <text:p>OSSEUS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6">
          <table:table-cell table:style-name="ce79"/>
          <table:table-cell table:style-name="ce83" office:value-type="float" office:value="120" calcext:value-type="float">
            <text:p>120</text:p>
          </table:table-cell>
          <table:table-cell table:style-name="ce96" office:value-type="float" office:value="171245200" calcext:value-type="float">
            <text:p>171245200</text:p>
          </table:table-cell>
          <table:table-cell table:style-name="ce104" office:value-type="float" office:value="420979" calcext:value-type="float">
            <text:p>420979</text:p>
          </table:table-cell>
          <table:table-cell table:style-name="ce98" office:value-type="string" calcext:value-type="string">
            <text:p>GRUPO 12</text:p>
          </table:table-cell>
          <table:table-cell table:style-name="ce107" office:value-type="string" calcext:value-type="string">
            <text:p>APARELHO FIXADOR EXTERNO MÉDIO INDICADO PARA TÍBIA, COM A HASTE RÍGIDA RADIOTRANSPARENTE EM <text:s text:c="2"/>FIBRA DE CARBONO DE 300MM, MONTAGEM INIPLANAR, CABEÇAIS DESLIZANTES EM DURALUMÍNIO, <text:s text:c="2"/>PLATAFORMAS QUE POSSIBILITAM A FIXAÇÃO LINEAR COM POSICIONAMENTO PARALELO, CONVERGENTE OU <text:s text:c="2"/>DIVERGENTE E/OU CLAMPS CIRCULARES QUE PERMITEM A FIXAÇÃO EM QUALQUER ANGULAÇÃO. PINOS DE <text:s text:c="2"/>SCHANZ CÔNICOS E CALIBRADOS, COM PONTA LANÇA OU PONTA ROMBA. CHAVE EM "L", ACOMPANHA <text:s text:c="2"/>INSTRUMETAL PARA COLOCAÇÃ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50" calcext:value-type="float">
            <text:p>50</text:p>
          </table:table-cell>
          <table:table-cell table:style-name="ce125" office:value-type="currency" office:currency="BRL" office:value="17570" calcext:value-type="currency">
            <text:p>R$ 17.570,00</text:p>
          </table:table-cell>
          <table:table-cell table:style-name="ce127" office:value-type="string" calcext:value-type="string">
            <text:p>OSSEUS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6">
          <table:table-cell table:style-name="ce79"/>
          <table:table-cell table:style-name="ce83" office:value-type="float" office:value="121" calcext:value-type="float">
            <text:p>121</text:p>
          </table:table-cell>
          <table:table-cell table:style-name="ce96" office:value-type="float" office:value="171245202" calcext:value-type="float">
            <text:p>171245202</text:p>
          </table:table-cell>
          <table:table-cell table:style-name="ce104" office:value-type="float" office:value="420979" calcext:value-type="float">
            <text:p>420979</text:p>
          </table:table-cell>
          <table:table-cell table:style-name="ce98" office:value-type="string" calcext:value-type="string">
            <text:p>GRUPO 12</text:p>
          </table:table-cell>
          <table:table-cell table:style-name="ce107" office:value-type="string" calcext:value-type="string">
            <text:p>APARELHO FIXADOR EXTERNO GRANDE INDICADO PARA FÊMUR, COM A HASTE RÍGIDA RADIOTRANSPARENTE <text:s text:c="2"/>EM FIBRA DE CARBONO DE 380MM, MONTAGEM UNIPLANAR, CABEÇAIS DESLIZANTES EM DURALUMÍNIO, <text:s text:c="2"/>PLATAFORMAS QUE POSSIBILITAM A FIXAÇÃO LINEAR COM POSICIONAMENTO PARALELO, CONVERGENTE OU <text:s text:c="2"/>DIVERGENTE E/OU CLAMPS CIRCULARES QUE PERMITEM A FIXAÇÃO EM QUALQUER ANGULAÇÃO. PINOS DE <text:s text:c="2"/>SCHANZ CÔNICOS E CALIBRADOS, COM PONTA LANÇA OU PONTA ROMBA. CHAVE EM "L", ACOMPANHA <text:s text:c="2"/>INSTRUMENTAL PARA COLOCAÇÃ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16" calcext:value-type="float">
            <text:p>16</text:p>
          </table:table-cell>
          <table:table-cell table:style-name="ce125" office:value-type="currency" office:currency="BRL" office:value="13449.5" calcext:value-type="currency">
            <text:p>R$ 13.449,50</text:p>
          </table:table-cell>
          <table:table-cell table:style-name="ce127" office:value-type="string" calcext:value-type="string">
            <text:p>OSSEUS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5">
          <table:table-cell table:style-name="ce79"/>
          <table:table-cell table:style-name="ce83" office:value-type="float" office:value="122" calcext:value-type="float">
            <text:p>122</text:p>
          </table:table-cell>
          <table:table-cell table:style-name="ce96" office:value-type="string" calcext:value-type="string">
            <text:p>BR3332143</text:p>
          </table:table-cell>
          <table:table-cell table:style-name="ce104" office:value-type="float" office:value="447027" calcext:value-type="float">
            <text:p>447027</text:p>
          </table:table-cell>
          <table:table-cell table:style-name="ce98" office:value-type="string" calcext:value-type="string">
            <text:p>GRUPO 13</text:p>
          </table:table-cell>
          <table:table-cell table:style-name="ce107" office:value-type="string" calcext:value-type="string">
            <text:p>SISTEMA DE BLOQUEIO POR RADIOFREQUENCIA - AGULHA/CÂNULA COM PONTA BISELADA 25 GRAU DESTINADA <text:s text:c="2"/>A BLOQUEIO DE LEXOS E NERVOS PERIFÉRICOS, UTILIZANDO ESTIMULAÇÃO ELÈTRICA NERVOSA E/OU <text:s text:c="2"/>ULTRASSOM. USO ÚNICO, ESTÉRIL. COMPOSIÇÃO DO KIT: PKBN21-06 - COMPOSTO COM 03 UNIDADES DE <text:s text:c="2"/>AGULHA DE BLOQUEIO 21GX140MM; PKBN21-08- COMPOSTO COM 01 UNIDADE DE AGULHA DE BLOQUEIO <text:s/>21GGX140MM; PKBN22-06 - COMPOSTO COM 03 UNIDADES DE AGULHA DE BLOQUEIO 22GX90MM. TODOS OS <text:s/>KITS INCLUEM AINDA OS SEGUINTES MATERIAIS: 01 CAMPO EXTERNO 80X90 CM; 01 SERINGA LUER LOCK 20ML; <text:s text:c="2"/>01 SERINGA LUER 10ML; 01 AGULHA <text:s/>25G, 16MM; 01 AGULHAG, 12MM; 10 GAZES 10X10 CM; 01 FILTRO AZUL; <text:s text:c="2"/>02 ESPONJA COM CABO; 01 DISPOSITIVO AKUS DE SEGURANÇA; 01 OU 03 CURATIVOS PEQUENOS; 01 CAPA <text:s/>PARA PROBE DE ULTRASSOM; 01 BANDEJA PEQUENA 60ML, 72MM X 58MM X 18MM; 01 CAMPO EXTERNO <text:s/>FENESTRADO 11CM, COM 5MM DE ADESIVO EM DOIS LADOS. 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400" calcext:value-type="float">
            <text:p>40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2">
          <table:table-cell table:style-name="ce79"/>
          <table:table-cell table:style-name="ce83" office:value-type="float" office:value="123" calcext:value-type="float">
            <text:p>123</text:p>
          </table:table-cell>
          <table:table-cell table:style-name="ce96" office:value-type="string" calcext:value-type="string">
            <text:p>BR3332205</text:p>
          </table:table-cell>
          <table:table-cell table:style-name="ce104" office:value-type="float" office:value="617465" calcext:value-type="float">
            <text:p>617465</text:p>
          </table:table-cell>
          <table:table-cell table:style-name="ce98" office:value-type="string" calcext:value-type="string">
            <text:p>GRUPO 13</text:p>
          </table:table-cell>
          <table:table-cell table:style-name="ce107" office:value-type="string" calcext:value-type="string">
            <text:p>SISTEMA DE BLOQUEIO POR RADIOFREQUENCIA - CÂNULA PARA RIZOTOMIA PERCUTÂNEA POR <text:s text:c="2"/>RADIOFREQUENCIA. MATERIAL: AÇO INOXIDAVEL, EIXO PARCIALMENTE ISOLADO, CUBO/ALÇA DE <text:s/>PLÁSTICO E TAMPA COM ESTILETE. O CUBO/ALÇA É EQUIPADO COM UM MECANISMO QUE PERMITE <text:s/>A IMPLANTAÇÃOE RETRAÇÃO DE 3 (TRÊS) DENTES. CUBO/ALÇA COM CONECTOR COMPATÍVEL <text:s/>COM EQUIPAMENTO. ESTÉRIL, USO ÚNIC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400" calcext:value-type="float">
            <text:p>40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4">
          <table:table-cell table:style-name="ce79"/>
          <table:table-cell table:style-name="ce83" office:value-type="float" office:value="124" calcext:value-type="float">
            <text:p>124</text:p>
          </table:table-cell>
          <table:table-cell table:style-name="ce96" office:value-type="string" calcext:value-type="string">
            <text:p>BR3332220</text:p>
          </table:table-cell>
          <table:table-cell table:style-name="ce104" office:value-type="float" office:value="617462" calcext:value-type="float">
            <text:p>617462</text:p>
          </table:table-cell>
          <table:table-cell table:style-name="ce98" office:value-type="string" calcext:value-type="string">
            <text:p>GRUPO 13</text:p>
          </table:table-cell>
          <table:table-cell table:style-name="ce107" office:value-type="string" calcext:value-type="string">
            <text:p>SISTEMA DE BLOQUIEO POR RADIOFREQUENCIA - CÂNULA PARA RIZOTOMIA PERCUTÂNEA POR <text:s text:c="2"/>RADIOFREQUENCIA. MATERIAL: AÇO INOXIDÁVEL, EIXO PARCIALMENTE ISOLADO, CABO DE PLÁSTICO, <text:s/>PONTO DE INJEÇÃO E CABO COM CONECTOR COMPATÍVEL COM EQUIPAMENTO. ESTÉRIL, USO ÚNICO. <text:s text:c="4"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400" calcext:value-type="float">
            <text:p>40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4">
          <table:table-cell table:style-name="ce79"/>
          <table:table-cell table:style-name="ce83" office:value-type="float" office:value="125" calcext:value-type="float">
            <text:p>125</text:p>
          </table:table-cell>
          <table:table-cell table:style-name="ce96" office:value-type="string" calcext:value-type="string">
            <text:p>BR3332172</text:p>
          </table:table-cell>
          <table:table-cell table:style-name="ce104" office:value-type="float" office:value="440101" calcext:value-type="float">
            <text:p>440101</text:p>
          </table:table-cell>
          <table:table-cell table:style-name="ce98" office:value-type="string" calcext:value-type="string">
            <text:p>GRUPO 14</text:p>
          </table:table-cell>
          <table:table-cell table:style-name="ce107" office:value-type="string" calcext:value-type="string">
            <text:p>SISTEMA PARA ARTROPLASTIA DO TPRNOZELO - COMPONENTE TALAR DE PRÓTESE DE TORNOZELO NÃO <text:s text:c="2"/>CIMENTADO COM ANCORAGEM PARA FIXAÇÃ, CONGRUENTE COM A SUPERFICIE ARTICULAR PARA MAIOR <text:s text:c="2"/>ESTABILIDADE TIBIO-TALAR, COM GUIA EXTERNO PARA ORIENTAÇÃO PRECISA DE CORTE, COM NO MINIMO <text:s/>5 OPÇÕES DE CORTE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table:style-name="ce125" office:value-type="currency" office:currency="BRL" office:value="26000" calcext:value-type="currency">
            <text:p>R$ 26.000,00</text:p>
          </table:table-cell>
          <table:table-cell table:style-name="ce127" office:value-type="string" calcext:value-type="string">
            <text:p>ORTOSPINE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4">
          <table:table-cell table:style-name="ce79"/>
          <table:table-cell table:style-name="ce83" office:value-type="float" office:value="126" calcext:value-type="float">
            <text:p>126</text:p>
          </table:table-cell>
          <table:table-cell table:style-name="ce96" office:value-type="string" calcext:value-type="string">
            <text:p>BR3332173</text:p>
          </table:table-cell>
          <table:table-cell table:style-name="ce104" office:value-type="float" office:value="440099" calcext:value-type="float">
            <text:p>440099</text:p>
          </table:table-cell>
          <table:table-cell table:style-name="ce98" office:value-type="string" calcext:value-type="string">
            <text:p>GRUPO 14</text:p>
          </table:table-cell>
          <table:table-cell table:style-name="ce107" office:value-type="string" calcext:value-type="string">
            <text:p>SISTEMA PARA ARTROPLASTIA DO TORNOZELO - COMPONENTE TIBIAL DE PRÓTESE DE TORNOZELO SEM HASTE <text:s/>INTRAMEDULAR, VISANDO MÍNIMA RESSECÇÃO ÓSSEA, COM SUPERFICIEOSTEOINTEGRANTE, COM ANCORAGEM <text:s/>EM OSSO SUBCONDRAL POR PRESSFIT PARA ESTABILIDADE, COM TRILHO PARA FIXAÇÃO DE INSERT DE <text:s text:c="2"/>POLIETILENO. 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table:style-name="ce125" office:value-type="currency" office:currency="BRL" office:value="11000" calcext:value-type="currency">
            <text:p>R$ 11.000,00</text:p>
          </table:table-cell>
          <table:table-cell table:style-name="ce127" office:value-type="string" calcext:value-type="string">
            <text:p>ORTOSPINE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31">
          <table:table-cell table:style-name="ce79"/>
          <table:table-cell table:style-name="ce83" office:value-type="float" office:value="127" calcext:value-type="float">
            <text:p>127</text:p>
          </table:table-cell>
          <table:table-cell table:style-name="ce96" office:value-type="string" calcext:value-type="string">
            <text:p>BR3332174</text:p>
          </table:table-cell>
          <table:table-cell table:style-name="ce104" office:value-type="float" office:value="440099" calcext:value-type="float">
            <text:p>440099</text:p>
          </table:table-cell>
          <table:table-cell table:style-name="ce98" office:value-type="string" calcext:value-type="string">
            <text:p>GRUPO 14</text:p>
          </table:table-cell>
          <table:table-cell table:style-name="ce107" office:value-type="string" calcext:value-type="string">
            <text:p>SISTEMA PARA ARTROPLASTIA DO TORNOZELO - POLIETILENO DE ALTA DENSIDADE MOLECULAR PARA PRÓTESE <text:s/>DE TORNOZELO, COM ANGULAÇÃO CÔNCAVA E DESENHO GEOMÉTRICO ANATÔMICO CORRESPONDENTE À <text:s text:c="2"/>SUPERFICIE DO TALUS, EM FORMATO TRAPEZOIDAL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table:style-name="ce125" office:value-type="currency" office:currency="BRL" office:value="10000" calcext:value-type="currency">
            <text:p>R$ 10.000,00</text:p>
          </table:table-cell>
          <table:table-cell table:style-name="ce127" office:value-type="string" calcext:value-type="string">
            <text:p>ORTOSPINE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6">
          <table:table-cell table:style-name="ce79"/>
          <table:table-cell table:style-name="ce83" office:value-type="float" office:value="128" calcext:value-type="float">
            <text:p>128</text:p>
          </table:table-cell>
          <table:table-cell table:style-name="ce96" office:value-type="string" calcext:value-type="string">
            <text:p>BR3332182</text:p>
          </table:table-cell>
          <table:table-cell table:style-name="ce104" office:value-type="float" office:value="321112" calcext:value-type="float">
            <text:p>321112</text:p>
          </table:table-cell>
          <table:table-cell table:style-name="ce98" office:value-type="string" calcext:value-type="string">
            <text:p>GRUPO 15</text:p>
          </table:table-cell>
          <table:table-cell table:style-name="ce107" office:value-type="string" calcext:value-type="string">
            <text:p>KIT DE FIXADOR EXTERNO TIPO LINEAR PARA FRATURUS DO COTOVELO COM DOBRADIÇA RADIOLUCENTE QUE <text:s/>PEMITE FÁCIL IDENTIFICAÇÃO DO CENTO DE ROTAÇÃO DO COTOVELO, FLEXÃO-EXTENSÃO (ATÉ 175º) E DISTRA- <text:s/>ÇÃO MICROMÈTRICA (15MM) DA ARTICULAÇÃO; CONTÉM DISTRATOR PARA COTOVELO, UNIDADE DE MOBILIDADE <text:s/>CONTROLADA DO COTOVELO, BARRA DE FIBRA DE CARBONO DE 9 X 150MM E 12 X 200MM, CLAMPS MULTIPINOS. <text:s text:c="2"/>COM PINOS DE SCHANZ DE 6MM COM 6,0-5,0MM DE ROSCA (CÔNICO) OU DE MELHOR QUALIDADE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6">
          <table:table-cell table:style-name="ce79"/>
          <table:table-cell table:style-name="ce83" office:value-type="float" office:value="129" calcext:value-type="float">
            <text:p>129</text:p>
          </table:table-cell>
          <table:table-cell table:style-name="ce96" office:value-type="string" calcext:value-type="string">
            <text:p>BR3332191</text:p>
          </table:table-cell>
          <table:table-cell table:style-name="ce104" office:value-type="float" office:value="364504" calcext:value-type="float">
            <text:p>364504</text:p>
          </table:table-cell>
          <table:table-cell table:style-name="ce98" office:value-type="string" calcext:value-type="string">
            <text:p>GRUPO 15</text:p>
          </table:table-cell>
          <table:table-cell table:style-name="ce107" office:value-type="string" calcext:value-type="string">
            <text:p>KIT DE FIXADOR EXTERNO MONOLATERAL TIPO TRILHO ADULTO EM LIGA DE ALUMÍNIO PARA CORREÇÃO DE <text:s/>DEFORMIDADES ATRAVÉS DE ALONGAMENTO, TRANSPORTE ÓSSEO E CORREÇÕES ANGULARES; POSSUI TRILHO <text:s/>EM ALUMÍNIO DE 100 A 250MM DE COMPRIMENTO, COM CABEÇAS EM ALUMÍNIO INTERCAMBIÁVEIS ESPECÍFICOS <text:s/>SENDO; CLAMP RETO, EM T; GIRATÓRIO; EM T OFGARCHES; DE DINAMIZAÇÃO EM ANEL; ACOPLAMENTO COM <text:s text:c="2"/>ARTICULAÇÃO ESFÉRICA, ACOPLAMENTO EM DOBRADIÇA, COM PINOS DE SCHANZ DE 6MM COM 6,0-5,0MM DE <text:s text:c="2"/>ROSCA (CÔNICO) OU DE MELHOR QUALIDADE.</text:p>
          </table:table-cell>
          <table:table-cell table:style-name="ce104" office:value-type="string" calcext:value-type="string">
            <text:p>UNIDADE</text:p>
          </table:table-cell>
          <table:table-cell table:style-name="ce123" office:value-type="float" office:value="2" calcext:value-type="float">
            <text:p>2</text:p>
          </table:table-cell>
          <table:table-cell table:style-name="ce104" office:value-type="float" office:value="12" calcext:value-type="float">
            <text:p>12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6">
          <table:table-cell table:style-name="ce79"/>
          <table:table-cell table:style-name="ce83" office:value-type="float" office:value="130" calcext:value-type="float">
            <text:p>130</text:p>
          </table:table-cell>
          <table:table-cell table:style-name="ce96" office:value-type="string" calcext:value-type="string">
            <text:p>BR3332192</text:p>
          </table:table-cell>
          <table:table-cell table:style-name="ce104" office:value-type="float" office:value="335879" calcext:value-type="float">
            <text:p>335879</text:p>
          </table:table-cell>
          <table:table-cell table:style-name="ce98" office:value-type="string" calcext:value-type="string">
            <text:p>GRUPO 15</text:p>
          </table:table-cell>
          <table:table-cell table:style-name="ce107" office:value-type="string" calcext:value-type="string">
            <text:p>KIT DE FIXADOR EXTERNO MONOLATERAL TIPO TRILHO PEDIATRICO EM LIGA DE ALUMÍNIO PARA CORREÇÃO DE <text:s/>DEFORMIDADES ATRAVÉS DE ALONGAMENTO, TRANSPORTE ÓSSEO E CORREÇÕES ANGULARES; POSSUI TRILHO <text:s/>EM ALUMÍNIO DE 100 A 250MM DE COMPRIMENTO, COM CABEÇAS EM ALUMÍNIO INTERCAMBIÁVEIS ESPECÍFICOS <text:s/>SENDO; CLAMP RETO, EM T; GIRATÓRIO; EM T OFGARCHES; DE DINAMIZAÇÃO EM ANEL; ACOPLAMENTO COM <text:s text:c="2"/>ARTICULAÇÃO ESFÉRICA, ACOPLAMENTO EM DOBRADIÇA, COM PINOS DE SCHANZ DE 6MM COM 6,0-5,0MM DE <text:s text:c="2"/>ROSCA (CÔNICO) OU DE MELHOR QUALIDADE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6" calcext:value-type="float">
            <text:p>6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24">
          <table:table-cell table:style-name="ce79"/>
          <table:table-cell table:style-name="ce83" office:value-type="float" office:value="131" calcext:value-type="float">
            <text:p>131</text:p>
          </table:table-cell>
          <table:table-cell table:style-name="ce96" office:value-type="string" calcext:value-type="string">
            <text:p>BR3332193</text:p>
          </table:table-cell>
          <table:table-cell table:style-name="ce104" office:value-type="float" office:value="451807" calcext:value-type="float">
            <text:p>451807</text:p>
          </table:table-cell>
          <table:table-cell table:style-name="ce98" office:value-type="string" calcext:value-type="string">
            <text:p>GRUPO 15</text:p>
          </table:table-cell>
          <table:table-cell table:style-name="ce107" office:value-type="string" calcext:value-type="string">
            <text:p>ENXERTO DE HIDROXIAPATIA EM CUNHA BIOABSORVÍVEL, DOSPONÍVEL EM OITO DIMENSÕES OU MELHOR <text:s text:c="2"/>QUALIDADE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24" calcext:value-type="float">
            <text:p>24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24">
          <table:table-cell table:style-name="ce79"/>
          <table:table-cell table:style-name="ce83" office:value-type="float" office:value="132" calcext:value-type="float">
            <text:p>132</text:p>
          </table:table-cell>
          <table:table-cell table:style-name="ce96" office:value-type="string" calcext:value-type="string">
            <text:p>BR3332483</text:p>
          </table:table-cell>
          <table:table-cell table:style-name="ce104" office:value-type="float" office:value="443508" calcext:value-type="float">
            <text:p>443508</text:p>
          </table:table-cell>
          <table:table-cell table:style-name="ce98" office:value-type="string" calcext:value-type="string">
            <text:p>GRUPO 15</text:p>
          </table:table-cell>
          <table:table-cell table:style-name="ce107" office:value-type="string" calcext:value-type="string">
            <text:p>PINO DE SCHANZ DE 6MM COM 6,0 - 5,0 MM DE ROSCA (CÔNICO), COMPRIMENTOS DE 120-260 MM E 30-90MM DE <text:s/>COMPRIMENTO DE ROSCA OU DE MELHOR QUALIDADE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60" calcext:value-type="float">
            <text:p>6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2">
          <table:table-cell table:style-name="ce79"/>
          <table:table-cell table:style-name="ce83" office:value-type="float" office:value="133" calcext:value-type="float">
            <text:p>133</text:p>
          </table:table-cell>
          <table:table-cell table:style-name="ce96" office:value-type="string" calcext:value-type="string">
            <text:p>BR3332485</text:p>
          </table:table-cell>
          <table:table-cell table:style-name="ce104" office:value-type="float" office:value="364504" calcext:value-type="float">
            <text:p>364504</text:p>
          </table:table-cell>
          <table:table-cell table:style-name="ce98" office:value-type="string" calcext:value-type="string">
            <text:p>GRUPO 15</text:p>
          </table:table-cell>
          <table:table-cell table:style-name="ce107" office:value-type="string" calcext:value-type="string">
            <text:p>Kit de fixador externo linear em duralumínio adulto, promove compressão-distração do foco de fratura, possui kit para pino <text:s/>acessório, gerando maior força e estabilidade, clamps retos e específicos em T, para tornozelo, metafisário, para convergência, <text:s/>angulado e de duplo acoplamento ou de melhor qualidade. Compinos de Schanz de 6mm com 6,0-5,0mm de rosca (cônico) ou de <text:s text:c="2"/>melhor qualidade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10" calcext:value-type="float">
            <text:p>1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7">
          <table:table-cell table:style-name="ce79"/>
          <table:table-cell table:style-name="ce83" office:value-type="float" office:value="134" calcext:value-type="float">
            <text:p>134</text:p>
          </table:table-cell>
          <table:table-cell table:style-name="ce96" office:value-type="string" calcext:value-type="string">
            <text:p>BR3332486</text:p>
          </table:table-cell>
          <table:table-cell table:style-name="ce104" office:value-type="float" office:value="443507" calcext:value-type="float">
            <text:p>443507</text:p>
          </table:table-cell>
          <table:table-cell table:style-name="ce98" office:value-type="string" calcext:value-type="string">
            <text:p>GRUPO 15</text:p>
          </table:table-cell>
          <table:table-cell table:style-name="ce107" office:value-type="string" calcext:value-type="string">
            <text:p>Pinos de Schanz de 6 mm com 6,0-5,0mm de rosca (cônico), com recobrimento de hidroxiapatita comprimentos de 120-260mm e <text:s text:c="2"/>30-90mm de comprimento de rosca ou de melhor qualidade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60" calcext:value-type="float">
            <text:p>6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3">
          <table:table-cell table:style-name="ce79"/>
          <table:table-cell table:style-name="ce83" office:value-type="float" office:value="135" calcext:value-type="float">
            <text:p>135</text:p>
          </table:table-cell>
          <table:table-cell table:style-name="ce96" office:value-type="string" calcext:value-type="string">
            <text:p>BR3332183</text:p>
          </table:table-cell>
          <table:table-cell table:style-name="ce104" office:value-type="float" office:value="444646" calcext:value-type="float">
            <text:p>444646</text:p>
          </table:table-cell>
          <table:table-cell table:style-name="ce98" office:value-type="string" calcext:value-type="string">
            <text:p>Avulso</text:p>
          </table:table-cell>
          <table:table-cell table:style-name="ce107" office:value-type="string" calcext:value-type="string">
            <text:p>PLACA PEDIÁTRICA EM TITÂNIO, FOMATO DE OITO, IMPLANTADA NA EPÍFISE DE CRIANÇAS PARA CORRIGIR <text:s/>DEFORMIDADES AXIAIS DOS MEMBROS INFERIORES E SUPERIORES. O SEU USO VIABILIZA A CORREÇÃO DE <text:s/>DEFORMIDADES SEM A NECESSIDADE DO USO DE GESSO, FISIOTERAPIA OU OSTEOTOMIA. FUNCIONA COMO <text:s text:c="2"/>UMA BANDA DE TENSÃO, SEM INVADIR A FISE OU INIBIR O CRESCIMENTO; FIOS E PARAFUSOS CANULADO <text:s/>INCLUIDOS. INCLUI INSTRUMENTAL PARA COLOCAÇÃO OU DE MELHOR QUALIDADE. </text:p>
          </table:table-cell>
          <table:table-cell table:style-name="ce104" office:value-type="string" calcext:value-type="string">
            <text:p>UNIDADE</text:p>
          </table:table-cell>
          <table:table-cell table:style-name="ce123" office:value-type="float" office:value="2" calcext:value-type="float">
            <text:p>2</text:p>
          </table:table-cell>
          <table:table-cell table:style-name="ce104" office:value-type="float" office:value="20" calcext:value-type="float">
            <text:p>2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14">
          <table:table-cell table:style-name="ce79"/>
          <table:table-cell table:style-name="ce83" office:value-type="float" office:value="136" calcext:value-type="float">
            <text:p>136</text:p>
          </table:table-cell>
          <table:table-cell table:style-name="ce96" office:value-type="string" calcext:value-type="string">
            <text:p>BR3332190</text:p>
          </table:table-cell>
          <table:table-cell table:style-name="ce104" office:value-type="float" office:value="444206" calcext:value-type="float">
            <text:p>444206</text:p>
          </table:table-cell>
          <table:table-cell table:style-name="ce98" office:value-type="string" calcext:value-type="string">
            <text:p>Avulso</text:p>
          </table:table-cell>
          <table:table-cell table:style-name="ce107" office:value-type="string" calcext:value-type="string">
            <text:p>HASTE TELESCÓPICA PEDIÁTRICA EM AÇO INOXIDÁVEL PARA CORREÇÃO DE DEFORMIDADES DAS EXTREMIDADES <text:s text:c="2"/>POR OSTEOGÊNESE IMPERFECTA; COMPONENTE MACHO COM ANCORAGEM DISTAL E COMPONENTE FÊMEA COM <text:s text:c="2"/>CABEÇA ROSQUEADA; INCLUI FIO GUIA OU DE MELHOR QUALIDADE</text:p>
          </table:table-cell>
          <table:table-cell table:style-name="ce104" office:value-type="string" calcext:value-type="string">
            <text:p>UNIDADE</text:p>
          </table:table-cell>
          <table:table-cell table:style-name="ce123" office:value-type="float" office:value="2" calcext:value-type="float">
            <text:p>2</text:p>
          </table:table-cell>
          <table:table-cell table:style-name="ce104" office:value-type="float" office:value="10" calcext:value-type="float">
            <text:p>10</text:p>
          </table:table-cell>
          <table:table-cell table:number-columns-repeated="2" table:style-name="ce127" office:value-type="string" calcext:value-type="string">
            <text:p>FRACASSADO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6">
          <table:table-cell table:style-name="ce79"/>
          <table:table-cell table:style-name="ce83" office:value-type="float" office:value="137" calcext:value-type="float">
            <text:p>137</text:p>
          </table:table-cell>
          <table:table-cell table:style-name="ce96" office:value-type="string" calcext:value-type="string">
            <text:p>BR3332487</text:p>
          </table:table-cell>
          <table:table-cell table:style-name="ce104" office:value-type="float" office:value="321112" calcext:value-type="float">
            <text:p>321112</text:p>
          </table:table-cell>
          <table:table-cell table:style-name="ce98" office:value-type="string" calcext:value-type="string">
            <text:p>Avulso</text:p>
          </table:table-cell>
          <table:table-cell table:style-name="ce107" office:value-type="string" calcext:value-type="string">
            <text:p>Kit de fixador externo linear telescópico para correção de deformidade em valgo/varo e antecurvo/retrocurvo da tíbia, por hemicalotase <text:s/>na técnica de osteotomia de abertura gradual. Possui corpo autocentrante e instrumental para colocação ou de melhor qualidade. Possui <text:s/>kit para pino acessório, gerando maior força e estabilidade, clampsretos e específicos em T, para tornozelo, metafisário, para <text:s/>convergência, angulado e de duplo acoplamento. Com pinos de Schanz de 6mm com 6,0-5,0mm de rosca (cônico) ou de melhor <text:s/>qualidade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10" calcext:value-type="float">
            <text:p>1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24">
          <table:table-cell table:style-name="ce79"/>
          <table:table-cell table:style-name="ce83" office:value-type="float" office:value="138" calcext:value-type="float">
            <text:p>138</text:p>
          </table:table-cell>
          <table:table-cell table:style-name="ce96" office:value-type="string" calcext:value-type="string">
            <text:p>BR3321491</text:p>
          </table:table-cell>
          <table:table-cell table:style-name="ce104" office:value-type="float" office:value="475808" calcext:value-type="float">
            <text:p>475808</text:p>
          </table:table-cell>
          <table:table-cell table:style-name="ce98" office:value-type="string" calcext:value-type="string">
            <text:p>Avulso</text:p>
          </table:table-cell>
          <table:table-cell table:style-name="ce107" office:value-type="string" calcext:value-type="string">
            <text:p>CONJUNTO INSTRUMENTAL CIRURGICO PARA TRANSPLANTE OSTEOCONDRAL COLETOR E INTRODUTOR DE ENXERTO, COM BROCA, GUIA, ÊMBOLO, TROCARTE, ESTÉRIL E DESCARTÁVEL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20" calcext:value-type="float">
            <text:p>20</text:p>
          </table:table-cell>
          <table:table-cell table:style-name="ce127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22">
          <table:table-cell table:style-name="ce79"/>
          <table:table-cell table:style-name="ce83" office:value-type="float" office:value="139" calcext:value-type="float">
            <text:p>139</text:p>
          </table:table-cell>
          <table:table-cell table:style-name="ce96" office:value-type="string" calcext:value-type="string">
            <text:p>BR3321569</text:p>
          </table:table-cell>
          <table:table-cell table:style-name="ce104" office:value-type="float" office:value="440586" calcext:value-type="float">
            <text:p>440586</text:p>
          </table:table-cell>
          <table:table-cell table:style-name="ce98" office:value-type="string" calcext:value-type="string">
            <text:p>Avulso</text:p>
          </table:table-cell>
          <table:table-cell table:style-name="ce107" office:value-type="string" calcext:value-type="string">
            <text:p>ITEM 139 – Sistema de sutura e reparo meniscal, diâmetro <text:s/>de 18mm ou menor diâmetro, com ajuste de profundidade, opções de agulha <text:s text:c="2"/>nas angulações de 0 até 24 graus, implante em peek ou superior, com fios de alta resistência, descartável, apresentando no <text:s/>instrumental empurrador/cortador de nó ou de melhor qualidade. <text:s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300" calcext:value-type="float">
            <text:p>300</text:p>
          </table:table-cell>
          <table:table-cell table:style-name="ce125" office:value-type="currency" office:currency="BRL" office:value="2090" calcext:value-type="currency">
            <text:p>R$ 2.09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1">
          <table:table-cell table:style-name="ce79"/>
          <table:table-cell table:style-name="ce83" office:value-type="float" office:value="140" calcext:value-type="float">
            <text:p>140</text:p>
          </table:table-cell>
          <table:table-cell table:style-name="ce96" office:value-type="string" calcext:value-type="string">
            <text:p>BR3309589</text:p>
          </table:table-cell>
          <table:table-cell table:style-name="ce104" office:value-type="float" office:value="318814" calcext:value-type="float">
            <text:p>318814</text:p>
          </table:table-cell>
          <table:table-cell table:style-name="ce98" office:value-type="string" calcext:value-type="string">
            <text:p>Avulso</text:p>
          </table:table-cell>
          <table:table-cell table:style-name="ce107" office:value-type="string" calcext:value-type="string">
            <text:p>ITEM 140 –MALHA PARA TRAÇÃO E DISTRIBUIÇÃO DE FORÇA ENTRE OS DEDOS QUE POSSIBILITA O POSICIOSAMENTO DO <text:s text:c="2"/>PACIENTE DE ACORDO COM O PROCEDIMENTO DE PUNHO E CONTOVELO.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24" calcext:value-type="float">
            <text:p>24</text:p>
          </table:table-cell>
          <table:table-cell table:style-name="ce128" office:value-type="currency" office:currency="BRL" office:value="700" calcext:value-type="currency">
            <text:p>R$ 700,00</text:p>
          </table:table-cell>
          <table:table-cell table:style-name="ce127" office:value-type="string" calcext:value-type="string">
            <text:p>CONMED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4">
          <table:table-cell table:style-name="ce79"/>
          <table:table-cell table:style-name="ce83" office:value-type="float" office:value="141" calcext:value-type="float">
            <text:p>141</text:p>
          </table:table-cell>
          <table:table-cell table:style-name="ce96" office:value-type="float" office:value="190035371" calcext:value-type="float">
            <text:p>190035371</text:p>
          </table:table-cell>
          <table:table-cell table:style-name="ce104" office:value-type="float" office:value="443585" calcext:value-type="float">
            <text:p>443585</text:p>
          </table:table-cell>
          <table:table-cell table:style-name="ce98" office:value-type="string" calcext:value-type="string">
            <text:p>Avulso</text:p>
          </table:table-cell>
          <table:table-cell table:style-name="ce107" office:value-type="string" calcext:value-type="string">
            <text:p>FIOS DE AÇO PARA CERCLAGEM COM 0,6/0,8/1,0/1,2/1,5MM - fio ortopédico, material aço, <text:s/>para fixação ossea <text:s text:c="5"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600" calcext:value-type="float">
            <text:p>600</text:p>
          </table:table-cell>
          <table:table-cell table:style-name="ce128" office:value-type="currency" office:currency="BRL" office:value="39" calcext:value-type="currency">
            <text:p>R$ 39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32">
          <table:table-cell table:style-name="ce79"/>
          <table:table-cell table:style-name="ce83" office:value-type="float" office:value="142" calcext:value-type="float">
            <text:p>142</text:p>
          </table:table-cell>
          <table:table-cell table:style-name="ce96" office:value-type="string" calcext:value-type="string">
            <text:p>BR3325048</text:p>
          </table:table-cell>
          <table:table-cell table:style-name="ce104" office:value-type="float" office:value="435687" calcext:value-type="float">
            <text:p>435687</text:p>
          </table:table-cell>
          <table:table-cell table:style-name="ce98" office:value-type="string" calcext:value-type="string">
            <text:p>Avulso</text:p>
          </table:table-cell>
          <table:table-cell table:style-name="ce107" office:value-type="string" calcext:value-type="string">
            <text:p>SISTEMA DE RECONSTRUÇÃO LIGAMENTAR, CONTENDO 01 EQUIPO PARA BOMBA DE INFUSÃO DE ALTO FLUXO <text:s text:c="2"/>E DE CIRCULAÇÃO ASSISTIDA; 01 LAMINAS DE SHAVER DE AÇO INOXIDÁVEL, DESCATAVEL 4,5 / <text:s/>5,5 OU DE <text:s text:c="2"/>MELHOR QUALIDADE ; 01 PLACA DE FIXAÇÃO FÊMORAL ATRAVÉS DE PLACA DE TITANO, CUJO O IMPLANTE SE <text:s text:c="2"/>AJUSTE A QUALQUER TAMANHO DE TÚNEL ATRAVÉS DO ENCURTAMENTO REGULÁVEL DO MESMO E QUE <text:s text:c="2"/>PERMITA TENSIONAMENTO RESIDUAL APÓS FIXAÇÃO, OU DE MELHOR QUALIDADE; 01 SISTEMA DE PARAFUSO <text:s text:c="2"/>DE INTERFERENCIA ABSORVIVEL PLGA, BIOCOMPOSTO, TAMANHOS DE 6, 7, 8, 9, 10, 11 E 12MM DE ESPESSURA <text:s text:c="2"/>23, 28, E 35 MM DE COMPRIMENTO, USO ÚNICO. OU DE MELHOR QUALIDADE; E KIT DE FIOSGUIA DESCATAVEL. </text:p>
          </table:table-cell>
          <table:table-cell table:style-name="ce104" office:value-type="string" calcext:value-type="string">
            <text:p>CONJUNTO</text:p>
          </table:table-cell>
          <table:table-cell table:style-name="ce83" office:value-type="float" office:value="10" calcext:value-type="float">
            <text:p>10</text:p>
          </table:table-cell>
          <table:table-cell table:style-name="ce104" office:value-type="float" office:value="160" calcext:value-type="float">
            <text:p>160</text:p>
          </table:table-cell>
          <table:table-cell table:style-name="ce127"/>
          <table:table-cell table:style-name="ce127" office:value-type="string" calcext:value-type="string">
            <text:p>BIOSINTESE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17">
          <table:table-cell table:style-name="ce79"/>
          <table:table-cell table:style-name="ce83" office:value-type="float" office:value="143" calcext:value-type="float">
            <text:p>143</text:p>
          </table:table-cell>
          <table:table-cell table:style-name="ce96" office:value-type="string" calcext:value-type="string">
            <text:p>BR3157934</text:p>
          </table:table-cell>
          <table:table-cell table:style-name="ce104" office:value-type="string" calcext:value-type="string">
            <text:p>308109</text:p>
          </table:table-cell>
          <table:table-cell table:style-name="ce98" office:value-type="string" calcext:value-type="string">
            <text:p>Avulso</text:p>
          </table:table-cell>
          <table:table-cell table:style-name="ce107" office:value-type="string" calcext:value-type="string">
            <text:p>FIO DE KIRSHINER E STEIMAN, PARA FIXACAO DE OSTEOSSINTESE, TAMANHOS VARIANDO DE 0.8 MM, 1.0MM , <text:s text:c="2"/>1.25 MM, 1.6 MM, 2.0 MM, 2.5 MM, 3.0 MM, 3.5 MM, 4.0 MM, 4.5 MM, 5.0 MM, 5.5 MM E 6.0 MM ACO NÃO MAGNETICO <text:s text:c="7"/></text:p>
          </table:table-cell>
          <table:table-cell table:style-name="ce104" office:value-type="string" calcext:value-type="string">
            <text:p>UNIDADE</text:p>
          </table:table-cell>
          <table:table-cell table:style-name="ce83" office:value-type="float" office:value="100" calcext:value-type="float">
            <text:p>100</text:p>
          </table:table-cell>
          <table:table-cell table:style-name="ce104" office:value-type="float" office:value="2500" calcext:value-type="float">
            <text:p>2500</text:p>
          </table:table-cell>
          <table:table-cell table:style-name="ce128" office:value-type="currency" office:currency="BRL" office:value="39" calcext:value-type="currency">
            <text:p>R$ 39,00</text:p>
          </table:table-cell>
          <table:table-cell table:style-name="ce127" office:value-type="string" calcext:value-type="string">
            <text:p>RPM</text:p>
          </table:table-cell>
          <table:table-cell/>
          <table:table-cell table:style-name="ce132" table:number-columns-repeated="1008"/>
          <table:table-cell table:number-columns-repeated="4"/>
        </table:table-row>
        <table:table-row table:style-name="ro2">
          <table:table-cell table:style-name="ce79"/>
          <table:table-cell table:style-name="ce81" table:number-columns-repeated="4"/>
          <table:table-cell table:style-name="ce112"/>
          <table:table-cell table:style-name="ce93" table:number-columns-repeated="5"/>
          <table:table-cell/>
          <table:table-cell table:style-name="ce132" table:number-columns-repeated="1008"/>
          <table:table-cell table:number-columns-repeated="4"/>
        </table:table-row>
        <table:table-row table:style-name="ro33">
          <table:table-cell table:style-name="ce79"/>
          <table:table-cell table:style-name="ce81" table:number-columns-repeated="4"/>
          <table:table-cell table:style-name="ce113" office:value-type="string" calcext:value-type="string" table:number-columns-spanned="4" table:number-rows-spanned="1">
            <text:p>Rio de Janeiro-RJ, na data da assinatura.</text:p>
          </table:table-cell>
          <table:covered-table-cell table:number-columns-repeated="3" table:style-name="ce113"/>
          <table:table-cell table:style-name="ce93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2" table:number-rows-repeated="5">
          <table:table-cell table:style-name="ce79"/>
          <table:table-cell table:style-name="ce81" table:number-columns-repeated="4"/>
          <table:table-cell table:style-name="ce106"/>
          <table:table-cell table:style-name="ce81" table:number-columns-repeated="3"/>
          <table:table-cell table:style-name="ce93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2">
          <table:table-cell table:style-name="ce79"/>
          <table:table-cell table:style-name="ce84" table:number-columns-spanned="8" table:number-rows-spanned="1"/>
          <table:covered-table-cell table:number-columns-repeated="7" table:style-name="ce81"/>
          <table:table-cell table:style-name="ce93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2">
          <table:table-cell table:style-name="ce79"/>
          <table:table-cell table:style-name="ce85" table:number-columns-repeated="4"/>
          <table:table-cell table:style-name="ce81" office:value-type="string" calcext:value-type="string">
            <text:p>LEONARDO IRAN ACEVEDO PIRES</text:p>
          </table:table-cell>
          <table:table-cell table:style-name="ce114"/>
          <table:table-cell table:style-name="ce81"/>
          <table:table-cell table:style-name="ce86"/>
          <table:table-cell table:style-name="ce93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2">
          <table:table-cell table:style-name="ce79"/>
          <table:table-cell table:style-name="ce86" table:number-columns-repeated="4"/>
          <table:table-cell table:style-name="ce114" office:value-type="string" calcext:value-type="string">
            <text:p>Capitão de Corveta (IM)</text:p>
          </table:table-cell>
          <table:table-cell table:style-name="ce114"/>
          <table:table-cell table:style-name="ce81"/>
          <table:table-cell table:style-name="ce86"/>
          <table:table-cell table:style-name="ce93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2">
          <table:table-cell table:style-name="ce79"/>
          <table:table-cell table:style-name="ce86" table:number-columns-repeated="4"/>
          <table:table-cell table:style-name="ce114" office:value-type="string" calcext:value-type="string">
            <text:p>Encarregado da 3ª Divisão de Suprimentos</text:p>
          </table:table-cell>
          <table:table-cell table:style-name="ce114"/>
          <table:table-cell table:style-name="ce81"/>
          <table:table-cell table:style-name="ce86"/>
          <table:table-cell table:style-name="ce93" table:number-columns-repeated="2"/>
          <table:table-cell/>
          <table:table-cell table:style-name="ce132" table:number-columns-repeated="1008"/>
          <table:table-cell table:number-columns-repeated="4"/>
        </table:table-row>
        <table:table-row table:style-name="ro20">
          <table:table-cell table:style-name="ce79"/>
          <table:table-cell table:style-name="ce87" table:number-columns-repeated="8"/>
          <table:table-cell table:style-name="ce129"/>
          <table:table-cell table:style-name="ce132" table:number-columns-repeated="1010"/>
          <table:table-cell table:number-columns-repeated="4"/>
        </table:table-row>
        <table:table-row table:style-name="ro20" table:number-rows-repeated="6">
          <table:table-cell table:style-name="ce79"/>
          <table:table-cell table:style-name="ce88" table:number-columns-repeated="2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29"/>
          <table:table-cell table:style-name="ce133"/>
          <table:table-cell table:style-name="ce132" table:number-columns-repeated="1009"/>
          <table:table-cell table:number-columns-repeated="4"/>
        </table:table-row>
        <table:table-row table:style-name="ro20">
          <table:table-cell table:style-name="ce79"/>
          <table:table-cell table:style-name="ce87" table:number-columns-repeated="8"/>
          <table:table-cell table:style-name="ce129"/>
          <table:table-cell table:style-name="ce132" table:number-columns-repeated="1010"/>
          <table:table-cell table:number-columns-repeated="4"/>
        </table:table-row>
        <table:table-row table:style-name="ro20" table:number-rows-repeated="3">
          <table:table-cell table:style-name="ce79"/>
          <table:table-cell table:style-name="ce88"/>
          <table:table-cell table:style-name="ce98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29"/>
          <table:table-cell table:style-name="ce132" table:number-columns-repeated="1010"/>
          <table:table-cell table:number-columns-repeated="4"/>
        </table:table-row>
        <table:table-row table:style-name="ro20" table:number-rows-repeated="5">
          <table:table-cell/>
          <table:table-cell table:style-name="ce88"/>
          <table:table-cell table:style-name="ce98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29"/>
          <table:table-cell table:number-columns-repeated="1014"/>
        </table:table-row>
        <table:table-row table:style-name="ro20">
          <table:table-cell/>
          <table:table-cell table:style-name="ce87" table:number-columns-repeated="8"/>
          <table:table-cell table:style-name="ce130"/>
          <table:table-cell table:number-columns-repeated="1014"/>
        </table:table-row>
        <table:table-row table:style-name="ro20">
          <table:table-cell/>
          <table:table-cell table:style-name="ce88"/>
          <table:table-cell table:style-name="ce98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>
          <table:table-cell/>
          <table:table-cell table:style-name="ce88"/>
          <table:table-cell table:style-name="ce99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 table:number-rows-repeated="2">
          <table:table-cell/>
          <table:table-cell table:style-name="ce88"/>
          <table:table-cell table:style-name="ce98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>
          <table:table-cell/>
          <table:table-cell table:style-name="ce87" table:number-columns-repeated="8"/>
          <table:table-cell table:style-name="ce130"/>
          <table:table-cell table:number-columns-repeated="1014"/>
        </table:table-row>
        <table:table-row table:style-name="ro20" table:number-rows-repeated="3">
          <table:table-cell/>
          <table:table-cell table:style-name="ce88"/>
          <table:table-cell table:style-name="ce99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5"/>
          <table:table-cell table:number-columns-repeated="1013"/>
        </table:table-row>
        <table:table-row table:style-name="ro20">
          <table:table-cell/>
          <table:table-cell table:style-name="ce87" table:number-columns-repeated="8"/>
          <table:table-cell table:style-name="ce130"/>
          <table:table-cell table:number-columns-repeated="1014"/>
        </table:table-row>
        <table:table-row table:style-name="ro20" table:number-rows-repeated="13">
          <table:table-cell/>
          <table:table-cell table:style-name="ce88"/>
          <table:table-cell table:style-name="ce98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29"/>
          <table:table-cell table:number-columns-repeated="1014"/>
        </table:table-row>
        <table:table-row table:style-name="ro20">
          <table:table-cell/>
          <table:table-cell table:style-name="ce87" table:number-columns-repeated="8"/>
          <table:table-cell table:style-name="ce130"/>
          <table:table-cell table:number-columns-repeated="1014"/>
        </table:table-row>
        <table:table-row table:style-name="ro20" table:number-rows-repeated="7">
          <table:table-cell/>
          <table:table-cell table:style-name="ce88"/>
          <table:table-cell table:style-name="ce98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29"/>
          <table:table-cell table:number-columns-repeated="1014"/>
        </table:table-row>
        <table:table-row table:style-name="ro20">
          <table:table-cell/>
          <table:table-cell table:style-name="ce87" table:number-columns-repeated="8"/>
          <table:table-cell table:style-name="ce130"/>
          <table:table-cell table:number-columns-repeated="1014"/>
        </table:table-row>
        <table:table-row table:style-name="ro20" table:number-rows-repeated="7">
          <table:table-cell/>
          <table:table-cell table:style-name="ce88" table:number-columns-repeated="2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29"/>
          <table:table-cell table:number-columns-repeated="1014"/>
        </table:table-row>
        <table:table-row table:style-name="ro20">
          <table:table-cell/>
          <table:table-cell table:style-name="ce87" table:number-columns-repeated="8"/>
          <table:table-cell table:style-name="ce130"/>
          <table:table-cell table:number-columns-repeated="1014"/>
        </table:table-row>
        <table:table-row table:style-name="ro20" table:number-rows-repeated="9">
          <table:table-cell/>
          <table:table-cell table:style-name="ce88"/>
          <table:table-cell table:style-name="ce98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>
          <table:table-cell/>
          <table:table-cell table:style-name="ce87" table:number-columns-repeated="8"/>
          <table:table-cell table:style-name="ce130"/>
          <table:table-cell table:number-columns-repeated="1014"/>
        </table:table-row>
        <table:table-row table:style-name="ro20" table:number-rows-repeated="3">
          <table:table-cell/>
          <table:table-cell table:style-name="ce88" table:number-columns-repeated="2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>
          <table:table-cell/>
          <table:table-cell table:style-name="ce87" table:number-columns-repeated="8"/>
          <table:table-cell table:style-name="ce130"/>
          <table:table-cell table:number-columns-repeated="1014"/>
        </table:table-row>
        <table:table-row table:style-name="ro20">
          <table:table-cell/>
          <table:table-cell table:style-name="ce88"/>
          <table:table-cell table:style-name="ce98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>
          <table:table-cell/>
          <table:table-cell table:style-name="ce88" table:number-columns-repeated="2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>
          <table:table-cell/>
          <table:table-cell table:style-name="ce88"/>
          <table:table-cell table:style-name="ce98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>
          <table:table-cell/>
          <table:table-cell table:style-name="ce88" table:number-columns-repeated="2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 table:number-rows-repeated="3">
          <table:table-cell/>
          <table:table-cell table:style-name="ce88"/>
          <table:table-cell table:style-name="ce98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>
          <table:table-cell/>
          <table:table-cell table:style-name="ce87" table:number-columns-repeated="8"/>
          <table:table-cell table:style-name="ce130"/>
          <table:table-cell table:number-columns-repeated="1014"/>
        </table:table-row>
        <table:table-row table:style-name="ro20" table:number-rows-repeated="11">
          <table:table-cell/>
          <table:table-cell table:style-name="ce88"/>
          <table:table-cell table:style-name="ce98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29"/>
          <table:table-cell table:number-columns-repeated="1014"/>
        </table:table-row>
        <table:table-row table:style-name="ro20">
          <table:table-cell/>
          <table:table-cell table:style-name="ce87" table:number-columns-repeated="8"/>
          <table:table-cell table:style-name="ce130"/>
          <table:table-cell table:number-columns-repeated="1014"/>
        </table:table-row>
        <table:table-row table:style-name="ro20" table:number-rows-repeated="4">
          <table:table-cell/>
          <table:table-cell table:style-name="ce88"/>
          <table:table-cell table:style-name="ce99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>
          <table:table-cell/>
          <table:table-cell table:style-name="ce89" table:number-columns-repeated="8"/>
          <table:table-cell table:style-name="ce130"/>
          <table:table-cell table:number-columns-repeated="1014"/>
        </table:table-row>
        <table:table-row table:style-name="ro20">
          <table:table-cell/>
          <table:table-cell table:style-name="ce88"/>
          <table:table-cell table:style-name="ce98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>
          <table:table-cell/>
          <table:table-cell table:style-name="ce88" table:number-columns-repeated="2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>
          <table:table-cell/>
          <table:table-cell table:style-name="ce88"/>
          <table:table-cell table:style-name="ce100"/>
          <table:table-cell table:style-name="ce102"/>
          <table:table-cell table:style-name="ce98"/>
          <table:table-cell table:style-name="ce116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 table:number-rows-repeated="3">
          <table:table-cell/>
          <table:table-cell table:style-name="ce88" table:number-columns-repeated="2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>
          <table:table-cell/>
          <table:table-cell table:style-name="ce87" table:number-columns-repeated="8"/>
          <table:table-cell table:style-name="ce130"/>
          <table:table-cell table:number-columns-repeated="1014"/>
        </table:table-row>
        <table:table-row table:style-name="ro20" table:number-rows-repeated="2">
          <table:table-cell/>
          <table:table-cell table:style-name="ce88"/>
          <table:table-cell table:style-name="ce100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>
          <table:table-cell/>
          <table:table-cell table:style-name="ce89" table:number-columns-repeated="8"/>
          <table:table-cell table:style-name="ce130"/>
          <table:table-cell table:number-columns-repeated="1014"/>
        </table:table-row>
        <table:table-row table:style-name="ro20">
          <table:table-cell/>
          <table:table-cell table:style-name="ce88"/>
          <table:table-cell table:style-name="ce101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29"/>
          <table:table-cell table:style-name="Default"/>
          <table:table-cell table:number-columns-repeated="1013"/>
        </table:table-row>
        <table:table-row table:style-name="ro20">
          <table:table-cell/>
          <table:table-cell table:style-name="ce88"/>
          <table:table-cell table:style-name="ce102" table:number-columns-repeated="2"/>
          <table:table-cell table:style-name="ce98"/>
          <table:table-cell table:style-name="ce116"/>
          <table:table-cell table:style-name="ce98"/>
          <table:table-cell table:style-name="ce88" table:number-columns-repeated="2"/>
          <table:table-cell table:style-name="ce129"/>
          <table:table-cell table:style-name="Default"/>
          <table:table-cell table:number-columns-repeated="1013"/>
        </table:table-row>
        <table:table-row table:style-name="ro20" table:number-rows-repeated="4">
          <table:table-cell/>
          <table:table-cell table:style-name="ce88"/>
          <table:table-cell table:style-name="ce101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29"/>
          <table:table-cell table:number-columns-repeated="1014"/>
        </table:table-row>
        <table:table-row table:style-name="ro20">
          <table:table-cell/>
          <table:table-cell table:style-name="ce88"/>
          <table:table-cell table:style-name="ce101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>
          <table:table-cell/>
          <table:table-cell table:style-name="ce88" table:number-columns-repeated="2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29"/>
          <table:table-cell table:number-columns-repeated="1014"/>
        </table:table-row>
        <table:table-row table:style-name="ro20">
          <table:table-cell/>
          <table:table-cell table:style-name="ce88"/>
          <table:table-cell table:style-name="ce102" table:number-columns-repeated="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>
          <table:table-cell/>
          <table:table-cell table:style-name="ce88" table:number-columns-repeated="2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29"/>
          <table:table-cell table:number-columns-repeated="1014"/>
        </table:table-row>
        <table:table-row table:style-name="ro20">
          <table:table-cell/>
          <table:table-cell table:style-name="ce88"/>
          <table:table-cell table:style-name="ce101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>
          <table:table-cell/>
          <table:table-cell table:style-name="ce88"/>
          <table:table-cell table:style-name="ce101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number-columns-repeated="1014"/>
        </table:table-row>
        <table:table-row table:style-name="ro20">
          <table:table-cell/>
          <table:table-cell table:style-name="ce88" table:number-columns-repeated="2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29"/>
          <table:table-cell table:number-columns-repeated="1014"/>
        </table:table-row>
        <table:table-row table:style-name="ro20">
          <table:table-cell/>
          <table:table-cell table:style-name="ce88"/>
          <table:table-cell table:style-name="ce101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29"/>
          <table:table-cell table:number-columns-repeated="1014"/>
        </table:table-row>
        <table:table-row table:style-name="ro20">
          <table:table-cell/>
          <table:table-cell table:style-name="ce88"/>
          <table:table-cell table:style-name="ce101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>
          <table:table-cell/>
          <table:table-cell table:style-name="ce88" table:number-columns-repeated="2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>
          <table:table-cell/>
          <table:table-cell table:style-name="ce88" table:number-columns-repeated="2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number-columns-repeated="1014"/>
        </table:table-row>
        <table:table-row table:style-name="ro20">
          <table:table-cell/>
          <table:table-cell table:style-name="ce88" table:number-columns-repeated="2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>
          <table:table-cell/>
          <table:table-cell table:style-name="ce88" table:number-columns-repeated="2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29"/>
          <table:table-cell table:number-columns-repeated="1014"/>
        </table:table-row>
        <table:table-row table:style-name="ro20">
          <table:table-cell/>
          <table:table-cell table:style-name="ce88"/>
          <table:table-cell table:style-name="ce101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29"/>
          <table:table-cell table:number-columns-repeated="1014"/>
        </table:table-row>
        <table:table-row table:style-name="ro20">
          <table:table-cell/>
          <table:table-cell table:style-name="ce88"/>
          <table:table-cell table:style-name="ce102" table:number-columns-repeated="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29"/>
          <table:table-cell table:number-columns-repeated="1014"/>
        </table:table-row>
        <table:table-row table:style-name="ro20">
          <table:table-cell/>
          <table:table-cell table:style-name="ce88" table:number-columns-repeated="2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number-columns-repeated="1014"/>
        </table:table-row>
        <table:table-row table:style-name="ro20">
          <table:table-cell/>
          <table:table-cell table:style-name="ce88"/>
          <table:table-cell table:style-name="ce101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29"/>
          <table:table-cell table:number-columns-repeated="1014"/>
        </table:table-row>
        <table:table-row table:style-name="ro20" table:number-rows-repeated="2">
          <table:table-cell/>
          <table:table-cell table:style-name="ce88"/>
          <table:table-cell table:style-name="ce101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style-name="ce134"/>
          <table:table-cell table:number-columns-repeated="1013"/>
        </table:table-row>
        <table:table-row table:style-name="ro20">
          <table:table-cell/>
          <table:table-cell table:style-name="ce88"/>
          <table:table-cell table:style-name="ce101"/>
          <table:table-cell table:style-name="ce10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number-columns-repeated="1014"/>
        </table:table-row>
        <table:table-row table:style-name="ro20">
          <table:table-cell/>
          <table:table-cell table:style-name="ce88"/>
          <table:table-cell table:style-name="ce102" table:number-columns-repeated="2"/>
          <table:table-cell table:style-name="ce98"/>
          <table:table-cell table:style-name="ce115"/>
          <table:table-cell table:style-name="ce98"/>
          <table:table-cell table:style-name="ce88" table:number-columns-repeated="2"/>
          <table:table-cell table:style-name="ce130"/>
          <table:table-cell table:number-columns-repeated="1014"/>
        </table:table-row>
        <table:table-row table:style-name="ro20" table:number-rows-repeated="4">
          <table:table-cell/>
          <table:table-cell table:style-name="ce90" table:number-columns-repeated="4"/>
          <table:table-cell table:style-name="ce117"/>
          <table:table-cell table:style-name="ce90" table:number-columns-repeated="3"/>
          <table:table-cell table:style-name="ce131"/>
          <table:table-cell table:number-columns-repeated="1014"/>
        </table:table-row>
        <table:table-row table:style-name="ro20">
          <table:table-cell/>
          <table:table-cell table:style-name="ce91" table:number-columns-repeated="5"/>
          <table:table-cell table:style-name="ce120" table:number-columns-repeated="2"/>
          <table:table-cell table:style-name="ce92"/>
          <table:table-cell table:style-name="ce131"/>
          <table:table-cell table:number-columns-repeated="1014"/>
        </table:table-row>
        <table:table-row table:style-name="ro20">
          <table:table-cell/>
          <table:table-cell table:style-name="ce92"/>
          <table:table-cell table:style-name="ce103" table:number-columns-repeated="4"/>
          <table:table-cell table:style-name="ce120" table:number-columns-repeated="2"/>
          <table:table-cell table:style-name="ce124"/>
          <table:table-cell table:style-name="ce131"/>
          <table:table-cell table:number-columns-repeated="1014"/>
        </table:table-row>
        <table:table-row table:style-name="ro20">
          <table:table-cell/>
          <table:table-cell table:style-name="ce93"/>
          <table:table-cell table:style-name="ce103" table:number-columns-repeated="4"/>
          <table:table-cell table:style-name="ce120" table:number-columns-repeated="2"/>
          <table:table-cell table:style-name="ce124"/>
          <table:table-cell table:style-name="ce131"/>
          <table:table-cell table:number-columns-repeated="1014"/>
        </table:table-row>
        <table:table-row table:style-name="ro20">
          <table:table-cell/>
          <table:table-cell table:style-name="ce92"/>
          <table:table-cell table:style-name="ce103" table:number-columns-repeated="4"/>
          <table:table-cell table:style-name="ce120"/>
          <table:table-cell table:style-name="ce92"/>
          <table:table-cell table:style-name="ce124"/>
          <table:table-cell table:style-name="ce131"/>
          <table:table-cell table:number-columns-repeated="1014"/>
        </table:table-row>
        <table:table-row table:style-name="ro20" table:number-rows-repeated="4">
          <table:table-cell/>
          <table:table-cell table:style-name="ce91" table:number-columns-repeated="4"/>
          <table:table-cell table:style-name="ce118"/>
          <table:table-cell table:style-name="ce121"/>
          <table:table-cell table:style-name="ce124" table:number-columns-repeated="2"/>
          <table:table-cell table:style-name="ce131"/>
          <table:table-cell table:number-columns-repeated="1014"/>
        </table:table-row>
        <table:table-row table:style-name="ro34" table:number-rows-repeated="1048269">
          <table:table-cell table:number-columns-repeated="1024"/>
        </table:table-row>
        <table:table-row table:style-name="ro34">
          <table:table-cell table:number-columns-repeated="1024"/>
        </table:table-row>
        <calcext:conditional-formats>
          <calcext:conditional-format calcext:target-range-address="'LISTA DE MATERIAIS'.C64:'LISTA DE MATERIAIS'.C64">
            <calcext:condition calcext:apply-style-name="ConditionalStyle_4" calcext:value="duplicate" calcext:base-cell-address="'LISTA DE MATERIAIS'.C64"/>
          </calcext:conditional-format>
          <calcext:conditional-format calcext:target-range-address="'LISTA DE MATERIAIS'.F64:'LISTA DE MATERIAIS'.F64">
            <calcext:condition calcext:apply-style-name="ConditionalStyle_3" calcext:value="duplicate" calcext:base-cell-address="'LISTA DE MATERIAIS'.F64"/>
          </calcext:conditional-format>
          <calcext:conditional-format calcext:target-range-address="'LISTA DE MATERIAIS'.C9:'LISTA DE MATERIAIS'.C151">
            <calcext:condition calcext:apply-style-name="ConditionalStyle_2" calcext:value="duplicate" calcext:base-cell-address="'LISTA DE MATERIAIS'.C9"/>
          </calcext:conditional-format>
          <calcext:conditional-format calcext:target-range-address="'LISTA DE MATERIAIS'.F89:'LISTA DE MATERIAIS'.F151 'LISTA DE MATERIAIS'.F9:'LISTA DE MATERIAIS'.F86">
            <calcext:condition calcext:apply-style-name="ConditionalStyle_1" calcext:value="duplicate" calcext:base-cell-address="'LISTA DE MATERIAIS'.F9"/>
          </calcext:conditional-format>
        </calcext:conditional-formats>
      </table:table>
      <table:table table:name="Plan1" table:style-name="ta3">
        <office:forms form:automatic-focus="false" form:apply-design-mode="false"/>
        <table:table-column table:style-name="co25" table:default-cell-style-name="ce138"/>
        <table:table-column table:style-name="co26" table:default-cell-style-name="ce179"/>
        <table:table-column table:style-name="co27" table:default-cell-style-name="ce220"/>
        <table:table-column table:style-name="co28" table:default-cell-style-name="ce220"/>
        <table:table-column table:style-name="co29" table:number-columns-repeated="2" table:default-cell-style-name="ce220"/>
        <table:table-column table:style-name="co17" table:number-columns-repeated="2" table:default-cell-style-name="ce220"/>
        <table:table-column table:style-name="co30" table:default-cell-style-name="ce223"/>
        <table:table-column table:style-name="co31" table:number-columns-repeated="3" table:default-cell-style-name="ce220"/>
        <table:table-column table:style-name="co32" table:default-cell-style-name="ce220"/>
        <table:table-column table:style-name="co33" table:number-columns-repeated="245" table:default-cell-style-name="ce220"/>
        <table:table-column table:style-name="co33" table:number-columns-repeated="766" table:default-cell-style-name="ce138"/>
        <table:table-row table:style-name="ro35">
          <table:table-cell table:style-name="ce32" office:value-type="float" office:value="30" calcext:value-type="float">
            <text:p>30</text:p>
          </table:table-cell>
          <table:table-cell table:style-name="ce33" office:value-type="float" office:value="15714209" calcext:value-type="float">
            <text:p>15714209</text:p>
          </table:table-cell>
          <table:table-cell table:style-name="ce46" office:value-type="string" calcext:value-type="string">
            <text:p>ITEM 30 – EQUIPO ESPECIAL, APLICAÇÃO P/ARTROSCOPIA , VIAS DUAS VIIAS, CARACTERÍSTICAS ADICIONAIS P/BOMBA <text:s text:c="2"/>DE INFUSÃO DE ALTO FLUXO.</text:p>
          </table:table-cell>
          <table:table-cell table:style-name="ce58" office:value-type="float" office:value="2" calcext:value-type="float">
            <text:p>2</text:p>
          </table:table-cell>
          <table:table-cell table:style-name="ce221" office:value-type="float" office:value="2" calcext:value-type="float">
            <text:p>2</text:p>
          </table:table-cell>
          <table:table-cell table:style-name="ce65" office:value-type="currency" office:currency="BRL" office:value="330" calcext:value-type="currency">
            <text:p>R$ 330,00</text:p>
          </table:table-cell>
          <table:table-cell table:number-columns-repeated="1018"/>
        </table:table-row>
        <table:table-row table:style-name="ro20">
          <table:table-cell table:style-name="ce137" office:value-type="float" office:value="40" calcext:value-type="float" table:number-columns-spanned="1" table:number-rows-spanned="2">
            <text:p>40</text:p>
          </table:table-cell>
          <table:table-cell table:style-name="ce139" office:value-type="string" calcext:value-type="string" table:number-columns-spanned="1" table:number-rows-spanned="2">
            <text:p>BR3321493</text:p>
          </table:table-cell>
          <table:table-cell table:style-name="ce180" office:value-type="string" calcext:value-type="string" table:number-columns-spanned="1" table:number-rows-spanned="2">
            <text:p>ITEM 40 – SISTEMA DE PASSADOR DE FIO/SUTURA DO TIPO FIRST PASS OU SCORPION E FIOS DE ALTA RESISTÊNCIA, PARA CIRURGIA DO OMBRO.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 table:number-columns-spanned="1" table:number-rows-spanned="2">
            <text:p>2</text:p>
          </table:table-cell>
          <table:table-cell table:style-name="ce222" office:value-type="currency" office:currency="BRL" office:value="449" calcext:value-type="currency" table:number-columns-spanned="1" table:number-rows-spanned="2">
            <text:p>R$ 449,00</text:p>
          </table:table-cell>
          <table:table-cell table:number-columns-repeated="1018"/>
        </table:table-row>
        <table:table-row table:style-name="ro20">
          <table:covered-table-cell table:style-name="ce32" office:value-type="float" office:value="40" calcext:value-type="float">
            <text:p>40</text:p>
          </table:covered-table-cell>
          <table:covered-table-cell table:style-name="ce140" office:value-type="string" calcext:value-type="string">
            <text:p>BR3321493</text:p>
          </table:covered-table-cell>
          <table:covered-table-cell table:style-name="ce181" office:value-type="string" calcext:value-type="string">
            <text:p>ITEM 40 – SISTEMA DE PASSADOR DE FIO/SUTURA DO TIPO FIRST PASS OU SCORPION E FIOS DE ALTA RESISTÊNCIA, PARA CIRURGIA DO OMBRO.</text:p>
          </table:covered-table-cell>
          <table:table-cell table:style-name="ce58" office:value-type="float" office:value="1" calcext:value-type="float">
            <text:p>1</text:p>
          </table:table-cell>
          <table:covered-table-cell table:style-name="ce58"/>
          <table:covered-table-cell table:style-name="ce65" office:value-type="currency" office:currency="BRL" office:value="449" calcext:value-type="currency">
            <text:p>R$ 449,00</text:p>
          </table:covered-table-cell>
          <table:table-cell table:number-columns-repeated="1018"/>
        </table:table-row>
        <table:table-row table:style-name="ro20">
          <table:table-cell table:style-name="ce137" office:value-type="float" office:value="41" calcext:value-type="float" table:number-columns-spanned="1" table:number-rows-spanned="2">
            <text:p>41</text:p>
          </table:table-cell>
          <table:table-cell table:style-name="ce141" office:value-type="string" calcext:value-type="string" table:number-columns-spanned="1" table:number-rows-spanned="2">
            <text:p>BR3321494</text:p>
          </table:table-cell>
          <table:table-cell table:style-name="ce182" office:value-type="string" calcext:value-type="string" table:number-columns-spanned="1" table:number-rows-spanned="2">
            <text:p>ITEM 41 – SISTEMA DE LÂMINAS DE MICRODEBRIDAÇÃO DE OMBRO, PARA TECIDOS MOLES E OSSEOS , EM AÇO, CONTROLE MANUAL, <text:s text:c="2"/>PEÇA DE MÃO, PONTAS LISAS, DENTADAS E OU DUPLO DENTADAS EM DIVERSOS TAMANHOS, USO ÚNICO.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 table:number-columns-spanned="1" table:number-rows-spanned="2">
            <text:p>2</text:p>
          </table:table-cell>
          <table:table-cell table:style-name="ce222" office:value-type="currency" office:currency="BRL" office:value="375" calcext:value-type="currency" table:number-columns-spanned="1" table:number-rows-spanned="2">
            <text:p>R$ 375,00</text:p>
          </table:table-cell>
          <table:table-cell table:number-columns-repeated="1018"/>
        </table:table-row>
        <table:table-row table:style-name="ro20">
          <table:covered-table-cell table:style-name="ce32" office:value-type="float" office:value="41" calcext:value-type="float">
            <text:p>41</text:p>
          </table:covered-table-cell>
          <table:covered-table-cell table:style-name="ce142" office:value-type="string" calcext:value-type="string">
            <text:p>BR3321494</text:p>
          </table:covered-table-cell>
          <table:covered-table-cell table:style-name="ce183" office:value-type="string" calcext:value-type="string">
            <text:p>ITEM 41 – SISTEMA DE LÂMINAS DE MICRODEBRIDAÇÃO DE OMBRO, PARA TECIDOS MOLES E OSSEOS , EM AÇO, CONTROLE MANUAL, <text:s text:c="2"/>PEÇA DE MÃO, PONTAS LISAS, DENTADAS E OU DUPLO DENTADAS EM DIVERSOS TAMANHOS, USO ÚNICO.</text:p>
          </table:covered-table-cell>
          <table:table-cell table:style-name="ce58" office:value-type="float" office:value="1" calcext:value-type="float">
            <text:p>1</text:p>
          </table:table-cell>
          <table:covered-table-cell table:style-name="ce58"/>
          <table:covered-table-cell table:style-name="ce65" office:value-type="currency" office:currency="BRL" office:value="375" calcext:value-type="currency">
            <text:p>R$ 375,00</text:p>
          </table:covered-table-cell>
          <table:table-cell table:number-columns-repeated="1018"/>
        </table:table-row>
        <table:table-row table:style-name="ro36">
          <table:table-cell table:style-name="ce32" office:value-type="float" office:value="42" calcext:value-type="float">
            <text:p>42</text:p>
          </table:table-cell>
          <table:table-cell table:style-name="ce143" office:value-type="string" calcext:value-type="string">
            <text:p>BR3335667</text:p>
          </table:table-cell>
          <table:table-cell table:style-name="ce184" office:value-type="string" calcext:value-type="string">
            <text:p>ITEM 42 – SISTEMA DE FIXAÇÃO POR ANCORAGEM EM TCP/PLGA, INSTRUMENTO E TECNOLOGIA DE ROSCA <text:s/>DUPLA CANULADA PARA FIXAÇÃO CORTICAL E ESPONJOSA, PRODUTO BIOCOMPOSTO ACOMPANHADOS <text:s/>COM FIOS DE ALTARESISTENCIA PARCIALMENTE ABSORVIVEL #2, TAMANHOS 4.5 , 4.75 , 5.5 E 6.5MM, <text:s/>USO ÚNICO.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65" office:value-type="currency" office:currency="BRL" office:value="2199" calcext:value-type="currency">
            <text:p>R$ 2.199,00</text:p>
          </table:table-cell>
          <table:table-cell table:number-columns-repeated="1018"/>
        </table:table-row>
        <table:table-row table:style-name="ro36">
          <table:table-cell table:style-name="ce32" office:value-type="float" office:value="46" calcext:value-type="float">
            <text:p>46</text:p>
          </table:table-cell>
          <table:table-cell table:style-name="ce144" office:value-type="float" office:value="15714203" calcext:value-type="float">
            <text:p>15714203</text:p>
          </table:table-cell>
          <table:table-cell table:style-name="ce185" office:value-type="string" calcext:value-type="string">
            <text:p>ITEM 46 – ÂNCORA <text:s/>BIOABSORVÍVEL AB <text:s/>5.0 MM <text:s/>(ROSQUEÁVEL) ESTÉRIL PLLA, <text:s/>COM 2 FIOS DE SUTURAS, <text:s/>PARA FRESA DILATADORA COM MARCAÇÃO DE <text:s text:c="2"/>PROFUNDIDADE, GUIA DE INSTALAÇÃO <text:s text:c="2"/>E INSTRUMENTAL DE COLOCAÇÃO.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65" office:value-type="currency" office:currency="BRL" office:value="1940" calcext:value-type="currency">
            <text:p>R$ 1.940,00</text:p>
          </table:table-cell>
          <table:table-cell table:number-columns-repeated="1018"/>
        </table:table-row>
        <table:table-row table:style-name="ro20">
          <table:table-cell table:style-name="ce137" office:value-type="float" office:value="48" calcext:value-type="float" table:number-columns-spanned="1" table:number-rows-spanned="2">
            <text:p>48</text:p>
          </table:table-cell>
          <table:table-cell table:style-name="ce145" office:value-type="float" office:value="15714207" calcext:value-type="float" table:number-columns-spanned="1" table:number-rows-spanned="2">
            <text:p>15714207</text:p>
          </table:table-cell>
          <table:table-cell table:style-name="ce186" office:value-type="string" calcext:value-type="string" table:number-columns-spanned="1" table:number-rows-spanned="2">
            <text:p>ITEM 48 – SISTEMA DE CÂNULA PARA ARTROSCOPIA DE OMBRO E JOELHO COM OBTURADOR CANULADO ROSQUEADO <text:s text:c="3"/>EM TAMANHO E COMPRIMENTOS DIVERSOS, MATERIAL DESCARTÁVEL E USO ÚNICO. <text:s text:c="9"/>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 table:number-columns-spanned="1" table:number-rows-spanned="2">
            <text:p>3</text:p>
          </table:table-cell>
          <table:table-cell table:style-name="ce222" office:value-type="currency" office:currency="BRL" office:value="350" calcext:value-type="currency" table:number-columns-spanned="1" table:number-rows-spanned="2">
            <text:p>R$ 350,00</text:p>
          </table:table-cell>
          <table:table-cell table:number-columns-repeated="1018"/>
        </table:table-row>
        <table:table-row table:style-name="ro20">
          <table:covered-table-cell table:style-name="ce32" office:value-type="float" office:value="48" calcext:value-type="float">
            <text:p>48</text:p>
          </table:covered-table-cell>
          <table:covered-table-cell table:style-name="ce146" office:value-type="float" office:value="15714207" calcext:value-type="float">
            <text:p>15714207</text:p>
          </table:covered-table-cell>
          <table:covered-table-cell table:style-name="ce187" office:value-type="string" calcext:value-type="string">
            <text:p>ITEM 48 – SISTEMA DE CÂNULA PARA ARTROSCOPIA DE OMBRO E JOELHO COM OBTURADOR CANULADO ROSQUEADO <text:s text:c="3"/>EM TAMANHO E COMPRIMENTOS DIVERSOS, MATERIAL DESCARTÁVEL E USO ÚNICO. <text:s text:c="9"/></text:p>
          </table:covered-table-cell>
          <table:table-cell table:style-name="ce58" office:value-type="float" office:value="1" calcext:value-type="float">
            <text:p>1</text:p>
          </table:table-cell>
          <table:covered-table-cell table:style-name="ce58"/>
          <table:covered-table-cell table:style-name="ce65" office:value-type="currency" office:currency="BRL" office:value="350" calcext:value-type="currency">
            <text:p>R$ 350,00</text:p>
          </table:covered-table-cell>
          <table:table-cell table:number-columns-repeated="1018"/>
        </table:table-row>
        <table:table-row table:style-name="ro20">
          <table:table-cell table:style-name="ce137" office:value-type="float" office:value="49" calcext:value-type="float" table:number-columns-spanned="1" table:number-rows-spanned="2">
            <text:p>49</text:p>
          </table:table-cell>
          <table:table-cell table:style-name="ce147" office:value-type="float" office:value="15714212" calcext:value-type="float" table:number-columns-spanned="1" table:number-rows-spanned="2">
            <text:p>15714212</text:p>
          </table:table-cell>
          <table:table-cell table:style-name="ce188" office:value-type="string" calcext:value-type="string" table:number-columns-spanned="1" table:number-rows-spanned="2">
            <text:p>ITEM 49 – PONTEIRA DE RADIOFREQUÊNCIA DESCARTÁVEL 90 GRAUS.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 table:number-columns-spanned="1" table:number-rows-spanned="2">
            <text:p>2</text:p>
          </table:table-cell>
          <table:table-cell table:style-name="ce222" office:value-type="currency" office:currency="BRL" office:value="1900" calcext:value-type="currency" table:number-columns-spanned="1" table:number-rows-spanned="2">
            <text:p>R$ 1.900,00</text:p>
          </table:table-cell>
          <table:table-cell table:number-columns-repeated="1018"/>
        </table:table-row>
        <table:table-row table:style-name="ro20">
          <table:covered-table-cell table:style-name="ce32" office:value-type="float" office:value="49" calcext:value-type="float">
            <text:p>49</text:p>
          </table:covered-table-cell>
          <table:covered-table-cell table:style-name="ce148" office:value-type="float" office:value="15714212" calcext:value-type="float">
            <text:p>15714212</text:p>
          </table:covered-table-cell>
          <table:covered-table-cell table:style-name="ce189" office:value-type="string" calcext:value-type="string">
            <text:p>ITEM 49 – PONTEIRA DE RADIOFREQUÊNCIA DESCARTÁVEL 90 GRAUS.</text:p>
          </table:covered-table-cell>
          <table:table-cell table:style-name="ce58" office:value-type="float" office:value="1" calcext:value-type="float">
            <text:p>1</text:p>
          </table:table-cell>
          <table:covered-table-cell table:style-name="ce58"/>
          <table:covered-table-cell table:style-name="ce65" office:value-type="currency" office:currency="BRL" office:value="1900" calcext:value-type="currency">
            <text:p>R$ 1.900,00</text:p>
          </table:covered-table-cell>
          <table:table-cell table:number-columns-repeated="1018"/>
        </table:table-row>
        <table:table-row table:style-name="ro20">
          <table:table-cell table:style-name="ce32"/>
          <table:table-cell table:style-name="ce149"/>
          <table:table-cell table:style-name="ce190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137"/>
          <table:table-cell table:style-name="ce150"/>
          <table:table-cell table:style-name="ce191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32"/>
          <table:table-cell table:style-name="ce151"/>
          <table:table-cell table:style-name="ce192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137"/>
          <table:table-cell table:style-name="ce152"/>
          <table:table-cell table:style-name="ce193"/>
          <table:table-cell table:style-name="ce58" table:number-columns-repeated="3"/>
          <table:table-cell table:number-columns-repeated="1018"/>
        </table:table-row>
        <table:table-row table:style-name="ro20" table:number-rows-repeated="2">
          <table:table-cell table:style-name="ce32"/>
          <table:table-cell table:style-name="ce149"/>
          <table:table-cell table:style-name="ce190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137"/>
          <table:table-cell table:style-name="ce153"/>
          <table:table-cell table:style-name="ce194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32"/>
          <table:table-cell table:style-name="ce154"/>
          <table:table-cell table:style-name="ce195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137"/>
          <table:table-cell table:style-name="ce155"/>
          <table:table-cell table:style-name="ce196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32"/>
          <table:table-cell table:style-name="ce149"/>
          <table:table-cell table:style-name="ce190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32"/>
          <table:table-cell table:style-name="ce156"/>
          <table:table-cell table:style-name="ce197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32"/>
          <table:table-cell table:style-name="ce157"/>
          <table:table-cell table:style-name="ce197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137"/>
          <table:table-cell table:style-name="ce158"/>
          <table:table-cell table:style-name="ce198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32"/>
          <table:table-cell table:style-name="ce159"/>
          <table:table-cell table:style-name="ce199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137"/>
          <table:table-cell table:style-name="ce160"/>
          <table:table-cell table:style-name="ce200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32"/>
          <table:table-cell table:style-name="ce161"/>
          <table:table-cell table:style-name="ce201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137"/>
          <table:table-cell table:style-name="ce162"/>
          <table:table-cell table:style-name="ce202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32"/>
          <table:table-cell table:style-name="ce163"/>
          <table:table-cell table:style-name="ce203"/>
          <table:table-cell table:style-name="ce58" table:number-columns-repeated="3"/>
          <table:table-cell table:number-columns-repeated="1018"/>
        </table:table-row>
        <table:table-row table:style-name="ro20" table:number-rows-repeated="2">
          <table:table-cell table:style-name="ce32"/>
          <table:table-cell table:style-name="ce164"/>
          <table:table-cell table:style-name="ce204"/>
          <table:table-cell table:style-name="ce58" table:number-columns-repeated="3"/>
          <table:table-cell table:number-columns-repeated="1018"/>
        </table:table-row>
        <table:table-row table:style-name="ro37">
          <table:table-cell table:style-name="ce32"/>
          <table:table-cell table:style-name="ce149"/>
          <table:table-cell table:style-name="ce190"/>
          <table:table-cell table:style-name="ce58" table:number-columns-repeated="3"/>
          <table:table-cell table:number-columns-repeated="1018"/>
        </table:table-row>
        <table:table-row table:style-name="ro38">
          <table:table-cell table:style-name="ce137"/>
          <table:table-cell table:style-name="ce165"/>
          <table:table-cell table:style-name="ce205"/>
          <table:table-cell table:style-name="ce58" table:number-columns-repeated="3"/>
          <table:table-cell table:number-columns-repeated="1018"/>
        </table:table-row>
        <table:table-row table:style-name="ro39">
          <table:table-cell table:style-name="ce32"/>
          <table:table-cell table:style-name="ce166"/>
          <table:table-cell table:style-name="ce206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32"/>
          <table:table-cell table:style-name="ce167"/>
          <table:table-cell table:style-name="ce207"/>
          <table:table-cell table:style-name="ce58" table:number-columns-repeated="3"/>
          <table:table-cell table:number-columns-repeated="1018"/>
        </table:table-row>
        <table:table-row table:style-name="ro40">
          <table:table-cell table:style-name="ce32"/>
          <table:table-cell table:style-name="ce167"/>
          <table:table-cell table:style-name="ce207"/>
          <table:table-cell table:style-name="ce58" table:number-columns-repeated="3"/>
          <table:table-cell table:number-columns-repeated="1018"/>
        </table:table-row>
        <table:table-row table:style-name="ro41">
          <table:table-cell table:style-name="ce32"/>
          <table:table-cell table:style-name="ce33"/>
          <table:table-cell table:style-name="ce46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137"/>
          <table:table-cell table:style-name="ce168"/>
          <table:table-cell table:style-name="ce208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32"/>
          <table:table-cell table:style-name="ce33"/>
          <table:table-cell table:style-name="ce46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137"/>
          <table:table-cell table:style-name="ce169"/>
          <table:table-cell table:style-name="ce209"/>
          <table:table-cell table:style-name="ce58" table:number-columns-repeated="3"/>
          <table:table-cell table:number-columns-repeated="1018"/>
        </table:table-row>
        <table:table-row table:style-name="ro42">
          <table:table-cell table:style-name="ce32"/>
          <table:table-cell table:style-name="ce170"/>
          <table:table-cell table:style-name="ce210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32"/>
          <table:table-cell table:style-name="ce171"/>
          <table:table-cell table:style-name="ce211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137"/>
          <table:table-cell table:style-name="ce172"/>
          <table:table-cell table:style-name="ce212"/>
          <table:table-cell table:style-name="ce58" table:number-columns-repeated="3"/>
          <table:table-cell table:number-columns-repeated="1018"/>
        </table:table-row>
        <table:table-row table:style-name="ro20" table:number-rows-repeated="3">
          <table:table-cell table:style-name="ce32"/>
          <table:table-cell table:style-name="ce33"/>
          <table:table-cell table:style-name="ce46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137"/>
          <table:table-cell table:style-name="ce173"/>
          <table:table-cell table:style-name="ce213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137"/>
          <table:table-cell table:style-name="ce174"/>
          <table:table-cell table:style-name="ce214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137"/>
          <table:table-cell table:style-name="ce175"/>
          <table:table-cell table:style-name="ce215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137"/>
          <table:table-cell table:style-name="ce169"/>
          <table:table-cell table:style-name="ce216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137"/>
          <table:table-cell table:style-name="ce176"/>
          <table:table-cell table:style-name="ce217"/>
          <table:table-cell table:style-name="ce58" table:number-columns-repeated="3"/>
          <table:table-cell table:number-columns-repeated="1018"/>
        </table:table-row>
        <table:table-row table:style-name="ro43">
          <table:table-cell table:style-name="ce137"/>
          <table:table-cell table:style-name="ce169"/>
          <table:table-cell table:style-name="ce214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137"/>
          <table:table-cell table:style-name="ce177"/>
          <table:table-cell table:style-name="ce218"/>
          <table:table-cell table:style-name="ce58" table:number-columns-repeated="3"/>
          <table:table-cell table:number-columns-repeated="1018"/>
        </table:table-row>
        <table:table-row table:style-name="ro20">
          <table:table-cell table:style-name="ce137"/>
          <table:table-cell table:style-name="ce178"/>
          <table:table-cell table:style-name="ce219"/>
          <table:table-cell table:style-name="ce58" table:number-columns-repeated="3"/>
          <table:table-cell table:number-columns-repeated="1018"/>
        </table:table-row>
        <table:table-row table:style-name="ro20" table:number-rows-repeated="1048521">
          <table:table-cell table:number-columns-repeated="1024"/>
        </table:table-row>
        <table:table-row table:style-name="ro20">
          <table:table-cell table:number-columns-repeated="1024"/>
        </table:table-row>
        <calcext:conditional-formats>
          <calcext:conditional-format calcext:target-range-address="Plan1.B54:Plan1.B54">
            <calcext:condition calcext:apply-style-name="ConditionalStyle_2" calcext:value="duplicate" calcext:base-cell-address="Plan1.B54"/>
          </calcext:conditional-format>
          <calcext:conditional-format calcext:target-range-address="Plan1.B54:Plan1.B54">
            <calcext:condition calcext:apply-style-name="ConditionalStyle_2" calcext:value="duplicate" calcext:base-cell-address="Plan1.B54"/>
          </calcext:conditional-format>
          <calcext:conditional-format calcext:target-range-address="Plan1.B54:Plan1.B54">
            <calcext:condition calcext:apply-style-name="ConditionalStyle_2" calcext:value="duplicate" calcext:base-cell-address="Plan1.B54"/>
          </calcext:conditional-format>
          <calcext:conditional-format calcext:target-range-address="Plan1.B54:Plan1.B54">
            <calcext:condition calcext:apply-style-name="ConditionalStyle_2" calcext:value="duplicate" calcext:base-cell-address="Plan1.B54"/>
          </calcext:conditional-format>
          <calcext:conditional-format calcext:target-range-address="Plan1.B53:Plan1.B53">
            <calcext:condition calcext:apply-style-name="ConditionalStyle_2" calcext:value="duplicate" calcext:base-cell-address="Plan1.B53"/>
          </calcext:conditional-format>
          <calcext:conditional-format calcext:target-range-address="Plan1.B53:Plan1.B53">
            <calcext:condition calcext:apply-style-name="ConditionalStyle_2" calcext:value="duplicate" calcext:base-cell-address="Plan1.B53"/>
          </calcext:conditional-format>
          <calcext:conditional-format calcext:target-range-address="Plan1.B53:Plan1.B53">
            <calcext:condition calcext:apply-style-name="ConditionalStyle_2" calcext:value="duplicate" calcext:base-cell-address="Plan1.B53"/>
          </calcext:conditional-format>
          <calcext:conditional-format calcext:target-range-address="Plan1.B53:Plan1.B53">
            <calcext:condition calcext:apply-style-name="ConditionalStyle_2" calcext:value="duplicate" calcext:base-cell-address="Plan1.B53"/>
          </calcext:conditional-format>
          <calcext:conditional-format calcext:target-range-address="Plan1.C53:Plan1.C53">
            <calcext:condition calcext:apply-style-name="ConditionalStyle_1" calcext:value="duplicate" calcext:base-cell-address="Plan1.C53"/>
          </calcext:conditional-format>
          <calcext:conditional-format calcext:target-range-address="Plan1.B53:Plan1.B53">
            <calcext:condition calcext:apply-style-name="ConditionalStyle_2" calcext:value="duplicate" calcext:base-cell-address="Plan1.B53"/>
          </calcext:conditional-format>
          <calcext:conditional-format calcext:target-range-address="Plan1.B53:Plan1.B53">
            <calcext:condition calcext:apply-style-name="ConditionalStyle_2" calcext:value="duplicate" calcext:base-cell-address="Plan1.B53"/>
          </calcext:conditional-format>
          <calcext:conditional-format calcext:target-range-address="Plan1.B53:Plan1.B53">
            <calcext:condition calcext:apply-style-name="ConditionalStyle_2" calcext:value="duplicate" calcext:base-cell-address="Plan1.B53"/>
          </calcext:conditional-format>
          <calcext:conditional-format calcext:target-range-address="Plan1.B53:Plan1.B53">
            <calcext:condition calcext:apply-style-name="ConditionalStyle_2" calcext:value="duplicate" calcext:base-cell-address="Plan1.B53"/>
          </calcext:conditional-format>
          <calcext:conditional-format calcext:target-range-address="Plan1.C53:Plan1.C53">
            <calcext:condition calcext:apply-style-name="ConditionalStyle_1" calcext:value="duplicate" calcext:base-cell-address="Plan1.C53"/>
          </calcext:conditional-format>
          <calcext:conditional-format calcext:target-range-address="Plan1.B53:Plan1.B53">
            <calcext:condition calcext:apply-style-name="ConditionalStyle_2" calcext:value="duplicate" calcext:base-cell-address="Plan1.B53"/>
          </calcext:conditional-format>
          <calcext:conditional-format calcext:target-range-address="Plan1.C53:Plan1.C53">
            <calcext:condition calcext:apply-style-name="ConditionalStyle_1" calcext:value="duplicate" calcext:base-cell-address="Plan1.C53"/>
          </calcext:conditional-format>
          <calcext:conditional-format calcext:target-range-address="Plan1.B53:Plan1.B53">
            <calcext:condition calcext:apply-style-name="ConditionalStyle_2" calcext:value="duplicate" calcext:base-cell-address="Plan1.B53"/>
          </calcext:conditional-format>
          <calcext:conditional-format calcext:target-range-address="Plan1.C53:Plan1.C53">
            <calcext:condition calcext:apply-style-name="ConditionalStyle_1" calcext:value="duplicate" calcext:base-cell-address="Plan1.C53"/>
          </calcext:conditional-format>
          <calcext:conditional-format calcext:target-range-address="Plan1.B53:Plan1.B53">
            <calcext:condition calcext:apply-style-name="ConditionalStyle_2" calcext:value="duplicate" calcext:base-cell-address="Plan1.B53"/>
          </calcext:conditional-format>
          <calcext:conditional-format calcext:target-range-address="Plan1.C53:Plan1.C53">
            <calcext:condition calcext:apply-style-name="ConditionalStyle_1" calcext:value="duplicate" calcext:base-cell-address="Plan1.C53"/>
          </calcext:conditional-format>
          <calcext:conditional-format calcext:target-range-address="Plan1.B53:Plan1.B53">
            <calcext:condition calcext:apply-style-name="ConditionalStyle_2" calcext:value="duplicate" calcext:base-cell-address="Plan1.B53"/>
          </calcext:conditional-format>
          <calcext:conditional-format calcext:target-range-address="Plan1.C53:Plan1.C53">
            <calcext:condition calcext:apply-style-name="ConditionalStyle_1" calcext:value="duplicate" calcext:base-cell-address="Plan1.C53"/>
          </calcext:conditional-format>
          <calcext:conditional-format calcext:target-range-address="Plan1.B53:Plan1.B53">
            <calcext:condition calcext:apply-style-name="ConditionalStyle_2" calcext:value="duplicate" calcext:base-cell-address="Plan1.B53"/>
          </calcext:conditional-format>
          <calcext:conditional-format calcext:target-range-address="Plan1.C53:Plan1.C53">
            <calcext:condition calcext:apply-style-name="ConditionalStyle_1" calcext:value="duplicate" calcext:base-cell-address="Plan1.C53"/>
          </calcext:conditional-format>
          <calcext:conditional-format calcext:target-range-address="Plan1.B53:Plan1.B53">
            <calcext:condition calcext:apply-style-name="ConditionalStyle_2" calcext:value="duplicate" calcext:base-cell-address="Plan1.B53"/>
          </calcext:conditional-format>
          <calcext:conditional-format calcext:target-range-address="Plan1.C53:Plan1.C53">
            <calcext:condition calcext:apply-style-name="ConditionalStyle_1" calcext:value="duplicate" calcext:base-cell-address="Plan1.C53"/>
          </calcext:conditional-format>
          <calcext:conditional-format calcext:target-range-address="Plan1.B53:Plan1.B53">
            <calcext:condition calcext:apply-style-name="ConditionalStyle_2" calcext:value="duplicate" calcext:base-cell-address="Plan1.B53"/>
          </calcext:conditional-format>
          <calcext:conditional-format calcext:target-range-address="Plan1.C53:Plan1.C53">
            <calcext:condition calcext:apply-style-name="ConditionalStyle_1" calcext:value="duplicate" calcext:base-cell-address="Plan1.C53"/>
          </calcext:conditional-format>
          <calcext:conditional-format calcext:target-range-address="Plan1.B53:Plan1.B53">
            <calcext:condition calcext:apply-style-name="ConditionalStyle_2" calcext:value="duplicate" calcext:base-cell-address="Plan1.B53"/>
          </calcext:conditional-format>
          <calcext:conditional-format calcext:target-range-address="Plan1.C53:Plan1.C53">
            <calcext:condition calcext:apply-style-name="ConditionalStyle_1" calcext:value="duplicate" calcext:base-cell-address="Plan1.C53"/>
          </calcext:conditional-format>
          <calcext:conditional-format calcext:target-range-address="Plan1.B53:Plan1.B53">
            <calcext:condition calcext:apply-style-name="ConditionalStyle_2" calcext:value="duplicate" calcext:base-cell-address="Plan1.B53"/>
          </calcext:conditional-format>
          <calcext:conditional-format calcext:target-range-address="Plan1.C53:Plan1.C53">
            <calcext:condition calcext:apply-style-name="ConditionalStyle_1" calcext:value="duplicate" calcext:base-cell-address="Plan1.C53"/>
          </calcext:conditional-format>
          <calcext:conditional-format calcext:target-range-address="Plan1.B53:Plan1.B53">
            <calcext:condition calcext:apply-style-name="ConditionalStyle_2" calcext:value="duplicate" calcext:base-cell-address="Plan1.B53"/>
          </calcext:conditional-format>
          <calcext:conditional-format calcext:target-range-address="Plan1.C53:Plan1.C53">
            <calcext:condition calcext:apply-style-name="ConditionalStyle_1" calcext:value="duplicate" calcext:base-cell-address="Plan1.C53"/>
          </calcext:conditional-format>
          <calcext:conditional-format calcext:target-range-address="Plan1.C54:Plan1.C54">
            <calcext:condition calcext:apply-style-name="ConditionalStyle_1" calcext:value="duplicate" calcext:base-cell-address="Plan1.C54"/>
          </calcext:conditional-format>
          <calcext:conditional-format calcext:target-range-address="Plan1.B47:Plan1.B47 Plan1.B51:Plan1.B51">
            <calcext:condition calcext:apply-style-name="ConditionalStyle_2" calcext:value="duplicate" calcext:base-cell-address="Plan1.B47"/>
          </calcext:conditional-format>
          <calcext:conditional-format calcext:target-range-address="Plan1.B47:Plan1.B47 Plan1.B51:Plan1.B51">
            <calcext:condition calcext:apply-style-name="ConditionalStyle_2" calcext:value="duplicate" calcext:base-cell-address="Plan1.B47"/>
          </calcext:conditional-format>
          <calcext:conditional-format calcext:target-range-address="Plan1.B47:Plan1.B47 Plan1.B51:Plan1.B51">
            <calcext:condition calcext:apply-style-name="ConditionalStyle_2" calcext:value="duplicate" calcext:base-cell-address="Plan1.B47"/>
          </calcext:conditional-format>
          <calcext:conditional-format calcext:target-range-address="Plan1.B47:Plan1.B47 Plan1.B51:Plan1.B51">
            <calcext:condition calcext:apply-style-name="ConditionalStyle_2" calcext:value="duplicate" calcext:base-cell-address="Plan1.B47"/>
          </calcext:conditional-format>
          <calcext:conditional-format calcext:target-range-address="Plan1.C47:Plan1.C47 Plan1.C51:Plan1.C51">
            <calcext:condition calcext:apply-style-name="ConditionalStyle_1" calcext:value="duplicate" calcext:base-cell-address="Plan1.C47"/>
          </calcext:conditional-format>
          <calcext:conditional-format calcext:target-range-address="Plan1.B47:Plan1.B47">
            <calcext:condition calcext:apply-style-name="ConditionalStyle_2" calcext:value="duplicate" calcext:base-cell-address="Plan1.B47"/>
          </calcext:conditional-format>
          <calcext:conditional-format calcext:target-range-address="Plan1.C47:Plan1.C47">
            <calcext:condition calcext:apply-style-name="ConditionalStyle_1" calcext:value="duplicate" calcext:base-cell-address="Plan1.C47"/>
          </calcext:conditional-format>
          <calcext:conditional-format calcext:target-range-address="Plan1.B47:Plan1.B47">
            <calcext:condition calcext:apply-style-name="ConditionalStyle_2" calcext:value="duplicate" calcext:base-cell-address="Plan1.B47"/>
          </calcext:conditional-format>
          <calcext:conditional-format calcext:target-range-address="Plan1.C47:Plan1.C47">
            <calcext:condition calcext:apply-style-name="ConditionalStyle_1" calcext:value="duplicate" calcext:base-cell-address="Plan1.C47"/>
          </calcext:conditional-format>
          <calcext:conditional-format calcext:target-range-address="Plan1.B47:Plan1.B47">
            <calcext:condition calcext:apply-style-name="ConditionalStyle_2" calcext:value="duplicate" calcext:base-cell-address="Plan1.B47"/>
          </calcext:conditional-format>
          <calcext:conditional-format calcext:target-range-address="Plan1.C47:Plan1.C47">
            <calcext:condition calcext:apply-style-name="ConditionalStyle_1" calcext:value="duplicate" calcext:base-cell-address="Plan1.C47"/>
          </calcext:conditional-format>
          <calcext:conditional-format calcext:target-range-address="Plan1.B47:Plan1.B47">
            <calcext:condition calcext:apply-style-name="ConditionalStyle_2" calcext:value="duplicate" calcext:base-cell-address="Plan1.B47"/>
          </calcext:conditional-format>
          <calcext:conditional-format calcext:target-range-address="Plan1.C47:Plan1.C47">
            <calcext:condition calcext:apply-style-name="ConditionalStyle_1" calcext:value="duplicate" calcext:base-cell-address="Plan1.C47"/>
          </calcext:conditional-format>
          <calcext:conditional-format calcext:target-range-address="Plan1.B47:Plan1.B47">
            <calcext:condition calcext:apply-style-name="ConditionalStyle_2" calcext:value="duplicate" calcext:base-cell-address="Plan1.B47"/>
          </calcext:conditional-format>
          <calcext:conditional-format calcext:target-range-address="Plan1.C47:Plan1.C47">
            <calcext:condition calcext:apply-style-name="ConditionalStyle_1" calcext:value="duplicate" calcext:base-cell-address="Plan1.C47"/>
          </calcext:conditional-format>
          <calcext:conditional-format calcext:target-range-address="Plan1.B47:Plan1.B47">
            <calcext:condition calcext:apply-style-name="ConditionalStyle_2" calcext:value="duplicate" calcext:base-cell-address="Plan1.B47"/>
          </calcext:conditional-format>
          <calcext:conditional-format calcext:target-range-address="Plan1.C47:Plan1.C47">
            <calcext:condition calcext:apply-style-name="ConditionalStyle_1" calcext:value="duplicate" calcext:base-cell-address="Plan1.C47"/>
          </calcext:conditional-format>
          <calcext:conditional-format calcext:target-range-address="Plan1.B47:Plan1.B47">
            <calcext:condition calcext:apply-style-name="ConditionalStyle_2" calcext:value="duplicate" calcext:base-cell-address="Plan1.B47"/>
          </calcext:conditional-format>
          <calcext:conditional-format calcext:target-range-address="Plan1.C47:Plan1.C47">
            <calcext:condition calcext:apply-style-name="ConditionalStyle_1" calcext:value="duplicate" calcext:base-cell-address="Plan1.C47"/>
          </calcext:conditional-format>
          <calcext:conditional-format calcext:target-range-address="Plan1.B47:Plan1.B47">
            <calcext:condition calcext:apply-style-name="ConditionalStyle_2" calcext:value="duplicate" calcext:base-cell-address="Plan1.B47"/>
          </calcext:conditional-format>
          <calcext:conditional-format calcext:target-range-address="Plan1.C47:Plan1.C47">
            <calcext:condition calcext:apply-style-name="ConditionalStyle_1" calcext:value="duplicate" calcext:base-cell-address="Plan1.C47"/>
          </calcext:conditional-format>
          <calcext:conditional-format calcext:target-range-address="Plan1.B47:Plan1.B47">
            <calcext:condition calcext:apply-style-name="ConditionalStyle_2" calcext:value="duplicate" calcext:base-cell-address="Plan1.B47"/>
          </calcext:conditional-format>
          <calcext:conditional-format calcext:target-range-address="Plan1.C47:Plan1.C47">
            <calcext:condition calcext:apply-style-name="ConditionalStyle_1" calcext:value="duplicate" calcext:base-cell-address="Plan1.C47"/>
          </calcext:conditional-format>
          <calcext:conditional-format calcext:target-range-address="Plan1.B47:Plan1.B47">
            <calcext:condition calcext:apply-style-name="ConditionalStyle_2" calcext:value="duplicate" calcext:base-cell-address="Plan1.B47"/>
          </calcext:conditional-format>
          <calcext:conditional-format calcext:target-range-address="Plan1.C47:Plan1.C47">
            <calcext:condition calcext:apply-style-name="ConditionalStyle_1" calcext:value="duplicate" calcext:base-cell-address="Plan1.C47"/>
          </calcext:conditional-format>
          <calcext:conditional-format calcext:target-range-address="Plan1.B49:Plan1.B49">
            <calcext:condition calcext:apply-style-name="ConditionalStyle_2" calcext:value="duplicate" calcext:base-cell-address="Plan1.B49"/>
          </calcext:conditional-format>
          <calcext:conditional-format calcext:target-range-address="Plan1.B49:Plan1.B49">
            <calcext:condition calcext:apply-style-name="ConditionalStyle_2" calcext:value="duplicate" calcext:base-cell-address="Plan1.B49"/>
          </calcext:conditional-format>
          <calcext:conditional-format calcext:target-range-address="Plan1.B49:Plan1.B49">
            <calcext:condition calcext:apply-style-name="ConditionalStyle_2" calcext:value="duplicate" calcext:base-cell-address="Plan1.B49"/>
          </calcext:conditional-format>
          <calcext:conditional-format calcext:target-range-address="Plan1.B49:Plan1.B49">
            <calcext:condition calcext:apply-style-name="ConditionalStyle_2" calcext:value="duplicate" calcext:base-cell-address="Plan1.B49"/>
          </calcext:conditional-format>
          <calcext:conditional-format calcext:target-range-address="Plan1.C49:Plan1.C49">
            <calcext:condition calcext:apply-style-name="ConditionalStyle_1" calcext:value="duplicate" calcext:base-cell-address="Plan1.C49"/>
          </calcext:conditional-format>
          <calcext:conditional-format calcext:target-range-address="Plan1.B49:Plan1.B49">
            <calcext:condition calcext:apply-style-name="ConditionalStyle_2" calcext:value="duplicate" calcext:base-cell-address="Plan1.B49"/>
          </calcext:conditional-format>
          <calcext:conditional-format calcext:target-range-address="Plan1.C49:Plan1.C49">
            <calcext:condition calcext:apply-style-name="ConditionalStyle_1" calcext:value="duplicate" calcext:base-cell-address="Plan1.C49"/>
          </calcext:conditional-format>
          <calcext:conditional-format calcext:target-range-address="Plan1.B49:Plan1.B49">
            <calcext:condition calcext:apply-style-name="ConditionalStyle_2" calcext:value="duplicate" calcext:base-cell-address="Plan1.B49"/>
          </calcext:conditional-format>
          <calcext:conditional-format calcext:target-range-address="Plan1.C49:Plan1.C49">
            <calcext:condition calcext:apply-style-name="ConditionalStyle_1" calcext:value="duplicate" calcext:base-cell-address="Plan1.C49"/>
          </calcext:conditional-format>
          <calcext:conditional-format calcext:target-range-address="Plan1.B49:Plan1.B49">
            <calcext:condition calcext:apply-style-name="ConditionalStyle_2" calcext:value="duplicate" calcext:base-cell-address="Plan1.B49"/>
          </calcext:conditional-format>
          <calcext:conditional-format calcext:target-range-address="Plan1.C49:Plan1.C49">
            <calcext:condition calcext:apply-style-name="ConditionalStyle_1" calcext:value="duplicate" calcext:base-cell-address="Plan1.C49"/>
          </calcext:conditional-format>
          <calcext:conditional-format calcext:target-range-address="Plan1.B49:Plan1.B49">
            <calcext:condition calcext:apply-style-name="ConditionalStyle_2" calcext:value="duplicate" calcext:base-cell-address="Plan1.B49"/>
          </calcext:conditional-format>
          <calcext:conditional-format calcext:target-range-address="Plan1.C49:Plan1.C49">
            <calcext:condition calcext:apply-style-name="ConditionalStyle_1" calcext:value="duplicate" calcext:base-cell-address="Plan1.C49"/>
          </calcext:conditional-format>
          <calcext:conditional-format calcext:target-range-address="Plan1.B49:Plan1.B49">
            <calcext:condition calcext:apply-style-name="ConditionalStyle_2" calcext:value="duplicate" calcext:base-cell-address="Plan1.B49"/>
          </calcext:conditional-format>
          <calcext:conditional-format calcext:target-range-address="Plan1.C49:Plan1.C49">
            <calcext:condition calcext:apply-style-name="ConditionalStyle_1" calcext:value="duplicate" calcext:base-cell-address="Plan1.C49"/>
          </calcext:conditional-format>
          <calcext:conditional-format calcext:target-range-address="Plan1.B49:Plan1.B49">
            <calcext:condition calcext:apply-style-name="ConditionalStyle_2" calcext:value="duplicate" calcext:base-cell-address="Plan1.B49"/>
          </calcext:conditional-format>
          <calcext:conditional-format calcext:target-range-address="Plan1.C49:Plan1.C49">
            <calcext:condition calcext:apply-style-name="ConditionalStyle_1" calcext:value="duplicate" calcext:base-cell-address="Plan1.C49"/>
          </calcext:conditional-format>
          <calcext:conditional-format calcext:target-range-address="Plan1.B49:Plan1.B49">
            <calcext:condition calcext:apply-style-name="ConditionalStyle_2" calcext:value="duplicate" calcext:base-cell-address="Plan1.B49"/>
          </calcext:conditional-format>
          <calcext:conditional-format calcext:target-range-address="Plan1.C49:Plan1.C49">
            <calcext:condition calcext:apply-style-name="ConditionalStyle_1" calcext:value="duplicate" calcext:base-cell-address="Plan1.C49"/>
          </calcext:conditional-format>
          <calcext:conditional-format calcext:target-range-address="Plan1.B49:Plan1.B49">
            <calcext:condition calcext:apply-style-name="ConditionalStyle_2" calcext:value="duplicate" calcext:base-cell-address="Plan1.B49"/>
          </calcext:conditional-format>
          <calcext:conditional-format calcext:target-range-address="Plan1.C49:Plan1.C49">
            <calcext:condition calcext:apply-style-name="ConditionalStyle_1" calcext:value="duplicate" calcext:base-cell-address="Plan1.C49"/>
          </calcext:conditional-format>
          <calcext:conditional-format calcext:target-range-address="Plan1.B49:Plan1.B49">
            <calcext:condition calcext:apply-style-name="ConditionalStyle_2" calcext:value="duplicate" calcext:base-cell-address="Plan1.B49"/>
          </calcext:conditional-format>
          <calcext:conditional-format calcext:target-range-address="Plan1.C49:Plan1.C49">
            <calcext:condition calcext:apply-style-name="ConditionalStyle_1" calcext:value="duplicate" calcext:base-cell-address="Plan1.C49"/>
          </calcext:conditional-format>
          <calcext:conditional-format calcext:target-range-address="Plan1.B49:Plan1.B49">
            <calcext:condition calcext:apply-style-name="ConditionalStyle_2" calcext:value="duplicate" calcext:base-cell-address="Plan1.B49"/>
          </calcext:conditional-format>
          <calcext:conditional-format calcext:target-range-address="Plan1.C49:Plan1.C49">
            <calcext:condition calcext:apply-style-name="ConditionalStyle_1" calcext:value="duplicate" calcext:base-cell-address="Plan1.C49"/>
          </calcext:conditional-format>
          <calcext:conditional-format calcext:target-range-address="Plan1.B51:Plan1.B51">
            <calcext:condition calcext:apply-style-name="ConditionalStyle_2" calcext:value="duplicate" calcext:base-cell-address="Plan1.B51"/>
          </calcext:conditional-format>
          <calcext:conditional-format calcext:target-range-address="Plan1.B51:Plan1.B51">
            <calcext:condition calcext:apply-style-name="ConditionalStyle_2" calcext:value="duplicate" calcext:base-cell-address="Plan1.B51"/>
          </calcext:conditional-format>
          <calcext:conditional-format calcext:target-range-address="Plan1.B51:Plan1.B51">
            <calcext:condition calcext:apply-style-name="ConditionalStyle_2" calcext:value="duplicate" calcext:base-cell-address="Plan1.B51"/>
          </calcext:conditional-format>
          <calcext:conditional-format calcext:target-range-address="Plan1.B51:Plan1.B51">
            <calcext:condition calcext:apply-style-name="ConditionalStyle_2" calcext:value="duplicate" calcext:base-cell-address="Plan1.B51"/>
          </calcext:conditional-format>
          <calcext:conditional-format calcext:target-range-address="Plan1.C51:Plan1.C51">
            <calcext:condition calcext:apply-style-name="ConditionalStyle_1" calcext:value="duplicate" calcext:base-cell-address="Plan1.C51"/>
          </calcext:conditional-format>
          <calcext:conditional-format calcext:target-range-address="Plan1.B51:Plan1.B51">
            <calcext:condition calcext:apply-style-name="ConditionalStyle_2" calcext:value="duplicate" calcext:base-cell-address="Plan1.B51"/>
          </calcext:conditional-format>
          <calcext:conditional-format calcext:target-range-address="Plan1.C51:Plan1.C51">
            <calcext:condition calcext:apply-style-name="ConditionalStyle_1" calcext:value="duplicate" calcext:base-cell-address="Plan1.C51"/>
          </calcext:conditional-format>
          <calcext:conditional-format calcext:target-range-address="Plan1.B51:Plan1.B51">
            <calcext:condition calcext:apply-style-name="ConditionalStyle_2" calcext:value="duplicate" calcext:base-cell-address="Plan1.B51"/>
          </calcext:conditional-format>
          <calcext:conditional-format calcext:target-range-address="Plan1.C51:Plan1.C51">
            <calcext:condition calcext:apply-style-name="ConditionalStyle_1" calcext:value="duplicate" calcext:base-cell-address="Plan1.C51"/>
          </calcext:conditional-format>
          <calcext:conditional-format calcext:target-range-address="Plan1.B51:Plan1.B51">
            <calcext:condition calcext:apply-style-name="ConditionalStyle_2" calcext:value="duplicate" calcext:base-cell-address="Plan1.B51"/>
          </calcext:conditional-format>
          <calcext:conditional-format calcext:target-range-address="Plan1.C51:Plan1.C51">
            <calcext:condition calcext:apply-style-name="ConditionalStyle_1" calcext:value="duplicate" calcext:base-cell-address="Plan1.C51"/>
          </calcext:conditional-format>
          <calcext:conditional-format calcext:target-range-address="Plan1.B51:Plan1.B51">
            <calcext:condition calcext:apply-style-name="ConditionalStyle_2" calcext:value="duplicate" calcext:base-cell-address="Plan1.B51"/>
          </calcext:conditional-format>
          <calcext:conditional-format calcext:target-range-address="Plan1.C51:Plan1.C51">
            <calcext:condition calcext:apply-style-name="ConditionalStyle_1" calcext:value="duplicate" calcext:base-cell-address="Plan1.C51"/>
          </calcext:conditional-format>
          <calcext:conditional-format calcext:target-range-address="Plan1.B51:Plan1.B51">
            <calcext:condition calcext:apply-style-name="ConditionalStyle_2" calcext:value="duplicate" calcext:base-cell-address="Plan1.B51"/>
          </calcext:conditional-format>
          <calcext:conditional-format calcext:target-range-address="Plan1.C51:Plan1.C51">
            <calcext:condition calcext:apply-style-name="ConditionalStyle_1" calcext:value="duplicate" calcext:base-cell-address="Plan1.C51"/>
          </calcext:conditional-format>
          <calcext:conditional-format calcext:target-range-address="Plan1.B51:Plan1.B51">
            <calcext:condition calcext:apply-style-name="ConditionalStyle_2" calcext:value="duplicate" calcext:base-cell-address="Plan1.B51"/>
          </calcext:conditional-format>
          <calcext:conditional-format calcext:target-range-address="Plan1.C51:Plan1.C51">
            <calcext:condition calcext:apply-style-name="ConditionalStyle_1" calcext:value="duplicate" calcext:base-cell-address="Plan1.C51"/>
          </calcext:conditional-format>
          <calcext:conditional-format calcext:target-range-address="Plan1.B51:Plan1.B51">
            <calcext:condition calcext:apply-style-name="ConditionalStyle_2" calcext:value="duplicate" calcext:base-cell-address="Plan1.B51"/>
          </calcext:conditional-format>
          <calcext:conditional-format calcext:target-range-address="Plan1.C51:Plan1.C51">
            <calcext:condition calcext:apply-style-name="ConditionalStyle_1" calcext:value="duplicate" calcext:base-cell-address="Plan1.C51"/>
          </calcext:conditional-format>
          <calcext:conditional-format calcext:target-range-address="Plan1.B51:Plan1.B51">
            <calcext:condition calcext:apply-style-name="ConditionalStyle_2" calcext:value="duplicate" calcext:base-cell-address="Plan1.B51"/>
          </calcext:conditional-format>
          <calcext:conditional-format calcext:target-range-address="Plan1.C51:Plan1.C51">
            <calcext:condition calcext:apply-style-name="ConditionalStyle_1" calcext:value="duplicate" calcext:base-cell-address="Plan1.C51"/>
          </calcext:conditional-format>
          <calcext:conditional-format calcext:target-range-address="Plan1.B51:Plan1.B51">
            <calcext:condition calcext:apply-style-name="ConditionalStyle_2" calcext:value="duplicate" calcext:base-cell-address="Plan1.B51"/>
          </calcext:conditional-format>
          <calcext:conditional-format calcext:target-range-address="Plan1.C51:Plan1.C51">
            <calcext:condition calcext:apply-style-name="ConditionalStyle_1" calcext:value="duplicate" calcext:base-cell-address="Plan1.C51"/>
          </calcext:conditional-format>
          <calcext:conditional-format calcext:target-range-address="Plan1.B51:Plan1.B51">
            <calcext:condition calcext:apply-style-name="ConditionalStyle_2" calcext:value="duplicate" calcext:base-cell-address="Plan1.B51"/>
          </calcext:conditional-format>
          <calcext:conditional-format calcext:target-range-address="Plan1.C51:Plan1.C51">
            <calcext:condition calcext:apply-style-name="ConditionalStyle_1" calcext:value="duplicate" calcext:base-cell-address="Plan1.C51"/>
          </calcext:conditional-format>
          <calcext:conditional-format calcext:target-range-address="Plan1.B41:Plan1.B43">
            <calcext:condition calcext:apply-style-name="ConditionalStyle_2" calcext:value="duplicate" calcext:base-cell-address="Plan1.B41"/>
          </calcext:conditional-format>
          <calcext:conditional-format calcext:target-range-address="Plan1.B41:Plan1.B43">
            <calcext:condition calcext:apply-style-name="ConditionalStyle_2" calcext:value="duplicate" calcext:base-cell-address="Plan1.B41"/>
          </calcext:conditional-format>
          <calcext:conditional-format calcext:target-range-address="Plan1.B41:Plan1.B43">
            <calcext:condition calcext:apply-style-name="ConditionalStyle_2" calcext:value="duplicate" calcext:base-cell-address="Plan1.B41"/>
          </calcext:conditional-format>
          <calcext:conditional-format calcext:target-range-address="Plan1.B41:Plan1.B43">
            <calcext:condition calcext:apply-style-name="ConditionalStyle_2" calcext:value="duplicate" calcext:base-cell-address="Plan1.B41"/>
          </calcext:conditional-format>
          <calcext:conditional-format calcext:target-range-address="Plan1.C41:Plan1.C43">
            <calcext:condition calcext:apply-style-name="ConditionalStyle_1" calcext:value="duplicate" calcext:base-cell-address="Plan1.C41"/>
          </calcext:conditional-format>
          <calcext:conditional-format calcext:target-range-address="Plan1.B41:Plan1.B43">
            <calcext:condition calcext:apply-style-name="ConditionalStyle_2" calcext:value="duplicate" calcext:base-cell-address="Plan1.B41"/>
          </calcext:conditional-format>
          <calcext:conditional-format calcext:target-range-address="Plan1.B41:Plan1.B43">
            <calcext:condition calcext:apply-style-name="ConditionalStyle_2" calcext:value="duplicate" calcext:base-cell-address="Plan1.B41"/>
          </calcext:conditional-format>
          <calcext:conditional-format calcext:target-range-address="Plan1.B41:Plan1.B43">
            <calcext:condition calcext:apply-style-name="ConditionalStyle_2" calcext:value="duplicate" calcext:base-cell-address="Plan1.B41"/>
          </calcext:conditional-format>
          <calcext:conditional-format calcext:target-range-address="Plan1.B41:Plan1.B43">
            <calcext:condition calcext:apply-style-name="ConditionalStyle_2" calcext:value="duplicate" calcext:base-cell-address="Plan1.B41"/>
          </calcext:conditional-format>
          <calcext:conditional-format calcext:target-range-address="Plan1.C41:Plan1.C43">
            <calcext:condition calcext:apply-style-name="ConditionalStyle_1" calcext:value="duplicate" calcext:base-cell-address="Plan1.C41"/>
          </calcext:conditional-format>
          <calcext:conditional-format calcext:target-range-address="Plan1.B41:Plan1.B43">
            <calcext:condition calcext:apply-style-name="ConditionalStyle_2" calcext:value="duplicate" calcext:base-cell-address="Plan1.B41"/>
          </calcext:conditional-format>
          <calcext:conditional-format calcext:target-range-address="Plan1.C41:Plan1.C43">
            <calcext:condition calcext:apply-style-name="ConditionalStyle_1" calcext:value="duplicate" calcext:base-cell-address="Plan1.C41"/>
          </calcext:conditional-format>
          <calcext:conditional-format calcext:target-range-address="Plan1.B41:Plan1.B43">
            <calcext:condition calcext:apply-style-name="ConditionalStyle_2" calcext:value="duplicate" calcext:base-cell-address="Plan1.B41"/>
          </calcext:conditional-format>
          <calcext:conditional-format calcext:target-range-address="Plan1.C41:Plan1.C43">
            <calcext:condition calcext:apply-style-name="ConditionalStyle_1" calcext:value="duplicate" calcext:base-cell-address="Plan1.C41"/>
          </calcext:conditional-format>
          <calcext:conditional-format calcext:target-range-address="Plan1.B41:Plan1.B43">
            <calcext:condition calcext:apply-style-name="ConditionalStyle_2" calcext:value="duplicate" calcext:base-cell-address="Plan1.B41"/>
          </calcext:conditional-format>
          <calcext:conditional-format calcext:target-range-address="Plan1.C41:Plan1.C43">
            <calcext:condition calcext:apply-style-name="ConditionalStyle_1" calcext:value="duplicate" calcext:base-cell-address="Plan1.C41"/>
          </calcext:conditional-format>
          <calcext:conditional-format calcext:target-range-address="Plan1.B41:Plan1.B43">
            <calcext:condition calcext:apply-style-name="ConditionalStyle_2" calcext:value="duplicate" calcext:base-cell-address="Plan1.B41"/>
          </calcext:conditional-format>
          <calcext:conditional-format calcext:target-range-address="Plan1.C41:Plan1.C43">
            <calcext:condition calcext:apply-style-name="ConditionalStyle_1" calcext:value="duplicate" calcext:base-cell-address="Plan1.C41"/>
          </calcext:conditional-format>
          <calcext:conditional-format calcext:target-range-address="Plan1.B41:Plan1.B43">
            <calcext:condition calcext:apply-style-name="ConditionalStyle_2" calcext:value="duplicate" calcext:base-cell-address="Plan1.B41"/>
          </calcext:conditional-format>
          <calcext:conditional-format calcext:target-range-address="Plan1.C41:Plan1.C43">
            <calcext:condition calcext:apply-style-name="ConditionalStyle_1" calcext:value="duplicate" calcext:base-cell-address="Plan1.C41"/>
          </calcext:conditional-format>
          <calcext:conditional-format calcext:target-range-address="Plan1.B41:Plan1.B43">
            <calcext:condition calcext:apply-style-name="ConditionalStyle_2" calcext:value="duplicate" calcext:base-cell-address="Plan1.B41"/>
          </calcext:conditional-format>
          <calcext:conditional-format calcext:target-range-address="Plan1.C41:Plan1.C43">
            <calcext:condition calcext:apply-style-name="ConditionalStyle_1" calcext:value="duplicate" calcext:base-cell-address="Plan1.C41"/>
          </calcext:conditional-format>
          <calcext:conditional-format calcext:target-range-address="Plan1.B41:Plan1.B43">
            <calcext:condition calcext:apply-style-name="ConditionalStyle_2" calcext:value="duplicate" calcext:base-cell-address="Plan1.B41"/>
          </calcext:conditional-format>
          <calcext:conditional-format calcext:target-range-address="Plan1.C41:Plan1.C43">
            <calcext:condition calcext:apply-style-name="ConditionalStyle_1" calcext:value="duplicate" calcext:base-cell-address="Plan1.C41"/>
          </calcext:conditional-format>
          <calcext:conditional-format calcext:target-range-address="Plan1.B41:Plan1.B43">
            <calcext:condition calcext:apply-style-name="ConditionalStyle_2" calcext:value="duplicate" calcext:base-cell-address="Plan1.B41"/>
          </calcext:conditional-format>
          <calcext:conditional-format calcext:target-range-address="Plan1.C41:Plan1.C43">
            <calcext:condition calcext:apply-style-name="ConditionalStyle_1" calcext:value="duplicate" calcext:base-cell-address="Plan1.C41"/>
          </calcext:conditional-format>
          <calcext:conditional-format calcext:target-range-address="Plan1.B41:Plan1.B43">
            <calcext:condition calcext:apply-style-name="ConditionalStyle_2" calcext:value="duplicate" calcext:base-cell-address="Plan1.B41"/>
          </calcext:conditional-format>
          <calcext:conditional-format calcext:target-range-address="Plan1.C41:Plan1.C43">
            <calcext:condition calcext:apply-style-name="ConditionalStyle_1" calcext:value="duplicate" calcext:base-cell-address="Plan1.C41"/>
          </calcext:conditional-format>
          <calcext:conditional-format calcext:target-range-address="Plan1.B41:Plan1.B43">
            <calcext:condition calcext:apply-style-name="ConditionalStyle_2" calcext:value="duplicate" calcext:base-cell-address="Plan1.B41"/>
          </calcext:conditional-format>
          <calcext:conditional-format calcext:target-range-address="Plan1.C41:Plan1.C43">
            <calcext:condition calcext:apply-style-name="ConditionalStyle_1" calcext:value="duplicate" calcext:base-cell-address="Plan1.C41"/>
          </calcext:conditional-format>
          <calcext:conditional-format calcext:target-range-address="Plan1.B38:Plan1.B38">
            <calcext:condition calcext:apply-style-name="ConditionalStyle_2" calcext:value="duplicate" calcext:base-cell-address="Plan1.B38"/>
          </calcext:conditional-format>
          <calcext:conditional-format calcext:target-range-address="Plan1.C38:Plan1.C38">
            <calcext:condition calcext:apply-style-name="ConditionalStyle_1" calcext:value="duplicate" calcext:base-cell-address="Plan1.C38"/>
          </calcext:conditional-format>
          <calcext:conditional-format calcext:target-range-address="Plan1.B38:Plan1.B38">
            <calcext:condition calcext:apply-style-name="ConditionalStyle_2" calcext:value="duplicate" calcext:base-cell-address="Plan1.B38"/>
          </calcext:conditional-format>
          <calcext:conditional-format calcext:target-range-address="Plan1.C38:Plan1.C38">
            <calcext:condition calcext:apply-style-name="ConditionalStyle_1" calcext:value="duplicate" calcext:base-cell-address="Plan1.C38"/>
          </calcext:conditional-format>
          <calcext:conditional-format calcext:target-range-address="Plan1.B38:Plan1.B38">
            <calcext:condition calcext:apply-style-name="ConditionalStyle_2" calcext:value="duplicate" calcext:base-cell-address="Plan1.B38"/>
          </calcext:conditional-format>
          <calcext:conditional-format calcext:target-range-address="Plan1.C38:Plan1.C38">
            <calcext:condition calcext:apply-style-name="ConditionalStyle_2" calcext:value="duplicate" calcext:base-cell-address="Plan1.C38"/>
          </calcext:conditional-format>
          <calcext:conditional-format calcext:target-range-address="Plan1.B38:Plan1.B38">
            <calcext:condition calcext:apply-style-name="ConditionalStyle_2" calcext:value="duplicate" calcext:base-cell-address="Plan1.B38"/>
          </calcext:conditional-format>
          <calcext:conditional-format calcext:target-range-address="Plan1.C38:Plan1.C38">
            <calcext:condition calcext:apply-style-name="ConditionalStyle_1" calcext:value="duplicate" calcext:base-cell-address="Plan1.C38"/>
          </calcext:conditional-format>
          <calcext:conditional-format calcext:target-range-address="Plan1.B38:Plan1.B38">
            <calcext:condition calcext:apply-style-name="ConditionalStyle_2" calcext:value="duplicate" calcext:base-cell-address="Plan1.B38"/>
          </calcext:conditional-format>
          <calcext:conditional-format calcext:target-range-address="Plan1.C38:Plan1.C38">
            <calcext:condition calcext:apply-style-name="ConditionalStyle_1" calcext:value="duplicate" calcext:base-cell-address="Plan1.C38"/>
          </calcext:conditional-format>
          <calcext:conditional-format calcext:target-range-address="Plan1.B38:Plan1.B38">
            <calcext:condition calcext:apply-style-name="ConditionalStyle_2" calcext:value="duplicate" calcext:base-cell-address="Plan1.B38"/>
          </calcext:conditional-format>
          <calcext:conditional-format calcext:target-range-address="Plan1.C38:Plan1.C38">
            <calcext:condition calcext:apply-style-name="ConditionalStyle_1" calcext:value="duplicate" calcext:base-cell-address="Plan1.C38"/>
          </calcext:conditional-format>
          <calcext:conditional-format calcext:target-range-address="Plan1.B42:Plan1.B42">
            <calcext:condition calcext:apply-style-name="ConditionalStyle_2" calcext:value="duplicate" calcext:base-cell-address="Plan1.B42"/>
          </calcext:conditional-format>
          <calcext:conditional-format calcext:target-range-address="Plan1.C42:Plan1.C42">
            <calcext:condition calcext:apply-style-name="ConditionalStyle_1" calcext:value="duplicate" calcext:base-cell-address="Plan1.C42"/>
          </calcext:conditional-format>
          <calcext:conditional-format calcext:target-range-address="Plan1.B42:Plan1.B42">
            <calcext:condition calcext:apply-style-name="ConditionalStyle_2" calcext:value="duplicate" calcext:base-cell-address="Plan1.B42"/>
          </calcext:conditional-format>
          <calcext:conditional-format calcext:target-range-address="Plan1.C42:Plan1.C42">
            <calcext:condition calcext:apply-style-name="ConditionalStyle_1" calcext:value="duplicate" calcext:base-cell-address="Plan1.C42"/>
          </calcext:conditional-format>
          <calcext:conditional-format calcext:target-range-address="Plan1.B42:Plan1.B42">
            <calcext:condition calcext:apply-style-name="ConditionalStyle_2" calcext:value="duplicate" calcext:base-cell-address="Plan1.B42"/>
          </calcext:conditional-format>
          <calcext:conditional-format calcext:target-range-address="Plan1.C42:Plan1.C42">
            <calcext:condition calcext:apply-style-name="ConditionalStyle_2" calcext:value="duplicate" calcext:base-cell-address="Plan1.C42"/>
          </calcext:conditional-format>
          <calcext:conditional-format calcext:target-range-address="Plan1.B42:Plan1.B42">
            <calcext:condition calcext:apply-style-name="ConditionalStyle_2" calcext:value="duplicate" calcext:base-cell-address="Plan1.B42"/>
          </calcext:conditional-format>
          <calcext:conditional-format calcext:target-range-address="Plan1.C42:Plan1.C42">
            <calcext:condition calcext:apply-style-name="ConditionalStyle_1" calcext:value="duplicate" calcext:base-cell-address="Plan1.C42"/>
          </calcext:conditional-format>
          <calcext:conditional-format calcext:target-range-address="Plan1.B42:Plan1.B42">
            <calcext:condition calcext:apply-style-name="ConditionalStyle_2" calcext:value="duplicate" calcext:base-cell-address="Plan1.B42"/>
          </calcext:conditional-format>
          <calcext:conditional-format calcext:target-range-address="Plan1.C42:Plan1.C42">
            <calcext:condition calcext:apply-style-name="ConditionalStyle_1" calcext:value="duplicate" calcext:base-cell-address="Plan1.C42"/>
          </calcext:conditional-format>
          <calcext:conditional-format calcext:target-range-address="Plan1.B42:Plan1.B42">
            <calcext:condition calcext:apply-style-name="ConditionalStyle_2" calcext:value="duplicate" calcext:base-cell-address="Plan1.B42"/>
          </calcext:conditional-format>
          <calcext:conditional-format calcext:target-range-address="Plan1.C42:Plan1.C42">
            <calcext:condition calcext:apply-style-name="ConditionalStyle_1" calcext:value="duplicate" calcext:base-cell-address="Plan1.C42"/>
          </calcext:conditional-format>
          <calcext:conditional-format calcext:target-range-address="Plan1.C33:Plan1.C33">
            <calcext:condition calcext:apply-style-name="ConditionalStyle_1" calcext:value="duplicate" calcext:base-cell-address="Plan1.C33"/>
          </calcext:conditional-format>
          <calcext:conditional-format calcext:target-range-address="Plan1.C33:Plan1.C33">
            <calcext:condition calcext:apply-style-name="ConditionalStyle_1" calcext:value="duplicate" calcext:base-cell-address="Plan1.C33"/>
          </calcext:conditional-format>
          <calcext:conditional-format calcext:target-range-address="Plan1.C33:Plan1.C33">
            <calcext:condition calcext:apply-style-name="ConditionalStyle_1" calcext:value="duplicate" calcext:base-cell-address="Plan1.C33"/>
          </calcext:conditional-format>
          <calcext:conditional-format calcext:target-range-address="Plan1.C33:Plan1.C33">
            <calcext:condition calcext:apply-style-name="ConditionalStyle_1" calcext:value="duplicate" calcext:base-cell-address="Plan1.C33"/>
          </calcext:conditional-format>
          <calcext:conditional-format calcext:target-range-address="Plan1.C33:Plan1.C33">
            <calcext:condition calcext:apply-style-name="ConditionalStyle_1" calcext:value="duplicate" calcext:base-cell-address="Plan1.C33"/>
          </calcext:conditional-format>
          <calcext:conditional-format calcext:target-range-address="Plan1.C33:Plan1.C33">
            <calcext:condition calcext:apply-style-name="ConditionalStyle_1" calcext:value="duplicate" calcext:base-cell-address="Plan1.C33"/>
          </calcext:conditional-format>
          <calcext:conditional-format calcext:target-range-address="Plan1.C33:Plan1.C33">
            <calcext:condition calcext:apply-style-name="ConditionalStyle_1" calcext:value="duplicate" calcext:base-cell-address="Plan1.C33"/>
          </calcext:conditional-format>
          <calcext:conditional-format calcext:target-range-address="Plan1.C33:Plan1.C33">
            <calcext:condition calcext:apply-style-name="ConditionalStyle_1" calcext:value="duplicate" calcext:base-cell-address="Plan1.C33"/>
          </calcext:conditional-format>
          <calcext:conditional-format calcext:target-range-address="Plan1.C33:Plan1.C33">
            <calcext:condition calcext:apply-style-name="ConditionalStyle_1" calcext:value="duplicate" calcext:base-cell-address="Plan1.C33"/>
          </calcext:conditional-format>
          <calcext:conditional-format calcext:target-range-address="Plan1.C33:Plan1.C33">
            <calcext:condition calcext:apply-style-name="ConditionalStyle_1" calcext:value="duplicate" calcext:base-cell-address="Plan1.C33"/>
          </calcext:conditional-format>
          <calcext:conditional-format calcext:target-range-address="Plan1.C33:Plan1.C33">
            <calcext:condition calcext:apply-style-name="ConditionalStyle_1" calcext:value="duplicate" calcext:base-cell-address="Plan1.C33"/>
          </calcext:conditional-format>
          <calcext:conditional-format calcext:target-range-address="Plan1.C33:Plan1.C33">
            <calcext:condition calcext:apply-style-name="ConditionalStyle_1" calcext:value="duplicate" calcext:base-cell-address="Plan1.C33"/>
          </calcext:conditional-format>
          <calcext:conditional-format calcext:target-range-address="Plan1.B3:Plan1.B32">
            <calcext:condition calcext:apply-style-name="ConditionalStyle_2" calcext:value="duplicate" calcext:base-cell-address="Plan1.B3"/>
          </calcext:conditional-format>
          <calcext:conditional-format calcext:target-range-address="Plan1.C3:Plan1.C32">
            <calcext:condition calcext:apply-style-name="ConditionalStyle_1" calcext:value="duplicate" calcext:base-cell-address="Plan1.C3"/>
          </calcext:conditional-format>
          <calcext:conditional-format calcext:target-range-address="Plan1.C33:Plan1.C33">
            <calcext:condition calcext:apply-style-name="ConditionalStyle_1" calcext:value="duplicate" calcext:base-cell-address="Plan1.C33"/>
          </calcext:conditional-format>
          <calcext:conditional-format calcext:target-range-address="Plan1.B35:Plan1.B36">
            <calcext:condition calcext:apply-style-name="ConditionalStyle_2" calcext:value="duplicate" calcext:base-cell-address="Plan1.B35"/>
          </calcext:conditional-format>
          <calcext:conditional-format calcext:target-range-address="Plan1.C35:Plan1.C36">
            <calcext:condition calcext:apply-style-name="ConditionalStyle_1" calcext:value="duplicate" calcext:base-cell-address="Plan1.C35"/>
          </calcext:conditional-format>
          <calcext:conditional-format calcext:target-range-address="Plan1.B34:Plan1.B34">
            <calcext:condition calcext:apply-style-name="ConditionalStyle_2" calcext:value="duplicate" calcext:base-cell-address="Plan1.B34"/>
          </calcext:conditional-format>
          <calcext:conditional-format calcext:target-range-address="Plan1.C34:Plan1.C34">
            <calcext:condition calcext:apply-style-name="ConditionalStyle_1" calcext:value="duplicate" calcext:base-cell-address="Plan1.C34"/>
          </calcext:conditional-format>
          <calcext:conditional-format calcext:target-range-address="Plan1.B33:Plan1.B33">
            <calcext:condition calcext:apply-style-name="ConditionalStyle_2" calcext:value="duplicate" calcext:base-cell-address="Plan1.B33"/>
          </calcext:conditional-format>
          <calcext:conditional-format calcext:target-range-address="Plan1.B18:Plan1.B18 Plan1.B24:Plan1.B24">
            <calcext:condition calcext:apply-style-name="ConditionalStyle_2" calcext:value="duplicate" calcext:base-cell-address="Plan1.B18"/>
          </calcext:conditional-format>
          <calcext:conditional-format calcext:target-range-address="Plan1.B18:Plan1.B18 Plan1.B24:Plan1.B24">
            <calcext:condition calcext:apply-style-name="ConditionalStyle_2" calcext:value="duplicate" calcext:base-cell-address="Plan1.B18"/>
          </calcext:conditional-format>
          <calcext:conditional-format calcext:target-range-address="Plan1.B18:Plan1.B18 Plan1.B24:Plan1.B24">
            <calcext:condition calcext:apply-style-name="ConditionalStyle_2" calcext:value="duplicate" calcext:base-cell-address="Plan1.B18"/>
          </calcext:conditional-format>
          <calcext:conditional-format calcext:target-range-address="Plan1.B18:Plan1.B18 Plan1.B24:Plan1.B24">
            <calcext:condition calcext:apply-style-name="ConditionalStyle_2" calcext:value="duplicate" calcext:base-cell-address="Plan1.B18"/>
          </calcext:conditional-format>
          <calcext:conditional-format calcext:target-range-address="Plan1.C18:Plan1.C18 Plan1.C28:Plan1.C28">
            <calcext:condition calcext:apply-style-name="ConditionalStyle_1" calcext:value="duplicate" calcext:base-cell-address="Plan1.C18"/>
          </calcext:conditional-format>
          <calcext:conditional-format calcext:target-range-address="Plan1.B18:Plan1.B18 Plan1.B24:Plan1.B24">
            <calcext:condition calcext:apply-style-name="ConditionalStyle_2" calcext:value="duplicate" calcext:base-cell-address="Plan1.B18"/>
          </calcext:conditional-format>
          <calcext:conditional-format calcext:target-range-address="Plan1.B18:Plan1.B18 Plan1.B24:Plan1.B24">
            <calcext:condition calcext:apply-style-name="ConditionalStyle_2" calcext:value="duplicate" calcext:base-cell-address="Plan1.B18"/>
          </calcext:conditional-format>
          <calcext:conditional-format calcext:target-range-address="Plan1.B18:Plan1.B18 Plan1.B24:Plan1.B24">
            <calcext:condition calcext:apply-style-name="ConditionalStyle_2" calcext:value="duplicate" calcext:base-cell-address="Plan1.B18"/>
          </calcext:conditional-format>
          <calcext:conditional-format calcext:target-range-address="Plan1.B18:Plan1.B18 Plan1.B24:Plan1.B24">
            <calcext:condition calcext:apply-style-name="ConditionalStyle_2" calcext:value="duplicate" calcext:base-cell-address="Plan1.B18"/>
          </calcext:conditional-format>
          <calcext:conditional-format calcext:target-range-address="Plan1.C18:Plan1.C18 Plan1.C28:Plan1.C28">
            <calcext:condition calcext:apply-style-name="ConditionalStyle_1" calcext:value="duplicate" calcext:base-cell-address="Plan1.C18"/>
          </calcext:conditional-format>
          <calcext:conditional-format calcext:target-range-address="Plan1.B18:Plan1.B18 Plan1.B24:Plan1.B24">
            <calcext:condition calcext:apply-style-name="ConditionalStyle_2" calcext:value="duplicate" calcext:base-cell-address="Plan1.B18"/>
          </calcext:conditional-format>
          <calcext:conditional-format calcext:target-range-address="Plan1.C18:Plan1.C18 Plan1.C28:Plan1.C28">
            <calcext:condition calcext:apply-style-name="ConditionalStyle_1" calcext:value="duplicate" calcext:base-cell-address="Plan1.C18"/>
          </calcext:conditional-format>
          <calcext:conditional-format calcext:target-range-address="Plan1.B18:Plan1.B18 Plan1.B24:Plan1.B24">
            <calcext:condition calcext:apply-style-name="ConditionalStyle_2" calcext:value="duplicate" calcext:base-cell-address="Plan1.B18"/>
          </calcext:conditional-format>
          <calcext:conditional-format calcext:target-range-address="Plan1.C18:Plan1.C18 Plan1.C28:Plan1.C28">
            <calcext:condition calcext:apply-style-name="ConditionalStyle_1" calcext:value="duplicate" calcext:base-cell-address="Plan1.C18"/>
          </calcext:conditional-format>
          <calcext:conditional-format calcext:target-range-address="Plan1.B18:Plan1.B18 Plan1.B24:Plan1.B24">
            <calcext:condition calcext:apply-style-name="ConditionalStyle_2" calcext:value="duplicate" calcext:base-cell-address="Plan1.B18"/>
          </calcext:conditional-format>
          <calcext:conditional-format calcext:target-range-address="Plan1.C18:Plan1.C18 Plan1.C28:Plan1.C28">
            <calcext:condition calcext:apply-style-name="ConditionalStyle_1" calcext:value="duplicate" calcext:base-cell-address="Plan1.C18"/>
          </calcext:conditional-format>
          <calcext:conditional-format calcext:target-range-address="Plan1.B18:Plan1.B18 Plan1.B24:Plan1.B24">
            <calcext:condition calcext:apply-style-name="ConditionalStyle_2" calcext:value="duplicate" calcext:base-cell-address="Plan1.B18"/>
          </calcext:conditional-format>
          <calcext:conditional-format calcext:target-range-address="Plan1.C18:Plan1.C18 Plan1.C28:Plan1.C28">
            <calcext:condition calcext:apply-style-name="ConditionalStyle_1" calcext:value="duplicate" calcext:base-cell-address="Plan1.C18"/>
          </calcext:conditional-format>
          <calcext:conditional-format calcext:target-range-address="Plan1.B18:Plan1.B18 Plan1.B24:Plan1.B24">
            <calcext:condition calcext:apply-style-name="ConditionalStyle_2" calcext:value="duplicate" calcext:base-cell-address="Plan1.B18"/>
          </calcext:conditional-format>
          <calcext:conditional-format calcext:target-range-address="Plan1.C18:Plan1.C18 Plan1.C28:Plan1.C28">
            <calcext:condition calcext:apply-style-name="ConditionalStyle_1" calcext:value="duplicate" calcext:base-cell-address="Plan1.C18"/>
          </calcext:conditional-format>
          <calcext:conditional-format calcext:target-range-address="Plan1.B18:Plan1.B18 Plan1.B24:Plan1.B24">
            <calcext:condition calcext:apply-style-name="ConditionalStyle_2" calcext:value="duplicate" calcext:base-cell-address="Plan1.B18"/>
          </calcext:conditional-format>
          <calcext:conditional-format calcext:target-range-address="Plan1.C18:Plan1.C18 Plan1.C28:Plan1.C28">
            <calcext:condition calcext:apply-style-name="ConditionalStyle_1" calcext:value="duplicate" calcext:base-cell-address="Plan1.C18"/>
          </calcext:conditional-format>
          <calcext:conditional-format calcext:target-range-address="Plan1.B18:Plan1.B18 Plan1.B24:Plan1.B24">
            <calcext:condition calcext:apply-style-name="ConditionalStyle_2" calcext:value="duplicate" calcext:base-cell-address="Plan1.B18"/>
          </calcext:conditional-format>
          <calcext:conditional-format calcext:target-range-address="Plan1.C18:Plan1.C18 Plan1.C28:Plan1.C28">
            <calcext:condition calcext:apply-style-name="ConditionalStyle_1" calcext:value="duplicate" calcext:base-cell-address="Plan1.C18"/>
          </calcext:conditional-format>
          <calcext:conditional-format calcext:target-range-address="Plan1.B18:Plan1.B18 Plan1.B24:Plan1.B24">
            <calcext:condition calcext:apply-style-name="ConditionalStyle_2" calcext:value="duplicate" calcext:base-cell-address="Plan1.B18"/>
          </calcext:conditional-format>
          <calcext:conditional-format calcext:target-range-address="Plan1.C18:Plan1.C18 Plan1.C28:Plan1.C28">
            <calcext:condition calcext:apply-style-name="ConditionalStyle_1" calcext:value="duplicate" calcext:base-cell-address="Plan1.C18"/>
          </calcext:conditional-format>
          <calcext:conditional-format calcext:target-range-address="Plan1.B18:Plan1.B18 Plan1.B24:Plan1.B24">
            <calcext:condition calcext:apply-style-name="ConditionalStyle_2" calcext:value="duplicate" calcext:base-cell-address="Plan1.B18"/>
          </calcext:conditional-format>
          <calcext:conditional-format calcext:target-range-address="Plan1.C18:Plan1.C18 Plan1.C28:Plan1.C28">
            <calcext:condition calcext:apply-style-name="ConditionalStyle_1" calcext:value="duplicate" calcext:base-cell-address="Plan1.C18"/>
          </calcext:conditional-format>
          <calcext:conditional-format calcext:target-range-address="Plan1.B18:Plan1.B18 Plan1.B24:Plan1.B24">
            <calcext:condition calcext:apply-style-name="ConditionalStyle_2" calcext:value="duplicate" calcext:base-cell-address="Plan1.B18"/>
          </calcext:conditional-format>
          <calcext:conditional-format calcext:target-range-address="Plan1.C18:Plan1.C18 Plan1.C28:Plan1.C28">
            <calcext:condition calcext:apply-style-name="ConditionalStyle_1" calcext:value="duplicate" calcext:base-cell-address="Plan1.C18"/>
          </calcext:conditional-format>
          <calcext:conditional-format calcext:target-range-address="Plan1.B13:Plan1.B13">
            <calcext:condition calcext:apply-style-name="ConditionalStyle_2" calcext:value="duplicate" calcext:base-cell-address="Plan1.B13"/>
          </calcext:conditional-format>
          <calcext:conditional-format calcext:target-range-address="Plan1.C13:Plan1.C13">
            <calcext:condition calcext:apply-style-name="ConditionalStyle_1" calcext:value="duplicate" calcext:base-cell-address="Plan1.C13"/>
          </calcext:conditional-format>
          <calcext:conditional-format calcext:target-range-address="Plan1.B13:Plan1.B13">
            <calcext:condition calcext:apply-style-name="ConditionalStyle_2" calcext:value="duplicate" calcext:base-cell-address="Plan1.B13"/>
          </calcext:conditional-format>
          <calcext:conditional-format calcext:target-range-address="Plan1.C13:Plan1.C13">
            <calcext:condition calcext:apply-style-name="ConditionalStyle_2" calcext:value="duplicate" calcext:base-cell-address="Plan1.C13"/>
          </calcext:conditional-format>
          <calcext:conditional-format calcext:target-range-address="Plan1.B13:Plan1.B13">
            <calcext:condition calcext:apply-style-name="ConditionalStyle_2" calcext:value="duplicate" calcext:base-cell-address="Plan1.B13"/>
          </calcext:conditional-format>
          <calcext:conditional-format calcext:target-range-address="Plan1.C13:Plan1.C13">
            <calcext:condition calcext:apply-style-name="ConditionalStyle_1" calcext:value="duplicate" calcext:base-cell-address="Plan1.C13"/>
          </calcext:conditional-format>
          <calcext:conditional-format calcext:target-range-address="Plan1.B13:Plan1.B13">
            <calcext:condition calcext:apply-style-name="ConditionalStyle_2" calcext:value="duplicate" calcext:base-cell-address="Plan1.B13"/>
          </calcext:conditional-format>
          <calcext:conditional-format calcext:target-range-address="Plan1.C13:Plan1.C13">
            <calcext:condition calcext:apply-style-name="ConditionalStyle_1" calcext:value="duplicate" calcext:base-cell-address="Plan1.C13"/>
          </calcext:conditional-format>
          <calcext:conditional-format calcext:target-range-address="Plan1.B14:Plan1.B14">
            <calcext:condition calcext:apply-style-name="ConditionalStyle_2" calcext:value="duplicate" calcext:base-cell-address="Plan1.B14"/>
          </calcext:conditional-format>
          <calcext:conditional-format calcext:target-range-address="Plan1.C14:Plan1.C14">
            <calcext:condition calcext:apply-style-name="ConditionalStyle_1" calcext:value="duplicate" calcext:base-cell-address="Plan1.C14"/>
          </calcext:conditional-format>
          <calcext:conditional-format calcext:target-range-address="Plan1.B14:Plan1.B14">
            <calcext:condition calcext:apply-style-name="ConditionalStyle_2" calcext:value="duplicate" calcext:base-cell-address="Plan1.B14"/>
          </calcext:conditional-format>
          <calcext:conditional-format calcext:target-range-address="Plan1.C14:Plan1.C14">
            <calcext:condition calcext:apply-style-name="ConditionalStyle_1" calcext:value="duplicate" calcext:base-cell-address="Plan1.C14"/>
          </calcext:conditional-format>
          <calcext:conditional-format calcext:target-range-address="Plan1.B14:Plan1.B14">
            <calcext:condition calcext:apply-style-name="ConditionalStyle_2" calcext:value="duplicate" calcext:base-cell-address="Plan1.B14"/>
          </calcext:conditional-format>
          <calcext:conditional-format calcext:target-range-address="Plan1.C14:Plan1.C14">
            <calcext:condition calcext:apply-style-name="ConditionalStyle_2" calcext:value="duplicate" calcext:base-cell-address="Plan1.C14"/>
          </calcext:conditional-format>
          <calcext:conditional-format calcext:target-range-address="Plan1.B14:Plan1.B14">
            <calcext:condition calcext:apply-style-name="ConditionalStyle_2" calcext:value="duplicate" calcext:base-cell-address="Plan1.B14"/>
          </calcext:conditional-format>
          <calcext:conditional-format calcext:target-range-address="Plan1.C14:Plan1.C14">
            <calcext:condition calcext:apply-style-name="ConditionalStyle_1" calcext:value="duplicate" calcext:base-cell-address="Plan1.C14"/>
          </calcext:conditional-format>
          <calcext:conditional-format calcext:target-range-address="Plan1.B14:Plan1.B14">
            <calcext:condition calcext:apply-style-name="ConditionalStyle_2" calcext:value="duplicate" calcext:base-cell-address="Plan1.B14"/>
          </calcext:conditional-format>
          <calcext:conditional-format calcext:target-range-address="Plan1.C14:Plan1.C14">
            <calcext:condition calcext:apply-style-name="ConditionalStyle_1" calcext:value="duplicate" calcext:base-cell-address="Plan1.C14"/>
          </calcext:conditional-format>
          <calcext:conditional-format calcext:target-range-address="Plan1.B14:Plan1.B14">
            <calcext:condition calcext:apply-style-name="ConditionalStyle_2" calcext:value="duplicate" calcext:base-cell-address="Plan1.B14"/>
          </calcext:conditional-format>
          <calcext:conditional-format calcext:target-range-address="Plan1.C14:Plan1.C14">
            <calcext:condition calcext:apply-style-name="ConditionalStyle_1" calcext:value="duplicate" calcext:base-cell-address="Plan1.C14"/>
          </calcext:conditional-format>
          <calcext:conditional-format calcext:target-range-address="Plan1.B18:Plan1.B18">
            <calcext:condition calcext:apply-style-name="ConditionalStyle_2" calcext:value="duplicate" calcext:base-cell-address="Plan1.B18"/>
          </calcext:conditional-format>
          <calcext:conditional-format calcext:target-range-address="Plan1.C18:Plan1.C18">
            <calcext:condition calcext:apply-style-name="ConditionalStyle_1" calcext:value="duplicate" calcext:base-cell-address="Plan1.C18"/>
          </calcext:conditional-format>
          <calcext:conditional-format calcext:target-range-address="Plan1.B18:Plan1.B18">
            <calcext:condition calcext:apply-style-name="ConditionalStyle_2" calcext:value="duplicate" calcext:base-cell-address="Plan1.B18"/>
          </calcext:conditional-format>
          <calcext:conditional-format calcext:target-range-address="Plan1.C18:Plan1.C18">
            <calcext:condition calcext:apply-style-name="ConditionalStyle_1" calcext:value="duplicate" calcext:base-cell-address="Plan1.C18"/>
          </calcext:conditional-format>
          <calcext:conditional-format calcext:target-range-address="Plan1.B18:Plan1.B18">
            <calcext:condition calcext:apply-style-name="ConditionalStyle_2" calcext:value="duplicate" calcext:base-cell-address="Plan1.B18"/>
          </calcext:conditional-format>
          <calcext:conditional-format calcext:target-range-address="Plan1.C18:Plan1.C18">
            <calcext:condition calcext:apply-style-name="ConditionalStyle_2" calcext:value="duplicate" calcext:base-cell-address="Plan1.C18"/>
          </calcext:conditional-format>
          <calcext:conditional-format calcext:target-range-address="Plan1.B18:Plan1.B18">
            <calcext:condition calcext:apply-style-name="ConditionalStyle_2" calcext:value="duplicate" calcext:base-cell-address="Plan1.B18"/>
          </calcext:conditional-format>
          <calcext:conditional-format calcext:target-range-address="Plan1.C18:Plan1.C18">
            <calcext:condition calcext:apply-style-name="ConditionalStyle_1" calcext:value="duplicate" calcext:base-cell-address="Plan1.C18"/>
          </calcext:conditional-format>
          <calcext:conditional-format calcext:target-range-address="Plan1.B18:Plan1.B18">
            <calcext:condition calcext:apply-style-name="ConditionalStyle_2" calcext:value="duplicate" calcext:base-cell-address="Plan1.B18"/>
          </calcext:conditional-format>
          <calcext:conditional-format calcext:target-range-address="Plan1.C18:Plan1.C18">
            <calcext:condition calcext:apply-style-name="ConditionalStyle_1" calcext:value="duplicate" calcext:base-cell-address="Plan1.C18"/>
          </calcext:conditional-format>
          <calcext:conditional-format calcext:target-range-address="Plan1.B18:Plan1.B18">
            <calcext:condition calcext:apply-style-name="ConditionalStyle_2" calcext:value="duplicate" calcext:base-cell-address="Plan1.B18"/>
          </calcext:conditional-format>
          <calcext:conditional-format calcext:target-range-address="Plan1.C18:Plan1.C18">
            <calcext:condition calcext:apply-style-name="ConditionalStyle_1" calcext:value="duplicate" calcext:base-cell-address="Plan1.C18"/>
          </calcext:conditional-format>
          <calcext:conditional-format calcext:target-range-address="Plan1.B15:Plan1.B15">
            <calcext:condition calcext:apply-style-name="ConditionalStyle_2" calcext:value="duplicate" calcext:base-cell-address="Plan1.B15"/>
          </calcext:conditional-format>
          <calcext:conditional-format calcext:target-range-address="Plan1.B15:Plan1.B15">
            <calcext:condition calcext:apply-style-name="ConditionalStyle_2" calcext:value="duplicate" calcext:base-cell-address="Plan1.B15"/>
          </calcext:conditional-format>
          <calcext:conditional-format calcext:target-range-address="Plan1.B15:Plan1.B15">
            <calcext:condition calcext:apply-style-name="ConditionalStyle_2" calcext:value="duplicate" calcext:base-cell-address="Plan1.B15"/>
          </calcext:conditional-format>
          <calcext:conditional-format calcext:target-range-address="Plan1.B15:Plan1.B15">
            <calcext:condition calcext:apply-style-name="ConditionalStyle_2" calcext:value="duplicate" calcext:base-cell-address="Plan1.B15"/>
          </calcext:conditional-format>
          <calcext:conditional-format calcext:target-range-address="Plan1.B15:Plan1.B15">
            <calcext:condition calcext:apply-style-name="ConditionalStyle_2" calcext:value="duplicate" calcext:base-cell-address="Plan1.B15"/>
          </calcext:conditional-format>
          <calcext:conditional-format calcext:target-range-address="Plan1.B15:Plan1.B15">
            <calcext:condition calcext:apply-style-name="ConditionalStyle_2" calcext:value="duplicate" calcext:base-cell-address="Plan1.B15"/>
          </calcext:conditional-format>
          <calcext:conditional-format calcext:target-range-address="Plan1.B15:Plan1.B15">
            <calcext:condition calcext:apply-style-name="ConditionalStyle_2" calcext:value="duplicate" calcext:base-cell-address="Plan1.B15"/>
          </calcext:conditional-format>
          <calcext:conditional-format calcext:target-range-address="Plan1.B15:Plan1.B15">
            <calcext:condition calcext:apply-style-name="ConditionalStyle_2" calcext:value="duplicate" calcext:base-cell-address="Plan1.B15"/>
          </calcext:conditional-format>
          <calcext:conditional-format calcext:target-range-address="Plan1.B15:Plan1.B15">
            <calcext:condition calcext:apply-style-name="ConditionalStyle_2" calcext:value="duplicate" calcext:base-cell-address="Plan1.B15"/>
          </calcext:conditional-format>
          <calcext:conditional-format calcext:target-range-address="Plan1.B15:Plan1.B15">
            <calcext:condition calcext:apply-style-name="ConditionalStyle_2" calcext:value="duplicate" calcext:base-cell-address="Plan1.B15"/>
          </calcext:conditional-format>
          <calcext:conditional-format calcext:target-range-address="Plan1.B15:Plan1.B15">
            <calcext:condition calcext:apply-style-name="ConditionalStyle_2" calcext:value="duplicate" calcext:base-cell-address="Plan1.B15"/>
          </calcext:conditional-format>
          <calcext:conditional-format calcext:target-range-address="Plan1.B15:Plan1.B15">
            <calcext:condition calcext:apply-style-name="ConditionalStyle_2" calcext:value="duplicate" calcext:base-cell-address="Plan1.B15"/>
          </calcext:conditional-format>
          <calcext:conditional-format calcext:target-range-address="Plan1.B15:Plan1.B15">
            <calcext:condition calcext:apply-style-name="ConditionalStyle_2" calcext:value="duplicate" calcext:base-cell-address="Plan1.B15"/>
          </calcext:conditional-format>
          <calcext:conditional-format calcext:target-range-address="Plan1.B15:Plan1.B15">
            <calcext:condition calcext:apply-style-name="ConditionalStyle_2" calcext:value="duplicate" calcext:base-cell-address="Plan1.B15"/>
          </calcext:conditional-format>
          <calcext:conditional-format calcext:target-range-address="Plan1.B15:Plan1.B15">
            <calcext:condition calcext:apply-style-name="ConditionalStyle_2" calcext:value="duplicate" calcext:base-cell-address="Plan1.B15"/>
          </calcext:conditional-format>
          <calcext:conditional-format calcext:target-range-address="Plan1.B15:Plan1.B15">
            <calcext:condition calcext:apply-style-name="ConditionalStyle_2" calcext:value="duplicate" calcext:base-cell-address="Plan1.B15"/>
          </calcext:conditional-format>
          <calcext:conditional-format calcext:target-range-address="Plan1.B15:Plan1.B15">
            <calcext:condition calcext:apply-style-name="ConditionalStyle_2" calcext:value="duplicate" calcext:base-cell-address="Plan1.B15"/>
          </calcext:conditional-format>
          <calcext:conditional-format calcext:target-range-address="Plan1.B15:Plan1.B15">
            <calcext:condition calcext:apply-style-name="ConditionalStyle_2" calcext:value="duplicate" calcext:base-cell-address="Plan1.B15"/>
          </calcext:conditional-format>
          <calcext:conditional-format calcext:target-range-address="Plan1.C15:Plan1.C15">
            <calcext:condition calcext:apply-style-name="ConditionalStyle_2" calcext:value="duplicate" calcext:base-cell-address="Plan1.C15"/>
          </calcext:conditional-format>
          <calcext:conditional-format calcext:target-range-address="Plan1.C15:Plan1.C15">
            <calcext:condition calcext:apply-style-name="ConditionalStyle_2" calcext:value="duplicate" calcext:base-cell-address="Plan1.C15"/>
          </calcext:conditional-format>
          <calcext:conditional-format calcext:target-range-address="Plan1.C15:Plan1.C15">
            <calcext:condition calcext:apply-style-name="ConditionalStyle_2" calcext:value="duplicate" calcext:base-cell-address="Plan1.C15"/>
          </calcext:conditional-format>
          <calcext:conditional-format calcext:target-range-address="Plan1.C15:Plan1.C15">
            <calcext:condition calcext:apply-style-name="ConditionalStyle_2" calcext:value="duplicate" calcext:base-cell-address="Plan1.C15"/>
          </calcext:conditional-format>
          <calcext:conditional-format calcext:target-range-address="Plan1.C15:Plan1.C15">
            <calcext:condition calcext:apply-style-name="ConditionalStyle_2" calcext:value="duplicate" calcext:base-cell-address="Plan1.C15"/>
          </calcext:conditional-format>
          <calcext:conditional-format calcext:target-range-address="Plan1.C15:Plan1.C15">
            <calcext:condition calcext:apply-style-name="ConditionalStyle_2" calcext:value="duplicate" calcext:base-cell-address="Plan1.C15"/>
          </calcext:conditional-format>
          <calcext:conditional-format calcext:target-range-address="Plan1.C15:Plan1.C15">
            <calcext:condition calcext:apply-style-name="ConditionalStyle_2" calcext:value="duplicate" calcext:base-cell-address="Plan1.C15"/>
          </calcext:conditional-format>
          <calcext:conditional-format calcext:target-range-address="Plan1.C15:Plan1.C15">
            <calcext:condition calcext:apply-style-name="ConditionalStyle_2" calcext:value="duplicate" calcext:base-cell-address="Plan1.C15"/>
          </calcext:conditional-format>
          <calcext:conditional-format calcext:target-range-address="Plan1.C15:Plan1.C15">
            <calcext:condition calcext:apply-style-name="ConditionalStyle_2" calcext:value="duplicate" calcext:base-cell-address="Plan1.C15"/>
          </calcext:conditional-format>
          <calcext:conditional-format calcext:target-range-address="Plan1.C15:Plan1.C15">
            <calcext:condition calcext:apply-style-name="ConditionalStyle_2" calcext:value="duplicate" calcext:base-cell-address="Plan1.C15"/>
          </calcext:conditional-format>
          <calcext:conditional-format calcext:target-range-address="Plan1.C15:Plan1.C15">
            <calcext:condition calcext:apply-style-name="ConditionalStyle_2" calcext:value="duplicate" calcext:base-cell-address="Plan1.C15"/>
          </calcext:conditional-format>
          <calcext:conditional-format calcext:target-range-address="Plan1.C15:Plan1.C15">
            <calcext:condition calcext:apply-style-name="ConditionalStyle_2" calcext:value="duplicate" calcext:base-cell-address="Plan1.C15"/>
          </calcext:conditional-format>
          <calcext:conditional-format calcext:target-range-address="Plan1.C15:Plan1.C15">
            <calcext:condition calcext:apply-style-name="ConditionalStyle_2" calcext:value="duplicate" calcext:base-cell-address="Plan1.C15"/>
          </calcext:conditional-format>
          <calcext:conditional-format calcext:target-range-address="Plan1.C15:Plan1.C15">
            <calcext:condition calcext:apply-style-name="ConditionalStyle_2" calcext:value="duplicate" calcext:base-cell-address="Plan1.C15"/>
          </calcext:conditional-format>
          <calcext:conditional-format calcext:target-range-address="Plan1.C15:Plan1.C15">
            <calcext:condition calcext:apply-style-name="ConditionalStyle_2" calcext:value="duplicate" calcext:base-cell-address="Plan1.C15"/>
          </calcext:conditional-format>
          <calcext:conditional-format calcext:target-range-address="Plan1.C15:Plan1.C15">
            <calcext:condition calcext:apply-style-name="ConditionalStyle_2" calcext:value="duplicate" calcext:base-cell-address="Plan1.C15"/>
          </calcext:conditional-format>
          <calcext:conditional-format calcext:target-range-address="Plan1.C15:Plan1.C15">
            <calcext:condition calcext:apply-style-name="ConditionalStyle_2" calcext:value="duplicate" calcext:base-cell-address="Plan1.C15"/>
          </calcext:conditional-format>
          <calcext:conditional-format calcext:target-range-address="Plan1.C15:Plan1.C15">
            <calcext:condition calcext:apply-style-name="ConditionalStyle_2" calcext:value="duplicate" calcext:base-cell-address="Plan1.C15"/>
          </calcext:conditional-format>
          <calcext:conditional-format calcext:target-range-address="Plan1.B24:Plan1.B24 Plan1.B22:Plan1.B22">
            <calcext:condition calcext:apply-style-name="ConditionalStyle_2" calcext:value="duplicate" calcext:base-cell-address="Plan1.B22"/>
          </calcext:conditional-format>
          <calcext:conditional-format calcext:target-range-address="Plan1.B25:Plan1.B26">
            <calcext:condition calcext:apply-style-name="ConditionalStyle_2" calcext:value="duplicate" calcext:base-cell-address="Plan1.B25"/>
          </calcext:conditional-format>
          <calcext:conditional-format calcext:target-range-address="Plan1.C25:Plan1.C26">
            <calcext:condition calcext:apply-style-name="ConditionalStyle_1" calcext:value="duplicate" calcext:base-cell-address="Plan1.C25"/>
          </calcext:conditional-format>
          <calcext:conditional-format calcext:target-range-address="Plan1.C22:Plan1.C24">
            <calcext:condition calcext:apply-style-name="ConditionalStyle_1" calcext:value="duplicate" calcext:base-cell-address="Plan1.C22"/>
          </calcext:conditional-format>
          <calcext:conditional-format calcext:target-range-address="Plan1.B27:Plan1.B27">
            <calcext:condition calcext:apply-style-name="ConditionalStyle_2" calcext:value="duplicate" calcext:base-cell-address="Plan1.B27"/>
          </calcext:conditional-format>
          <calcext:conditional-format calcext:target-range-address="Plan1.C27:Plan1.C28">
            <calcext:condition calcext:apply-style-name="ConditionalStyle_1" calcext:value="duplicate" calcext:base-cell-address="Plan1.C27"/>
          </calcext:conditional-format>
          <calcext:conditional-format calcext:target-range-address="Plan1.B30:Plan1.B31">
            <calcext:condition calcext:apply-style-name="ConditionalStyle_2" calcext:value="duplicate" calcext:base-cell-address="Plan1.B30"/>
          </calcext:conditional-format>
          <calcext:conditional-format calcext:target-range-address="Plan1.C30:Plan1.C31">
            <calcext:condition calcext:apply-style-name="ConditionalStyle_1" calcext:value="duplicate" calcext:base-cell-address="Plan1.C30"/>
          </calcext:conditional-format>
          <calcext:conditional-format calcext:target-range-address="Plan1.B29:Plan1.B29">
            <calcext:condition calcext:apply-style-name="ConditionalStyle_2" calcext:value="duplicate" calcext:base-cell-address="Plan1.B29"/>
          </calcext:conditional-format>
          <calcext:conditional-format calcext:target-range-address="Plan1.C29:Plan1.C29">
            <calcext:condition calcext:apply-style-name="ConditionalStyle_1" calcext:value="duplicate" calcext:base-cell-address="Plan1.C29"/>
          </calcext:conditional-format>
          <calcext:conditional-format calcext:target-range-address="Plan1.B19:Plan1.B19">
            <calcext:condition calcext:apply-style-name="ConditionalStyle_2" calcext:value="duplicate" calcext:base-cell-address="Plan1.B19"/>
          </calcext:conditional-format>
          <calcext:conditional-format calcext:target-range-address="Plan1.C19:Plan1.C19">
            <calcext:condition calcext:apply-style-name="ConditionalStyle_1" calcext:value="duplicate" calcext:base-cell-address="Plan1.C19"/>
          </calcext:conditional-format>
          <calcext:conditional-format calcext:target-range-address="Plan1.B19:Plan1.B19">
            <calcext:condition calcext:apply-style-name="ConditionalStyle_2" calcext:value="duplicate" calcext:base-cell-address="Plan1.B19"/>
          </calcext:conditional-format>
          <calcext:conditional-format calcext:target-range-address="Plan1.C19:Plan1.C19">
            <calcext:condition calcext:apply-style-name="ConditionalStyle_2" calcext:value="duplicate" calcext:base-cell-address="Plan1.C19"/>
          </calcext:conditional-format>
          <calcext:conditional-format calcext:target-range-address="Plan1.B19:Plan1.B19">
            <calcext:condition calcext:apply-style-name="ConditionalStyle_2" calcext:value="duplicate" calcext:base-cell-address="Plan1.B19"/>
          </calcext:conditional-format>
          <calcext:conditional-format calcext:target-range-address="Plan1.C19:Plan1.C19">
            <calcext:condition calcext:apply-style-name="ConditionalStyle_1" calcext:value="duplicate" calcext:base-cell-address="Plan1.C19"/>
          </calcext:conditional-format>
          <calcext:conditional-format calcext:target-range-address="Plan1.B19:Plan1.B19">
            <calcext:condition calcext:apply-style-name="ConditionalStyle_2" calcext:value="duplicate" calcext:base-cell-address="Plan1.B19"/>
          </calcext:conditional-format>
          <calcext:conditional-format calcext:target-range-address="Plan1.C19:Plan1.C19">
            <calcext:condition calcext:apply-style-name="ConditionalStyle_1" calcext:value="duplicate" calcext:base-cell-address="Plan1.C19"/>
          </calcext:conditional-format>
          <calcext:conditional-format calcext:target-range-address="Plan1.B23:Plan1.B23">
            <calcext:condition calcext:apply-style-name="ConditionalStyle_2" calcext:value="duplicate" calcext:base-cell-address="Plan1.B23"/>
          </calcext:conditional-format>
          <calcext:conditional-format calcext:target-range-address="Plan1.B28:Plan1.B28">
            <calcext:condition calcext:apply-style-name="ConditionalStyle_2" calcext:value="duplicate" calcext:base-cell-address="Plan1.B28"/>
          </calcext:conditional-format>
          <calcext:conditional-format calcext:target-range-address="Plan1.B4:Plan1.B4">
            <calcext:condition calcext:apply-style-name="ConditionalStyle_2" calcext:value="duplicate" calcext:base-cell-address="Plan1.B4"/>
          </calcext:conditional-format>
          <calcext:conditional-format calcext:target-range-address="Plan1.B4:Plan1.B4">
            <calcext:condition calcext:apply-style-name="ConditionalStyle_2" calcext:value="duplicate" calcext:base-cell-address="Plan1.B4"/>
          </calcext:conditional-format>
          <calcext:conditional-format calcext:target-range-address="Plan1.B4:Plan1.B4">
            <calcext:condition calcext:apply-style-name="ConditionalStyle_2" calcext:value="duplicate" calcext:base-cell-address="Plan1.B4"/>
          </calcext:conditional-format>
          <calcext:conditional-format calcext:target-range-address="Plan1.B4:Plan1.B4">
            <calcext:condition calcext:apply-style-name="ConditionalStyle_2" calcext:value="duplicate" calcext:base-cell-address="Plan1.B4"/>
          </calcext:conditional-format>
          <calcext:conditional-format calcext:target-range-address="Plan1.C8:Plan1.C8">
            <calcext:condition calcext:apply-style-name="ConditionalStyle_1" calcext:value="duplicate" calcext:base-cell-address="Plan1.C8"/>
          </calcext:conditional-format>
          <calcext:conditional-format calcext:target-range-address="Plan1.B4:Plan1.B4">
            <calcext:condition calcext:apply-style-name="ConditionalStyle_2" calcext:value="duplicate" calcext:base-cell-address="Plan1.B4"/>
          </calcext:conditional-format>
          <calcext:conditional-format calcext:target-range-address="Plan1.B4:Plan1.B4">
            <calcext:condition calcext:apply-style-name="ConditionalStyle_2" calcext:value="duplicate" calcext:base-cell-address="Plan1.B4"/>
          </calcext:conditional-format>
          <calcext:conditional-format calcext:target-range-address="Plan1.B4:Plan1.B4">
            <calcext:condition calcext:apply-style-name="ConditionalStyle_2" calcext:value="duplicate" calcext:base-cell-address="Plan1.B4"/>
          </calcext:conditional-format>
          <calcext:conditional-format calcext:target-range-address="Plan1.B4:Plan1.B4">
            <calcext:condition calcext:apply-style-name="ConditionalStyle_2" calcext:value="duplicate" calcext:base-cell-address="Plan1.B4"/>
          </calcext:conditional-format>
          <calcext:conditional-format calcext:target-range-address="Plan1.C8:Plan1.C8">
            <calcext:condition calcext:apply-style-name="ConditionalStyle_1" calcext:value="duplicate" calcext:base-cell-address="Plan1.C8"/>
          </calcext:conditional-format>
          <calcext:conditional-format calcext:target-range-address="Plan1.B4:Plan1.B4">
            <calcext:condition calcext:apply-style-name="ConditionalStyle_2" calcext:value="duplicate" calcext:base-cell-address="Plan1.B4"/>
          </calcext:conditional-format>
          <calcext:conditional-format calcext:target-range-address="Plan1.C8:Plan1.C8">
            <calcext:condition calcext:apply-style-name="ConditionalStyle_1" calcext:value="duplicate" calcext:base-cell-address="Plan1.C8"/>
          </calcext:conditional-format>
          <calcext:conditional-format calcext:target-range-address="Plan1.B4:Plan1.B4">
            <calcext:condition calcext:apply-style-name="ConditionalStyle_2" calcext:value="duplicate" calcext:base-cell-address="Plan1.B4"/>
          </calcext:conditional-format>
          <calcext:conditional-format calcext:target-range-address="Plan1.C8:Plan1.C8">
            <calcext:condition calcext:apply-style-name="ConditionalStyle_1" calcext:value="duplicate" calcext:base-cell-address="Plan1.C8"/>
          </calcext:conditional-format>
          <calcext:conditional-format calcext:target-range-address="Plan1.B4:Plan1.B4">
            <calcext:condition calcext:apply-style-name="ConditionalStyle_2" calcext:value="duplicate" calcext:base-cell-address="Plan1.B4"/>
          </calcext:conditional-format>
          <calcext:conditional-format calcext:target-range-address="Plan1.C8:Plan1.C8">
            <calcext:condition calcext:apply-style-name="ConditionalStyle_1" calcext:value="duplicate" calcext:base-cell-address="Plan1.C8"/>
          </calcext:conditional-format>
          <calcext:conditional-format calcext:target-range-address="Plan1.B4:Plan1.B4">
            <calcext:condition calcext:apply-style-name="ConditionalStyle_2" calcext:value="duplicate" calcext:base-cell-address="Plan1.B4"/>
          </calcext:conditional-format>
          <calcext:conditional-format calcext:target-range-address="Plan1.C8:Plan1.C8">
            <calcext:condition calcext:apply-style-name="ConditionalStyle_1" calcext:value="duplicate" calcext:base-cell-address="Plan1.C8"/>
          </calcext:conditional-format>
          <calcext:conditional-format calcext:target-range-address="Plan1.B4:Plan1.B4">
            <calcext:condition calcext:apply-style-name="ConditionalStyle_2" calcext:value="duplicate" calcext:base-cell-address="Plan1.B4"/>
          </calcext:conditional-format>
          <calcext:conditional-format calcext:target-range-address="Plan1.C8:Plan1.C8">
            <calcext:condition calcext:apply-style-name="ConditionalStyle_1" calcext:value="duplicate" calcext:base-cell-address="Plan1.C8"/>
          </calcext:conditional-format>
          <calcext:conditional-format calcext:target-range-address="Plan1.B4:Plan1.B4">
            <calcext:condition calcext:apply-style-name="ConditionalStyle_2" calcext:value="duplicate" calcext:base-cell-address="Plan1.B4"/>
          </calcext:conditional-format>
          <calcext:conditional-format calcext:target-range-address="Plan1.C8:Plan1.C8">
            <calcext:condition calcext:apply-style-name="ConditionalStyle_1" calcext:value="duplicate" calcext:base-cell-address="Plan1.C8"/>
          </calcext:conditional-format>
          <calcext:conditional-format calcext:target-range-address="Plan1.B4:Plan1.B4">
            <calcext:condition calcext:apply-style-name="ConditionalStyle_2" calcext:value="duplicate" calcext:base-cell-address="Plan1.B4"/>
          </calcext:conditional-format>
          <calcext:conditional-format calcext:target-range-address="Plan1.C8:Plan1.C8">
            <calcext:condition calcext:apply-style-name="ConditionalStyle_1" calcext:value="duplicate" calcext:base-cell-address="Plan1.C8"/>
          </calcext:conditional-format>
          <calcext:conditional-format calcext:target-range-address="Plan1.B4:Plan1.B4">
            <calcext:condition calcext:apply-style-name="ConditionalStyle_2" calcext:value="duplicate" calcext:base-cell-address="Plan1.B4"/>
          </calcext:conditional-format>
          <calcext:conditional-format calcext:target-range-address="Plan1.C8:Plan1.C8">
            <calcext:condition calcext:apply-style-name="ConditionalStyle_1" calcext:value="duplicate" calcext:base-cell-address="Plan1.C8"/>
          </calcext:conditional-format>
          <calcext:conditional-format calcext:target-range-address="Plan1.B4:Plan1.B4">
            <calcext:condition calcext:apply-style-name="ConditionalStyle_2" calcext:value="duplicate" calcext:base-cell-address="Plan1.B4"/>
          </calcext:conditional-format>
          <calcext:conditional-format calcext:target-range-address="Plan1.C8:Plan1.C8">
            <calcext:condition calcext:apply-style-name="ConditionalStyle_1" calcext:value="duplicate" calcext:base-cell-address="Plan1.C8"/>
          </calcext:conditional-format>
          <calcext:conditional-format calcext:target-range-address="Plan1.B4:Plan1.B4">
            <calcext:condition calcext:apply-style-name="ConditionalStyle_2" calcext:value="duplicate" calcext:base-cell-address="Plan1.B4"/>
          </calcext:conditional-format>
          <calcext:conditional-format calcext:target-range-address="Plan1.C8:Plan1.C8">
            <calcext:condition calcext:apply-style-name="ConditionalStyle_1" calcext:value="duplicate" calcext:base-cell-address="Plan1.C8"/>
          </calcext:conditional-format>
          <calcext:conditional-format calcext:target-range-address="Plan1.B4:Plan1.B4 Plan1.B2:Plan1.B2">
            <calcext:condition calcext:apply-style-name="ConditionalStyle_2" calcext:value="duplicate" calcext:base-cell-address="Plan1.B2"/>
          </calcext:conditional-format>
          <calcext:conditional-format calcext:target-range-address="Plan1.B5:Plan1.B6">
            <calcext:condition calcext:apply-style-name="ConditionalStyle_2" calcext:value="duplicate" calcext:base-cell-address="Plan1.B5"/>
          </calcext:conditional-format>
          <calcext:conditional-format calcext:target-range-address="Plan1.C5:Plan1.C6">
            <calcext:condition calcext:apply-style-name="ConditionalStyle_1" calcext:value="duplicate" calcext:base-cell-address="Plan1.C5"/>
          </calcext:conditional-format>
          <calcext:conditional-format calcext:target-range-address="Plan1.C2:Plan1.C4">
            <calcext:condition calcext:apply-style-name="ConditionalStyle_1" calcext:value="duplicate" calcext:base-cell-address="Plan1.C2"/>
          </calcext:conditional-format>
          <calcext:conditional-format calcext:target-range-address="Plan1.B7:Plan1.B7">
            <calcext:condition calcext:apply-style-name="ConditionalStyle_2" calcext:value="duplicate" calcext:base-cell-address="Plan1.B7"/>
          </calcext:conditional-format>
          <calcext:conditional-format calcext:target-range-address="Plan1.C7:Plan1.C8">
            <calcext:condition calcext:apply-style-name="ConditionalStyle_1" calcext:value="duplicate" calcext:base-cell-address="Plan1.C7"/>
          </calcext:conditional-format>
          <calcext:conditional-format calcext:target-range-address="Plan1.B10:Plan1.B11">
            <calcext:condition calcext:apply-style-name="ConditionalStyle_2" calcext:value="duplicate" calcext:base-cell-address="Plan1.B10"/>
          </calcext:conditional-format>
          <calcext:conditional-format calcext:target-range-address="Plan1.C10:Plan1.C11">
            <calcext:condition calcext:apply-style-name="ConditionalStyle_1" calcext:value="duplicate" calcext:base-cell-address="Plan1.C10"/>
          </calcext:conditional-format>
          <calcext:conditional-format calcext:target-range-address="Plan1.B9:Plan1.B9">
            <calcext:condition calcext:apply-style-name="ConditionalStyle_2" calcext:value="duplicate" calcext:base-cell-address="Plan1.B9"/>
          </calcext:conditional-format>
          <calcext:conditional-format calcext:target-range-address="Plan1.C9:Plan1.C9">
            <calcext:condition calcext:apply-style-name="ConditionalStyle_1" calcext:value="duplicate" calcext:base-cell-address="Plan1.C9"/>
          </calcext:conditional-format>
          <calcext:conditional-format calcext:target-range-address="Plan1.B3:Plan1.B3">
            <calcext:condition calcext:apply-style-name="ConditionalStyle_2" calcext:value="duplicate" calcext:base-cell-address="Plan1.B3"/>
          </calcext:conditional-format>
          <calcext:conditional-format calcext:target-range-address="Plan1.B8:Plan1.B8">
            <calcext:condition calcext:apply-style-name="ConditionalStyle_2" calcext:value="duplicate" calcext:base-cell-address="Plan1.B8"/>
          </calcext:conditional-format>
        </calcext:conditional-formats>
      </table:table>
      <table:table table:name="IMH" table:style-name="ta4">
        <office:forms form:automatic-focus="false" form:apply-design-mode="false"/>
        <table:shapes>
          <draw:custom-shape draw:z-index="0" draw:name="TextShape 1" draw:style-name="gr2" draw:text-style-name="P2" svg:width="60.98mm" svg:height="16.91mm" svg:x="206.85mm" svg:y="58.8mm">
            <text:p text:style-name="P1"><text:span text:style-name="T1">CF (Md) Vania Giselda Dávila</text:span></text:p>
            <text:p text:style-name="P1"><text:span text:style-name="T1"><text:s/></text:span><text:span text:style-name="T1">Ortopedia</text:span></text:p>
            <text:p text:style-name="P1"><text:span text:style-name="T1"><text:s text:c="9"/></text:span><text:span text:style-name="T1">CRM 82.59286-1</text:span></text:p>
            <draw:enhanced-geometry svg:viewBox="0 0 0 0" draw:text-areas="0 0 ?f3 ?f2" draw:type="rectangle" draw:enhanced-path="M 0 0 L ?f3 0 ?f3 ?f2 0 ?f2 Z N">
              <draw:equation draw:name="f0" draw:formula="3052"/>
              <draw:equation draw:name="f1" draw:formula="848"/>
              <draw:equation draw:name="f2" draw:formula="1696"/>
              <draw:equation draw:name="f3" draw:formula="6104"/>
            </draw:enhanced-geometry>
          </draw:custom-shape>
        </table:shapes>
        <table:table-column table:style-name="co34" table:default-cell-style-name="ce229"/>
        <table:table-column table:style-name="co35" table:default-cell-style-name="ce233"/>
        <table:table-column table:style-name="co36" table:default-cell-style-name="ce233"/>
        <table:table-column table:style-name="co37" table:default-cell-style-name="ce233"/>
        <table:table-column table:style-name="co38" table:default-cell-style-name="ce233"/>
        <table:table-column table:style-name="co39" table:default-cell-style-name="ce229"/>
        <table:table-column table:style-name="co40" table:default-cell-style-name="ce233"/>
        <table:table-column table:style-name="co41" table:default-cell-style-name="ce233"/>
        <table:table-column table:style-name="co42" table:default-cell-style-name="ce233"/>
        <table:table-column table:style-name="co43" table:default-cell-style-name="ce229"/>
        <table:table-column table:style-name="co44" table:number-columns-repeated="1014" table:default-cell-style-name="ce233"/>
        <table:table-row table:style-name="ro44">
          <table:table-cell table:style-name="ce224" office:value-type="string" calcext:value-type="string" table:number-columns-spanned="10" table:number-rows-spanned="1">
            <text:p>MARINHA DO BRASIL </text:p>
          </table:table-cell>
          <table:covered-table-cell table:number-columns-repeated="9" table:style-name="ce224"/>
          <table:table-cell table:number-columns-repeated="1014"/>
        </table:table-row>
        <table:table-row table:style-name="ro44">
          <table:table-cell table:style-name="ce225" office:value-type="string" calcext:value-type="string" table:number-columns-spanned="6" table:number-rows-spanned="1">
            <text:p><text:s text:c="101"/>HOSPITAL NAVAL MARCÍLIO DIAS</text:p>
          </table:table-cell>
          <table:covered-table-cell table:number-columns-repeated="5" table:style-name="ce225"/>
          <table:table-cell table:style-name="ce240" office:value-type="string" calcext:value-type="string" table:number-columns-spanned="2" table:number-rows-spanned="1">
            <text:p>ANEXO DA CP - Nº CP</text:p>
          </table:table-cell>
          <table:covered-table-cell table:style-name="ce240"/>
          <table:table-cell table:style-name="ce242" office:value-type="string" calcext:value-type="string">
            <text:p>25/2026</text:p>
          </table:table-cell>
          <table:table-cell table:style-name="ce243"/>
          <table:table-cell table:number-columns-repeated="1014"/>
        </table:table-row>
        <table:table-row table:style-name="ro44">
          <table:table-cell table:style-name="ce226" office:value-type="string" calcext:value-type="string" table:number-columns-spanned="10" table:number-rows-spanned="1">
            <text:p>CLÍNICA DE TRAUMATO-ORTOPEDIA</text:p>
          </table:table-cell>
          <table:covered-table-cell table:number-columns-repeated="9" table:style-name="ce226"/>
          <table:table-cell table:style-name="ce245" table:number-columns-repeated="1014"/>
        </table:table-row>
        <table:table-row table:style-name="ro45">
          <table:table-cell table:style-name="ce227" office:value-type="string" calcext:value-type="string">
            <text:p>DATA</text:p>
          </table:table-cell>
          <table:table-cell table:style-name="ce230" office:value-type="string" calcext:value-type="string">
            <text:p>NIP </text:p>
          </table:table-cell>
          <table:table-cell table:style-name="ce230" office:value-type="string" calcext:value-type="string">
            <text:p>NOME DO USUÁRIO</text:p>
          </table:table-cell>
          <table:table-cell table:style-name="ce235" office:value-type="string" calcext:value-type="string">
            <text:p>VÍNCULO</text:p>
          </table:table-cell>
          <table:table-cell table:style-name="ce235" office:value-type="string" calcext:value-type="string">
            <text:p>DESCRIÇÃO DO PROCEDIMENTO/MEDICAMENTO</text:p>
          </table:table-cell>
          <table:table-cell table:style-name="ce239" office:value-type="string" calcext:value-type="string">
            <text:p>NIP DO TITULAR</text:p>
          </table:table-cell>
          <table:table-cell table:style-name="ce230" office:value-type="string" calcext:value-type="string">
            <text:p>VALOR UNIT</text:p>
          </table:table-cell>
          <table:table-cell table:style-name="ce230" office:value-type="string" calcext:value-type="string">
            <text:p>QUANTI.</text:p>
          </table:table-cell>
          <table:table-cell table:style-name="ce230" office:value-type="string" calcext:value-type="string">
            <text:p>VALOR TOTAL</text:p>
          </table:table-cell>
          <table:table-cell table:style-name="ce230" office:value-type="string" calcext:value-type="string">
            <text:p><text:s/>% A INDENIZAR</text:p>
          </table:table-cell>
          <table:table-cell table:style-name="ce246" table:number-columns-repeated="1014"/>
        </table:table-row>
        <table:table-row table:style-name="ro46">
          <table:table-cell table:style-name="ce228" office:value-type="date" office:date-value="2026-06-24" calcext:value-type="date">
            <text:p>24/06/26</text:p>
          </table:table-cell>
          <table:table-cell table:style-name="ce231" office:value-type="string" calcext:value-type="string">
            <text:p>86.4094.68</text:p>
          </table:table-cell>
          <table:table-cell table:style-name="ce234" office:value-type="string" calcext:value-type="string">
            <text:p>JOSÉ ALEXANDRE BARBOSA LIMA </text:p>
          </table:table-cell>
          <table:table-cell table:style-name="ce236" office:value-type="string" calcext:value-type="string">
            <text:p>TITULAR</text:p>
          </table:table-cell>
          <table:table-cell table:style-name="ce237" office:value-type="string" calcext:value-type="string">
            <text:p>REPARO ARTROSCOPICO DO MANGUITO ROTADOR A DIREITA </text:p>
          </table:table-cell>
          <table:table-cell table:style-name="ce236" office:value-type="string" calcext:value-type="string">
            <text:p>86.4094.68 </text:p>
          </table:table-cell>
          <table:table-cell table:style-name="ce241" office:value-type="currency" office:currency="BRL" office:value="10351" calcext:value-type="currency">
            <text:p>R$ 10.351,00</text:p>
          </table:table-cell>
          <table:table-cell table:style-name="ce58" office:value-type="float" office:value="1" calcext:value-type="float">
            <text:p>1</text:p>
          </table:table-cell>
          <table:table-cell table:style-name="ce241" office:value-type="currency" office:currency="BRL" office:value="10351" calcext:value-type="currency">
            <text:p>R$ 10.351,00</text:p>
          </table:table-cell>
          <table:table-cell table:style-name="ce244"/>
          <table:table-cell table:number-columns-repeated="1014"/>
        </table:table-row>
        <table:table-row table:style-name="ro35">
          <table:table-cell table:style-name="ce228" office:value-type="date" office:date-value="2026-06-24" calcext:value-type="date">
            <text:p>24/06/26</text:p>
          </table:table-cell>
          <table:table-cell table:style-name="ce232" office:value-type="string" calcext:value-type="string">
            <text:p>87.1913.51</text:p>
          </table:table-cell>
          <table:table-cell table:style-name="ce234" office:value-type="string" calcext:value-type="string">
            <text:p>LEIFSON FERREIRA PASSOS </text:p>
          </table:table-cell>
          <table:table-cell table:style-name="ce236" office:value-type="string" calcext:value-type="string">
            <text:p>TITULAR</text:p>
          </table:table-cell>
          <table:table-cell table:style-name="ce238" office:value-type="string" calcext:value-type="string">
            <text:p>REPARO ARTROSCOPICO <text:s/>DE BANKART À ESQUERDA </text:p>
          </table:table-cell>
          <table:table-cell table:style-name="ce232" office:value-type="string" calcext:value-type="string">
            <text:p>87.1913.51</text:p>
          </table:table-cell>
          <table:table-cell table:style-name="ce241" office:value-type="currency" office:currency="BRL" office:value="9224" calcext:value-type="currency">
            <text:p>R$ 9.224,00</text:p>
          </table:table-cell>
          <table:table-cell table:style-name="ce58" office:value-type="float" office:value="1" calcext:value-type="float">
            <text:p>1</text:p>
          </table:table-cell>
          <table:table-cell table:style-name="ce241" office:value-type="currency" office:currency="BRL" office:value="9224" calcext:value-type="currency">
            <text:p>R$ 9.224,00</text:p>
          </table:table-cell>
          <table:table-cell table:style-name="ce244"/>
          <table:table-cell table:number-columns-repeated="1014"/>
        </table:table-row>
        <table:table-row table:style-name="ro20">
          <table:table-cell table:number-columns-repeated="2"/>
          <table:table-cell table:style-name="Default"/>
          <table:table-cell table:number-columns-repeated="1021"/>
        </table:table-row>
        <table:table-row table:style-name="ro20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10" office:value-type="string" calcext:value-type="string" table:number-columns-spanned="4" table:number-rows-spanned="1">
            <text:p>Chefe da Clínica</text:p>
          </table:table-cell>
          <table:covered-table-cell table:number-columns-repeated="3"/>
          <table:table-cell table:number-columns-repeated="1016"/>
        </table:table-row>
        <table:table-row table:style-name="ro20" table:number-rows-repeated="1048552">
          <table:table-cell table:number-columns-repeated="1024"/>
        </table:table-row>
        <table:table-row table:style-name="ro9" table:number-rows-repeated="1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2" table:target-range-address="Plan1.A2:Plan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alibri2" svg:font-family="Calibri" style:font-family-generic="swiss"/>
    <style:font-face style:name="Garamond-Normal" svg:font-family="Garamond-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4">
      <number:day/>
      <number:text>/</number:text>
      <number:month/>
      <number:text>/</number:text>
      <number:year number:style="long"/>
    </number:date-style>
    <number:number-style style:name="N125">
      <number:text>R$</number:text>
      <number:number number:decimal-places="2" loext:min-decimal-places="2" number:min-integer-digits="1" number:grouping="true"/>
    </number:number-style>
    <number:number-style style:name="N126P0" style:volatile="true">
      <number:text>R$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">
      <number:text>R$ </number:text>
      <number:number number:decimal-places="2" loext:min-decimal-places="2" number:min-integer-digits="1" number:grouping="true"/>
    </number:number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R$</number:text>
      <number:number number:decimal-places="0" loext:min-decimal-places="0" number:min-integer-digits="1" number:grouping="true"/>
    </number:number-style>
    <number:number-style style:name="N132">
      <number:text>-R$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text>R$</number:text>
      <number:number number:decimal-places="0" loext:min-decimal-places="0" number:min-integer-digits="1" number:grouping="true"/>
    </number:number-style>
    <number:number-style style:name="N133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R$</number:text>
      <number:number number:decimal-places="2" loext:min-decimal-places="2" number:min-integer-digits="1" number:grouping="true"/>
    </number:number-style>
    <number:number-style style:name="N134">
      <number:text>-R$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R$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6" loext:min-decimal-places="6" number:min-integer-digits="2"/>
      <number:text>.</number:text>
    </number:number-style>
    <number:number-style style:name="N145P0" style:volatile="true">
      <number:text>R$ </number:text>
      <number:number number:decimal-places="2" loext:min-decimal-places="2" number:min-integer-digits="1" number:grouping="true"/>
    </number:number-style>
    <number:number-style style:name="N145">
      <number:text>-R$ </number:text>
      <number:number number:decimal-places="2" loext:min-decimal-places="2" number:min-integer-digits="1" number:grouping="true"/>
      <style:map style:condition="value()&gt;=0" style:apply-style-name="N145P0"/>
    </number:number-style>
    <number:date-style style:name="N146P0" style:volatile="true">
      <number:day number:style="long"/>
      <number:text>/</number:text>
      <number:month number:style="long"/>
      <number:text>/</number:text>
      <number:year/>
    </number:date-style>
    <number:text-style style:name="N146">
      <number:text-content/>
      <style:map style:condition="value()&lt;=1.79769313486232E+308" style:apply-style-name="N146P0"/>
    </number:text-style>
    <number:number-style style:name="N14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/>
      <number:text>/</number:text>
      <number:month number:textual="true"/>
      <number:text>/</number:text>
      <number:year/>
    </number:date-style>
    <number:date-style style:name="N154">
      <number:day/>
      <number:text>/</number:text>
      <number:month number:textual="true"/>
    </number:date-style>
    <number:date-style style:name="N155">
      <number:month number:textual="true"/>
      <number:text>/</number:text>
      <number:year/>
    </number:date-style>
    <number:time-style style:name="N156">
      <number:hours/>
      <number:text>:</number:text>
      <number:minutes number:style="long"/>
      <number:text> </number:text>
      <number:am-pm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8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number number:decimal-places="2" loext:min-decimal-places="2" number:min-integer-digits="1" number:grouping="true"/>
      <number:text> </number:text>
    </number:number-style>
    <number:number-style style:name="N16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loext:text> R$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78P0" style:volatile="true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78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78P0"/>
    </number:currency-style>
    <number:number-style style:name="N179">
      <number:number number:decimal-places="0" loext:min-decimal-places="0" number:min-integer-digits="8">
        <number:embedded-text number:position="6">.</number:embedded-text>
        <number:embedded-text number:position="2">.</number:embedded-text>
      </number:number>
    </number:number-style>
    <number:number-style style:name="N180P0" style:volatile="true">
      <number:text>R$ </number:text>
      <number:number number:decimal-places="2" loext:min-decimal-places="2" number:min-integer-digits="1" number:grouping="true"/>
    </number:number-style>
    <number:number-style style:name="N180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80P0"/>
    </number:number-style>
    <number:number-style style:name="N181">
      <number:scientific-number number:decimal-places="1" loext:min-decimal-places="1" number:min-integer-digits="1" number:min-exponent-digits="1" loext:exponent-interval="1" loext:forced-exponent-sign="true"/>
    </number:number-style>
    <number:date-style style:name="N182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183">
      <number:number number:decimal-places="1" loext:min-decimal-places="1" number:min-integer-digits="1"/>
      <number:text>%</number:text>
    </number:percentage-style>
    <number:number-style style:name="N185P0" style:volatile="true">
      <number:text>R$ </number:text>
      <number:number number:decimal-places="0" loext:min-decimal-places="0" number:min-integer-digits="1" number:grouping="true"/>
    </number:number-style>
    <number:number-style style:name="N185">
      <number:text>-R$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text>R$ </number:text>
      <number:number number:decimal-places="0" loext:min-decimal-places="0" number:min-integer-digits="1" number:grouping="true"/>
    </number:number-style>
    <number:number-style style:name="N18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86P0"/>
    </number:number-style>
    <number:number-style style:name="N188P0" style:volatile="true">
      <number:number number:decimal-places="0" loext:min-decimal-places="0" number:min-integer-digits="1" number:grouping="true"/>
      <number:text> </number:text>
    </number:number-style>
    <number:number-style style:name="N188P1" style:volatile="true">
      <number:number number:decimal-places="0" loext:min-decimal-places="0" number:min-integer-digits="1" number:grouping="true"/>
      <number:text> </number:text>
    </number:number-style>
    <number:number-style style:name="N188P2" style:volatile="true">
      <number:text>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2" loext:min-decimal-places="2" number:min-integer-digits="1" number:grouping="true"/>
      <number:text> </number:text>
    </number:number-style>
    <number:number-style style:name="N190P1" style:volatile="true">
      <number:number number:decimal-places="2" loext:min-decimal-places="2" number:min-integer-digits="1" number:grouping="true"/>
      <number:text> </number:text>
    </number:number-style>
    <number:number-style style:name="N190P2" style:volatile="true">
      <number:text>-</number:text>
      <number:number number:decimal-places="0" loext:min-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">
      <number:scientific-number number:decimal-places="1" loext:min-decimal-places="1" number:min-integer-digits="3" number:min-exponent-digits="1" loext:exponent-interval="3" loext:forced-exponent-sign="true"/>
    </number:number-style>
    <number:date-style style:name="N192">
      <number:day/>
      <number:text>/</number:text>
      <number:month/>
      <number:text>/</number:text>
      <number:year/>
    </number:date-style>
    <number:number-style style:name="N193">
      <number:number number:decimal-places="0" loext:min-decimal-places="0" number:min-integer-digits="0"/>
    </number:number-style>
    <number:date-style style:name="N194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number-style style:name="N19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6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fill-character> </loext:fill-character>
      <number:text>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P2" style:volatile="true">
      <loext:text> R$ </loext:text>
      <loext:fill-character> </loext:fill-character>
      <number:text>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3P2" style:volatile="true">
      <loext:fill-character> </loext:fill-character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4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4P2" style:volatile="true">
      <loext:text> R$ </loext:text>
      <loext:fill-character> </loext:fill-character>
      <number:text>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7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7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text> R$ </number:text>
      <number:number number:decimal-places="2" loext:min-decimal-places="2" number:min-integer-digits="1" number:grouping="true"/>
      <number:text> </number:text>
    </number:number-style>
    <number:number-style style:name="N209">
      <number:text>-R$ </number:text>
      <number:number number:decimal-places="2" loext:min-decimal-places="2" number:min-integer-digits="1" number:grouping="true"/>
      <number:text> </number:text>
    </number:number-style>
    <number:number-style style:name="N210">
      <number:text> R$ -</number:text>
      <number:number number:decimal-places="0" loext:min-decimal-places="0" number:min-integer-digits="0"/>
      <number:text> </number:text>
    </number:number-style>
    <number:number-style style:name="N211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211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211P2" style:volatile="true">
      <number:text> R$ -</number:text>
      <number:number number:decimal-places="0" loext:min-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date-style style:name="N212P0" style:volatile="true">
      <number:day/>
      <number:text>/</number:text>
      <number:month/>
      <number:text>/</number:text>
      <number:year/>
    </number:date-style>
    <number:text-style style:name="N212">
      <number:text-content/>
      <style:map style:condition="value()&lt;=1.79769313486232E+308" style:apply-style-name="N212P0"/>
    </number:text-style>
    <number:number-style style:name="N213">
      <number:number number:decimal-places="0" loext:min-decimal-places="0" number:min-integer-digits="3"/>
    </number:number-style>
    <number:number-style style:name="N214">
      <number:number number:decimal-places="1" loext:min-decimal-places="1" number:min-integer-digits="1"/>
    </number:number-style>
    <number:date-style style:name="N215">
      <number:text>BOOL</number:text>
      <number:year/>
      <number:text>AN</number:text>
    </number:date-style>
    <number:number-style style:name="N216">
      <number:number number:decimal-places="0" loext:min-decimal-places="0" number:min-integer-digits="2"/>
    </number:number-style>
    <number:number-style style:name="N217">
      <number:number number:decimal-places="1" loext:min-decimal-places="1" number:min-integer-digits="1" number:grouping="true"/>
    </number:number-style>
    <number:number-style style:name="N218">
      <number:text> R$ (</number:text>
      <number:number number:decimal-places="2" loext:min-decimal-places="2" number:min-integer-digits="1" number:grouping="true"/>
      <number:text>)</number:text>
    </number:number-style>
    <number:number-style style:name="N21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loext:min-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">
      <number:number number:decimal-places="3" loext:min-decimal-places="3" number:min-integer-digits="1"/>
    </number:number-style>
    <number:number-style style:name="N221">
      <number:number number:decimal-places="4" loext:min-decimal-places="4" number:min-integer-digits="1"/>
    </number:number-style>
    <number:number-style style:name="N222">
      <number:number number:decimal-places="1" loext:min-decimal-places="1" number:min-integer-digits="0"/>
    </number:number-style>
    <number:number-style style:name="N223">
      <number:number number:decimal-places="2" loext:min-decimal-places="2" number:min-integer-digits="0"/>
    </number:number-style>
    <number:number-style style:name="N225P0" style:volatile="true">
      <number:number number:decimal-places="0" loext:min-decimal-places="0" number:min-integer-digits="1" number:grouping="true"/>
      <number:text> </number:text>
    </number:number-style>
    <number:number-style style:name="N22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25P2" style:volatile="true">
      <number:text>-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7P0" style:volatile="true">
      <number:number number:decimal-places="2" loext:min-decimal-places="2" number:min-integer-digits="1" number:grouping="true"/>
      <number:text> </number:text>
    </number:number-style>
    <number:number-style style:name="N227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27P2" style:volatile="true">
      <number:text>-</number:text>
      <number:number number:decimal-places="0" loext:min-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231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231P2" style:volatile="true">
      <number:text> R$ 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number:number number:decimal-places="2" loext:min-decimal-places="2" number:min-integer-digits="1" number:grouping="true"/>
      <number:text> </number:text>
    </number:number-style>
    <number:number-style style:name="N2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33P2" style:volatile="true">
      <number:text>-</number:text>
      <number:number number:decimal-places="0" loext:min-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currency-style style:name="N237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7P1" style:volatile="true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7P2" style:volatile="true">
      <number:currency-symbol number:language="pt" number:country="BR">R$</number:currency-symbol>
      <number:text> -</number:text>
      <number:number number:decimal-places="0" loext:min-decimal-places="0" number:min-integer-digits="0"/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2" loext:min-decimal-places="2" number:min-integer-digits="1" number:grouping="true"/>
    </number:number-style>
    <number:number-style style:name="N238">
      <style:text-properties fo:color="#ff0000"/>
      <number:number number:decimal-places="2" loext:min-decimal-places="2" number:min-integer-digits="1" number:grouping="true"/>
      <style:map style:condition="value()&gt;=0" style:apply-style-name="N238P0"/>
    </number:number-style>
    <number:number-style style:name="N240P0" style:volatile="true">
      <number:text>R$ </number:text>
      <number:number number:decimal-places="3" loext:min-decimal-places="3" number:min-integer-digits="1" number:grouping="true"/>
    </number:number-style>
    <number:number-style style:name="N240">
      <style:text-properties fo:color="#ff0000"/>
      <number:text>-R$ </number:text>
      <number:number number:decimal-places="3" loext:min-decimal-places="3" number:min-integer-digits="1" number:grouping="true"/>
      <style:map style:condition="value()&gt;=0" style:apply-style-name="N240P0"/>
    </number:number-style>
    <number:currency-style style:name="N242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242">
      <style:text-properties fo:color="#ff0000"/>
      <number:text>-</number:text>
      <number:currency-symbol number:language="pt" number:country="BR">R$</number:currency-symbol>
      <number:number number:decimal-places="2" loext:min-decimal-places="2" number:min-integer-digits="1" number:grouping="true"/>
      <style:map style:condition="value()&gt;=0" style:apply-style-name="N242P0"/>
    </number:currency-style>
    <number:number-style style:name="N243P0" style:volatile="true">
      <number:number number:decimal-places="1" loext:min-decimal-places="1" number:min-integer-digits="1"/>
    </number:number-style>
    <number:number-style style:name="N243">
      <style:text-properties fo:color="#ff0000"/>
      <number:text>-</number:text>
      <number:number number:decimal-places="1" loext:min-decimal-places="1" number:min-integer-digits="1"/>
      <style:map style:condition="value()&gt;=0" style:apply-style-name="N243P0"/>
    </number:number-style>
    <number:number-style style:name="N245P0" style:volatile="true">
      <number:number number:decimal-places="0" loext:min-decimal-places="0" number:min-integer-digits="1" number:grouping="true"/>
      <number:text> </number:text>
    </number:number-style>
    <number:number-style style:name="N2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45P2" style:volatile="true">
      <number:text>-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247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247P2" style:volatile="true">
      <number:text> R$ -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currency-style style:name="N251P0" style:volatile="true">
      <number:currency-symbol number:language="pt" number:country="BR">R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51P1" style:volatile="true">
      <number:text>-</number:text>
      <number:currency-symbol number:language="pt" number:country="BR">R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51P2" style:volatile="true">
      <number:currency-symbol number:language="pt" number:country="BR">R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currency-style style:name="N255P0" style:volatile="true">
      <number:currency-symbol number:language="pt" number:country="BR">R$</number:currency-symbol>
      <number:number number:decimal-places="2" loext:min-decimal-places="2" number:min-integer-digits="1" number:grouping="true"/>
      <number:text> </number:text>
    </number:currency-style>
    <number:currency-style style:name="N255P1" style:volatile="true">
      <number:text>-</number:text>
      <number:currency-symbol number:language="pt" number:country="BR">R$</number:currency-symbol>
      <number:number number:decimal-places="2" loext:min-decimal-places="2" number:min-integer-digits="1" number:grouping="true"/>
      <number:text> </number:text>
    </number:currency-style>
    <number:currency-style style:name="N255P2" style:volatile="true">
      <number:currency-symbol number:language="pt" number:country="BR">R$</number:currency-symbol>
      <number:text>-</number:text>
      <number:number number:decimal-places="0" loext:min-decimal-places="0" number:min-integer-digits="0"/>
      <number:text> </number:text>
    </number:currency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6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6P2" style:volatile="true">
      <loext:text> R$</loext:text>
      <loext:fill-character> </loext:fill-character>
      <number:text>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8P0" style:volatile="true">
      <number:text>Sim</number:text>
    </number:number-style>
    <number:number-style style:name="N258P1" style:volatile="true">
      <number:text>Sim</number:text>
    </number:number-style>
    <number:number-style style:name="N258">
      <number:text>Não</number:text>
      <style:map style:condition="value()&gt;0" style:apply-style-name="N258P0"/>
      <style:map style:condition="value()&lt;0" style:apply-style-name="N258P1"/>
    </number:number-style>
    <number:number-style style:name="N260P0" style:volatile="true">
      <number:text>Verdadeiro</number:text>
    </number:number-style>
    <number:number-style style:name="N260P1" style:volatile="true">
      <number:text>Verdadeiro</number:text>
    </number:number-style>
    <number:number-style style:name="N260">
      <number:text>Falso</number:text>
      <style:map style:condition="value()&gt;0" style:apply-style-name="N260P0"/>
      <style:map style:condition="value()&lt;0" style:apply-style-name="N260P1"/>
    </number:number-style>
    <number:number-style style:name="N262P0" style:volatile="true">
      <number:text>Ativar</number:text>
    </number:number-style>
    <number:number-style style:name="N262P1" style:volatile="true">
      <number:text>Ativar</number:text>
    </number:number-style>
    <number:number-style style:name="N262">
      <number:text>Desativar</number:text>
      <style:map style:condition="value()&gt;0" style:apply-style-name="N262P0"/>
      <style:map style:condition="value()&lt;0" style:apply-style-name="N262P1"/>
    </number:number-style>
    <number:currency-style style:name="N264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64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64P0"/>
    </number:currency-style>
    <number:number-style style:name="N265P0" style:volatile="true">
      <number:number number:decimal-places="0" loext:min-decimal-places="0" number:min-integer-digits="1" number:grouping="true"/>
      <number:text> </number:text>
    </number:number-style>
    <number:number-style style:name="N265">
      <number:text>-</number:text>
      <number:number number:decimal-places="0" loext:min-decimal-places="0" number:min-integer-digits="1" number:grouping="true"/>
      <number:text> </number:text>
      <style:map style:condition="value()&gt;=0" style:apply-style-name="N265P0"/>
    </number:number-style>
    <number:number-style style:name="N266P0" style:volatile="true">
      <number:number number:decimal-places="2" loext:min-decimal-places="2" number:min-integer-digits="1" number:grouping="true"/>
      <number:text> </number:text>
    </number:number-style>
    <number:number-style style:name="N266">
      <number:text>-</number:text>
      <number:number number:decimal-places="2" loext:min-decimal-places="2" number:min-integer-digits="1" number:grouping="true"/>
      <number:text> </number:text>
      <style:map style:condition="value()&gt;=0" style:apply-style-name="N266P0"/>
    </number:number-style>
    <number:number-style style:name="N267">
      <number:text>85.9780.35</number:text>
    </number:number-style>
    <number:number-style style:name="N26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8">
      <number:text> </number:text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date-style style:name="N269">
      <number:month number:textual="true"/>
      <number:text>-</number:text>
      <number:year/>
    </number:date-style>
    <number:number-style style:name="N270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0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0P2" style:volatile="true">
      <loext:text> R$ </loext:text>
      <loext:fill-character> </loext:fill-character>
      <number:text>- </number:text>
    </number:number-style>
    <number:text-style style:name="N270">
      <number:text> </number:text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">
      <number:number number:decimal-places="6" loext:min-decimal-places="6" number:min-integer-digits="2"/>
    </number:number-style>
    <number:currency-style style:name="N27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7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73P0"/>
    </number:currency-style>
    <number:number-style style:name="N2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8">
      <number:number number:decimal-places="0" loext:min-decimal-places="0" number:min-integer-digits="8" number:grouping="true"/>
    </number:number-style>
    <number:number-style style:name="N279">
      <number:number number:decimal-places="0" loext:min-decimal-places="0" number:min-integer-digits="0" number:grouping="true"/>
    </number:number-style>
    <number:number-style style:name="N280P0" style:volatile="true">
      <number:number number:decimal-places="2" loext:min-decimal-places="2" number:min-integer-digits="1"/>
    </number:number-style>
    <number:number-style style:name="N280">
      <style:text-properties fo:color="#ff0000"/>
      <number:number number:decimal-places="2" loext:min-decimal-places="2" number:min-integer-digits="1"/>
      <style:map style:condition="value()&gt;=0" style:apply-style-name="N280P0"/>
    </number:number-style>
    <number:date-style style:name="N282P0" style:volatile="true">
      <number:day/>
      <number:text>/</number:text>
      <number:month/>
    </number:date-style>
    <number:text-style style:name="N282">
      <number:text-content/>
      <style:map style:condition="value()&lt;=1.79769313486232E+308" style:apply-style-name="N282P0"/>
    </number:text-style>
    <number:date-style style:name="N283">
      <number:month number:textual="true"/>
      <number:text>/</number:text>
      <number:year number:style="long"/>
    </number:date-style>
    <number:number-style style:name="N287P0" style:volatile="true">
      <number:number number:decimal-places="2" loext:min-decimal-places="2" number:min-integer-digits="1" number:grouping="true"/>
      <number:text>    </number:text>
    </number:number-style>
    <number:number-style style:name="N28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87P2" style:volatile="true">
      <number:text>-</number:text>
      <number:number number:decimal-places="0" loext:min-decimal-places="0" number:min-integer-digits="0"/>
      <number:text>   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text>Ativado</number:text>
    </number:number-style>
    <number:number-style style:name="N289P1" style:volatile="true">
      <number:text>Ativado</number:text>
    </number:number-style>
    <number:number-style style:name="N289">
      <number:text>Desativado</number:text>
      <style:map style:condition="value()&gt;0" style:apply-style-name="N289P0"/>
      <style:map style:condition="value()&lt;0" style:apply-style-name="N289P1"/>
    </number:number-style>
    <number:percentage-style style:name="N290">
      <number:number number:decimal-places="3" loext:min-decimal-places="3" number:min-integer-digits="1"/>
      <number:text>%</number:text>
    </number:percentage-style>
    <number:currency-style style:name="N29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9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92P0"/>
    </number:currency-style>
    <number:currency-style style:name="N294P0" style:volatile="true">
      <number:currency-symbol number:language="pt" number:country="BR">R$</number:currency-symbol>
      <number:text> </number:text>
      <number:number number:decimal-places="5" loext:min-decimal-places="5" number:min-integer-digits="1" number:grouping="true"/>
    </number:currency-style>
    <number:currency-style style:name="N294">
      <style:text-properties fo:color="#ff0000"/>
      <number:text>-</number:text>
      <number:currency-symbol number:language="pt" number:country="BR">R$</number:currency-symbol>
      <number:text> </number:text>
      <number:number number:decimal-places="5" loext:min-decimal-places="5" number:min-integer-digits="1" number:grouping="true"/>
      <style:map style:condition="value()&gt;=0" style:apply-style-name="N294P0"/>
    </number:currency-style>
    <number:number-style style:name="N295">
      <number:number number:decimal-places="5" loext:min-decimal-places="5" number:min-integer-digits="1"/>
    </number:number-style>
    <number:number-style style:name="N296">
      <number:number number:decimal-places="8" loext:min-decimal-places="8" number:min-integer-digits="0"/>
    </number:number-style>
    <number:number-style style:name="N297">
      <number:number number:decimal-places="7" loext:min-decimal-places="7" number:min-integer-digits="0"/>
    </number:number-style>
    <number:number-style style:name="N298">
      <number:number number:decimal-places="6" loext:min-decimal-places="6" number:min-integer-digits="0"/>
    </number:number-style>
    <number:number-style style:name="N299">
      <number:number number:decimal-places="5" loext:min-decimal-places="5" number:min-integer-digits="0"/>
    </number:number-style>
    <number:number-style style:name="N300">
      <number:number number:decimal-places="4" loext:min-decimal-places="4" number:min-integer-digits="0"/>
    </number:number-style>
    <number:number-style style:name="N301">
      <number:number number:decimal-places="3" loext:min-decimal-places="3" number:min-integer-digits="0"/>
    </number:number-style>
    <number:currency-style style:name="N303P0" style:volatile="true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303">
      <style:text-properties fo:color="#ff0000"/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303P0"/>
    </number:currency-style>
    <number:currency-style style:name="N305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305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305P0"/>
    </number:currency-style>
    <number:currency-style style:name="N307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307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307P0"/>
    </number:currency-style>
    <number:number-style style:name="N308P0" style:volatile="true">
      <number:text>R$ </number:text>
      <number:number number:decimal-places="2" loext:min-decimal-places="2" number:min-integer-digits="1" number:grouping="true"/>
    </number:number-style>
    <number:number-style style:name="N308">
      <style:text-properties fo:color="#ff0000"/>
      <number:text>R$ </number:text>
      <number:number number:decimal-places="2" loext:min-decimal-places="2" number:min-integer-digits="1" number:grouping="true"/>
      <style:map style:condition="value()&gt;=0" style:apply-style-name="N308P0"/>
    </number:number-style>
    <number:number-style style:name="N310P0" style:volatile="true">
      <number:number number:decimal-places="2" loext:min-decimal-places="2" number:min-integer-digits="1" number:grouping="true"/>
      <number:text> </number:text>
    </number:number-style>
    <number:number-style style:name="N31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310P2" style:volatile="true">
      <number:text>-</number:text>
      <number:number number:decimal-places="0" loext:min-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3P0" style:volatile="true">
      <number:number number:decimal-places="0" loext:min-decimal-places="0" number:min-integer-digits="1" number:grouping="true"/>
      <number:text> </number:text>
    </number:number-style>
    <number:number-style style:name="N31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313P2" style:volatile="true">
      <number:text> -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4P0" style:volatile="true">
      <number:number number:decimal-places="0" loext:min-decimal-places="0" number:min-integer-digits="1" number:grouping="true"/>
      <number:text> </number:text>
    </number:number-style>
    <number:number-style style:name="N31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14P2" style:volatile="true">
      <number:text> -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16P2" style:volatile="true">
      <loext:text> </loext:text>
      <loext:fill-character> </loext:fill-character>
      <number:text>-</number:text>
      <number:number number:decimal-places="0" loext:min-decimal-places="0" number:min-integer-digits="2"/>
      <number:text> </number:text>
    </number:number-style>
    <number:text-style style:name="N316">
      <number:text> </number:text>
      <number:text-content/>
      <number:text>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number-style style:name="N31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1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18P2" style:volatile="true">
      <loext:text> R$ </loext:text>
      <loext:fill-character> </loext:fill-character>
      <number:text>-</number:text>
      <number:number number:decimal-places="0" loext:min-decimal-places="0" number:min-integer-digits="2"/>
      <number:text> </number:text>
    </number:number-style>
    <number:text-style style:name="N318">
      <number:text> </number:text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20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20P2" style:volatile="true">
      <loext:text> R$</loext:text>
      <loext:fill-character> </loext:fill-character>
      <number:text>-</number:text>
      <number:number number:decimal-places="0" loext:min-decimal-places="0" number:min-integer-digits="2"/>
      <number:text> </number:text>
    </number:number-style>
    <number:text-style style:name="N320">
      <number:text> </number:text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322P2" style:volatile="true">
      <loext:text> </loext:text>
      <loext:fill-character> </loext:fill-character>
      <number:text>- _)</number:text>
    </number:number-style>
    <number:text-style style:name="N322">
      <number:text> </number:text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24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324P2" style:volatile="true">
      <loext:text> R$ </loext:text>
      <loext:fill-character> </loext:fill-character>
      <number:text>- _)</number:text>
    </number:number-style>
    <number:text-style style:name="N324">
      <number:text> </number:text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2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325P2" style:volatile="true">
      <loext:text> </loext:text>
      <loext:fill-character> </loext:fill-character>
      <number:text>-</number:text>
      <number:number number:decimal-places="0" loext:min-decimal-places="0" number:min-integer-digits="2"/>
      <number:text> </number:text>
    </number:number-style>
    <number:text-style style:name="N325">
      <number:text> </number:text>
      <number:text-content/>
      <number:text> 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26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326P2" style:volatile="true">
      <loext:text> R$ </loext:text>
      <loext:fill-character> </loext:fill-character>
      <number:text>-</number:text>
      <number:number number:decimal-places="0" loext:min-decimal-places="0" number:min-integer-digits="2"/>
      <number:text> </number:text>
    </number:number-style>
    <number:text-style style:name="N326">
      <number:text> </number:text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3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43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43P0"/>
    </number:currency-style>
    <number:number-style style:name="N10146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pt" number:country="BR">
      <number:text>(</number:text>
      <number:number number:decimal-places="0" loext:min-decimal-places="0" number:min-integer-digits="1" number:grouping="true"/>
      <number:text>)</number:text>
    </number:number-style>
    <number:number-style style:name="N10146P2" style:volatile="true" number:language="pt" number:country="BR">
      <number:text>- </number:text>
    </number:number-style>
    <number:text-style style:name="N10146" number:language="pt" number:country="B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49P1" style:volatile="true" number:language="pt" number:country="BR">
      <number:text>(</number:text>
      <number:number number:decimal-places="2" loext:min-decimal-places="2" number:min-integer-digits="1" number:grouping="true"/>
      <number:text>)</number:text>
    </number:number-style>
    <number:number-style style:name="N10149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49" number:language="pt" number:country="BR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3P2" style:volatile="true" number:language="pt" number:country="BR">
      <loext:fill-character> </loext:fill-character>
      <number:text>- </number:text>
    </number:number-style>
    <number:text-style style:name="N10153" number:language="pt" number:country="BR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4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4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4P2" style:volatile="true" number:language="pt" number:country="BR">
      <loext:text> R$ </loext:text>
      <loext:fill-character> </loext:fill-character>
      <number:text>- </number:text>
    </number:number-style>
    <number:text-style style:name="N10154" number:language="pt" number:country="BR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8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8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8" number:language="pt" number:country="BR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59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9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pt" number:country="BR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pt" number:country="BR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161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pt" number:country="BR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10163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10163P0"/>
    </number:currency-style>
    <number:number-style style:name="N10167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67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67P2" style:volatile="true" number:language="pt" number:country="BR">
      <number:text> R$ - </number:text>
    </number:number-style>
    <number:text-style style:name="N10167" number:language="pt" number:country="BR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71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71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71" number:language="pt" number:country="BR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currency-style style:name="N10172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date-style style:name="N10173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0174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time-style style:name="N10175" number:language="pt" number:country="BR">
      <number:minutes number:style="long"/>
      <number:text>:</number:text>
      <number:seconds number:style="long" number:decimal-places="1"/>
    </number:time-style>
    <number:time-style style:name="N1017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77" number:language="pt" number:country="BR">
      <number:minutes number:style="long"/>
      <number:text>:</number:text>
      <number:seconds number:style="long"/>
    </number:time-style>
    <number:number-style style:name="N10179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79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79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79" number:language="pt" number:country="BR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82P2" style:volatile="true" number:language="pt" number:country="BR">
      <number:text> - </number:text>
    </number:number-style>
    <number:text-style style:name="N10182" number:language="pt" number:country="BR"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Texto_20_Explicativo_20_1" style:display-name="Excel_BuiltIn_Texto Explicativo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o_20_Explicativo_20_2" style:display-name="Texto Explicativo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 style:font-name="Calibri1" fo:font-family="Calibri" style:font-name-complex="Calibri1" style:font-family-complex="Calibri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 style:font-name="Calibri1" fo:font-family="Calibri" style:font-name-complex="Calibri1" style:font-family-complex="Calibri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6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2.19mm" fo:margin-bottom="9mm" fo:margin-left="12.95mm" fo:margin-right="13.72mm" style:first-page-number="continue" loext:scale-to-X="1" loext:scale-to-Y="1" style:table-centering="both" style:writing-mode="lr-tb"/>
      <style:header-style>
        <style:header-footer-properties fo:min-height="7.5mm" fo:margin-left="6.05mm" fo:margin-right="5.27mm" fo:margin-bottom="4.94mm"/>
      </style:header-style>
      <style:footer-style>
        <style:header-footer-properties fo:min-height="7.5mm" fo:margin-left="6.05mm" fo:margin-right="5.27mm" fo:margin-top="0.69mm"/>
      </style:footer-style>
    </style:page-layout>
    <style:page-layout style:name="Mpm4">
      <style:page-layout-properties style:num-format="1" style:print-orientation="portrait" fo:margin-top="20mm" fo:margin-bottom="20mm" fo:margin-left="13mm" fo:margin-right="13mm" style:first-page-number="continue" style:scale-to="71%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  <style:page-layout style:name="Mpm5">
      <style:page-layout-properties fo:page-width="297mm" fo:page-height="210.01mm" style:num-format="1" style:print-orientation="landscape" fo:margin-top="20mm" fo:margin-bottom="20mm" fo:margin-left="13mm" fo:margin-right="13mm" style:first-page-number="continue" loext:scale-to-X="1" loext:scale-to-Y="1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7-06">00/00/0000</text:date>, <text:time style:data-style-name="N2" text:time-value="06:45:44.29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ODELO" style:display-name="PageStyle_MODELO" style:page-layout-name="Mpm3">
      <style:header>
        <text:p><text:span text:style-name="MT1">HOSPITAL NAVAL MARCÍLIO DIAS</text:span></text:p>
        <text:p><text:span text:style-name="MT1">VICE DIRETORIA DE SAÚDE</text:span></text:p>
        <text:p><text:span text:style-name="MT1">CLÍNICA DE ORTOPEDIA</text:span></text:p>
        <text:p><text:span text:style-name="MT1">MAPA DE USO PARA MATERIAL CONSIGNADO</text:span></text:p>
      </style:header>
      <style:header-left style:display="false">
        <text:p><text:span text:style-name="MT1">HOSPITAL NAVAL MARCÍLIO DIAS</text:span></text:p>
        <text:p><text:span text:style-name="MT1">VICE DIRETORIA DE SAÚDE</text:span></text:p>
        <text:p><text:span text:style-name="MT1">CLÍNICA DE ORTOPEDIA</text:span></text:p>
        <text:p><text:span text:style-name="MT1">MAPA DE USO PARA MATERIAL CONSIGNADO</text:span></text:p>
      </style:header-left>
      <style:footer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<text:date style:data-style-name="N2" text:date-value="2026-07-06">00/00/0000</text:date></text:span></text:p>
        </style:region-right>
      </style:footer>
      <style:footer-left style:display="false"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<text:date style:data-style-name="N2" text:date-value="2026-07-06">00/00/0000</text:date></text:span></text:p>
        </style:region-right>
      </style:footer-left>
    </style:master-page>
    <style:master-page style:name="PageStyle_5f_LISTA_20_DE_20_MATERIAIS" style:display-name="PageStyle_LISTA DE MATERIAI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nmd</meta:initial-creator>
    <meta:creation-date>2013-01-10T16:22:04</meta:creation-date>
    <dc:date>2026-07-06T06:53:47.600000000</dc:date>
    <meta:editing-cycles>228</meta:editing-cycles>
    <meta:editing-duration>P1DT12H54M26S</meta:editing-duration>
    <meta:generator>LibreOffice/5.2.7.2$Windows_X86_64 LibreOffice_project/2b7f1e640c46ceb28adf43ee075a6e8b8439ed10</meta:generator>
    <meta:document-statistic meta:table-count="4" meta:cell-count="1595" meta:object-count="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